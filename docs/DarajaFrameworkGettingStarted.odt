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67000000BAAC8003A9.png" manifest:media-type="image/png"/>
  <manifest:file-entry manifest:full-path="Pictures/10000000000003EA00000320E75BF104.png" manifest:media-type="image/png"/>
  <manifest:file-entry manifest:full-path="Pictures/100000000000022D000000AA71839787.png" manifest:media-type="image/png"/>
  <manifest:file-entry manifest:full-path="Pictures/1000000000000203000000D73EE80221.png" manifest:media-type="image/png"/>
  <manifest:file-entry manifest:full-path="Pictures/1000000000000285000000DB431F8AA5.png" manifest:media-type="image/png"/>
  <manifest:file-entry manifest:full-path="Pictures/100000000000022D000000AAE1C5EF9C.png" manifest:media-type="image/png"/>
  <manifest:file-entry manifest:full-path="Pictures/1000000000000265000000A807C785E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text-properties style:font-name="Verdana1" fo:font-size="10.5pt" officeooo:rsid="0075b04f" officeooo:paragraph-rsid="0075b04f" style:font-name-asian="Verdana1" style:font-size-asian="10.5pt" style:font-name-complex="Verdana1" style:font-size-complex="10.5pt"/>
    </style:style>
    <style:style style:name="P17" style:family="paragraph" style:parent-style-name="Standard" style:list-style-name="L3">
      <style:text-properties style:font-name="Verdana1" fo:font-size="10.5pt" style:font-name-asian="Verdana1" style:font-size-asian="10.5pt" style:font-name-complex="Verdana1" style:font-size-complex="10.5pt"/>
    </style:style>
    <style:style style:name="P18"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9" style:family="paragraph" style:parent-style-name="SourceCode">
      <style:text-properties fo:font-size="10.5pt" style:font-name-asian="Verdana1" style:font-size-asian="10.5pt" style:font-name-complex="Verdana1" style:font-size-complex="10.5pt"/>
    </style:style>
    <style:style style:name="P20" style:family="paragraph" style:parent-style-name="Standard" style:list-style-name="L4">
      <style:text-properties style:font-name="Verdana1" fo:font-size="10.5pt" style:font-name-asian="Verdana1" style:font-size-asian="10.5pt" style:font-name-complex="Verdana1" style:font-size-complex="10.5pt"/>
    </style:style>
    <style:style style:name="P21" style:family="paragraph" style:parent-style-name="SourceCode">
      <style:text-properties officeooo:paragraph-rsid="007493dc"/>
    </style:style>
    <style:style style:name="P22" style:family="paragraph" style:parent-style-name="Standard" style:list-style-name="L5"/>
    <style:style style:name="P23" style:family="paragraph" style:parent-style-name="Standard">
      <style:text-properties officeooo:paragraph-rsid="007ec111"/>
    </style:style>
    <style:style style:name="P24" style:family="paragraph" style:parent-style-name="Standard">
      <style:text-properties fo:font-weight="normal" officeooo:paragraph-rsid="007ec111" style:font-weight-asian="normal" style:font-weight-complex="normal"/>
    </style:style>
    <style:style style:name="P25" style:family="paragraph" style:parent-style-name="Standard" style:list-style-name="L6"/>
    <style:style style:name="P26" style:family="paragraph" style:parent-style-name="Standard">
      <style:text-properties fo:font-weight="normal" style:font-weight-asian="normal" style:font-weight-complex="normal"/>
    </style:style>
    <style:style style:name="P27" style:family="paragraph" style:parent-style-name="Standard" style:list-style-name="L7">
      <style:text-properties style:font-name="Verdana1" fo:font-size="10.5pt" style:font-name-asian="Verdana1" style:font-size-asian="10.5pt" style:font-name-complex="Verdana1" style:font-size-complex="10.5pt"/>
    </style:style>
    <style:style style:name="P28" style:family="paragraph" style:parent-style-name="Standard" style:list-style-name="L7">
      <style:text-properties officeooo:paragraph-rsid="0013fab0"/>
    </style:style>
    <style:style style:name="P29" style:family="paragraph" style:parent-style-name="Standard" style:list-style-name="L8"/>
    <style:style style:name="P30" style:family="paragraph" style:parent-style-name="CodeExampleHeader">
      <style:text-properties officeooo:paragraph-rsid="002c9164"/>
    </style:style>
    <style:style style:name="P31" style:family="paragraph" style:parent-style-name="Standard" style:list-style-name="L9">
      <style:text-properties style:font-name="Verdana1" fo:font-size="10.5pt" style:font-name-asian="Verdana1" style:font-size-asian="10.5pt" style:font-name-complex="Verdana1" style:font-size-complex="10.5pt"/>
    </style:style>
    <style:style style:name="P32"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33" style:family="paragraph" style:parent-style-name="SourceCode">
      <style:text-properties officeooo:paragraph-rsid="00775a24"/>
    </style:style>
    <style:style style:name="P34" style:family="paragraph" style:parent-style-name="Standard" style:list-style-name="L10"/>
    <style:style style:name="P35" style:family="paragraph" style:parent-style-name="Standard">
      <style:text-properties officeooo:paragraph-rsid="00775a24"/>
    </style:style>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officeooo:paragraph-rsid="00624c69"/>
    </style:style>
    <style:style style:name="P39" style:family="paragraph" style:parent-style-name="Standard" style:list-style-name="L13">
      <style:text-properties officeooo:paragraph-rsid="00624c69"/>
    </style:style>
    <style:style style:name="P40" style:family="paragraph" style:parent-style-name="Standard" style:list-style-name="L14">
      <style:text-properties style:font-name="Verdana1" fo:font-size="10.5pt" style:font-name-asian="Verdana1" style:font-size-asian="10.5pt" style:font-name-complex="Verdana1" style:font-size-complex="10.5pt"/>
    </style:style>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text-properties style:font-name="Verdana1" fo:font-size="10.5pt" style:font-name-asian="Verdana1" style:font-size-asian="10.5pt" style:font-name-complex="Verdana1" style:font-size-complex="10.5pt"/>
    </style:style>
    <style:style style:name="P44" style:family="paragraph" style:parent-style-name="Standard" style:list-style-name="L17"/>
    <style:style style:name="P45" style:family="paragraph" style:parent-style-name="Standard" style:list-style-name="L18">
      <style:text-properties officeooo:paragraph-rsid="00508d9b"/>
    </style:style>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19">
      <style:text-properties officeooo:paragraph-rsid="00156131"/>
    </style:style>
    <style:style style:name="P49" style:family="paragraph" style:parent-style-name="Standard">
      <style:text-properties officeooo:paragraph-rsid="00156131"/>
    </style:style>
    <style:style style:name="P50" style:family="paragraph" style:parent-style-name="Standard" style:list-style-name="L20"/>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officeooo:rsid="0023c3ee" officeooo:paragraph-rsid="0023c3ee"/>
    </style:style>
    <style:style style:name="P53" style:family="paragraph" style:parent-style-name="Standard">
      <style:text-properties style:use-window-font-color="true" loext:opacity="0%" style:text-underline-style="none"/>
    </style:style>
    <style:style style:name="P54" style:family="paragraph" style:parent-style-name="Standard" style:list-style-name="L21"/>
    <style:style style:name="P55" style:family="paragraph" style:parent-style-name="Standard" style:list-style-name="L22"/>
    <style:style style:name="P56" style:family="paragraph" style:parent-style-name="Heading_20_3">
      <style:text-properties style:use-window-font-color="true" loext:opacity="0%" style:text-underline-style="none"/>
    </style:style>
    <style:style style:name="P57" style:family="paragraph" style:parent-style-name="Standard" style:list-style-name="L23"/>
    <style:style style:name="P58" style:family="paragraph" style:parent-style-name="Preformatted_20_Text">
      <style:text-properties style:use-window-font-color="true" loext:opacity="0%" style:text-underline-style="none"/>
    </style:style>
    <style:style style:name="P59" style:family="paragraph" style:parent-style-name="Standard">
      <style:text-properties officeooo:paragraph-rsid="001582a7"/>
    </style:style>
    <style:style style:name="P60" style:family="paragraph" style:parent-style-name="Standard" style:list-style-name="L24"/>
    <style:style style:name="P61" style:family="paragraph" style:parent-style-name="Standard">
      <style:paragraph-properties fo:orphans="2" fo:widows="2"/>
    </style:style>
    <style:style style:name="P62" style:family="paragraph" style:parent-style-name="CodeExampleHeader">
      <style:paragraph-properties fo:orphans="2" fo:widows="2"/>
      <style:text-properties officeooo:paragraph-rsid="002c9164"/>
    </style:style>
    <style:style style:name="P63" style:family="paragraph" style:parent-style-name="Preformatted_20_Text">
      <style:paragraph-properties fo:orphans="2" fo:widows="2"/>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5"/>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6"/>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7"/>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8"/>
    <style:style style:name="P72" style:family="paragraph" style:parent-style-name="Heading_20_2">
      <style:paragraph-properties fo:break-before="page"/>
      <style:text-properties officeooo:rsid="0027c038"/>
    </style:style>
    <style:style style:name="P73" style:family="paragraph" style:parent-style-name="Standard">
      <style:text-properties officeooo:paragraph-rsid="0026c639"/>
    </style:style>
    <style:style style:name="P74" style:family="paragraph" style:parent-style-name="CodeExampleHeader">
      <style:text-properties officeooo:paragraph-rsid="0035783c"/>
    </style:style>
    <style:style style:name="P75" style:family="paragraph" style:parent-style-name="Preformatted_20_Text">
      <style:text-properties officeooo:paragraph-rsid="0026c639"/>
    </style:style>
    <style:style style:name="P76" style:family="paragraph" style:parent-style-name="Heading_20_1">
      <style:text-properties officeooo:rsid="0051e031" officeooo:paragraph-rsid="00561a42"/>
    </style:style>
    <style:style style:name="P77" style:family="paragraph" style:parent-style-name="Heading_20_2">
      <style:text-properties officeooo:paragraph-rsid="00561a42"/>
    </style:style>
    <style:style style:name="P78" style:family="paragraph" style:parent-style-name="Standard">
      <style:text-properties style:use-window-font-color="true" loext:opacity="0%" style:text-underline-style="none" officeooo:paragraph-rsid="00561a42"/>
    </style:style>
    <style:style style:name="P79" style:family="paragraph" style:parent-style-name="Standard" style:list-style-name="L29">
      <style:text-properties officeooo:paragraph-rsid="00561a42"/>
    </style:style>
    <style:style style:name="P80" style:family="paragraph" style:parent-style-name="Standard" style:list-style-name="L30">
      <style:text-properties officeooo:paragraph-rsid="00561a42"/>
    </style:style>
    <style:style style:name="P81" style:family="paragraph" style:parent-style-name="Standard" style:list-style-name="L30">
      <style:text-properties style:use-window-font-color="true" loext:opacity="0%" style:text-underline-style="none" officeooo:rsid="00561a42" officeooo:paragraph-rsid="00561a42"/>
    </style:style>
    <style:style style:name="P82" style:family="paragraph" style:parent-style-name="Standard">
      <style:text-properties officeooo:rsid="0051e031" officeooo:paragraph-rsid="00561a42"/>
    </style:style>
    <style:style style:name="P83" style:family="paragraph" style:parent-style-name="Heading_20_3">
      <style:text-properties officeooo:rsid="0051e031" officeooo:paragraph-rsid="00561a42"/>
    </style:style>
    <style:style style:name="P84" style:family="paragraph" style:parent-style-name="CodeExampleHeader">
      <style:text-properties style:use-window-font-color="true" loext:opacity="0%" style:text-underline-style="none" officeooo:paragraph-rsid="00561a42"/>
    </style:style>
    <style:style style:name="P85" style:family="paragraph" style:parent-style-name="Delphi_20_Code">
      <style:text-properties officeooo:paragraph-rsid="00561a42"/>
    </style:style>
    <style:style style:name="P86" style:family="paragraph" style:parent-style-name="Standard">
      <style:text-properties officeooo:paragraph-rsid="00561a42"/>
    </style:style>
    <style:style style:name="P87" style:family="paragraph" style:parent-style-name="Heading_20_2">
      <style:text-properties officeooo:rsid="0051e031" officeooo:paragraph-rsid="00561a42"/>
    </style:style>
    <style:style style:name="P88" style:family="paragraph" style:parent-style-name="Standard">
      <style:text-properties officeooo:rsid="0053b45a" officeooo:paragraph-rsid="00561a42"/>
    </style:style>
    <style:style style:name="P89" style:family="paragraph" style:parent-style-name="Standard">
      <style:text-properties officeooo:rsid="005554e8" officeooo:paragraph-rsid="00561a42"/>
    </style:style>
    <style:style style:name="P90" style:family="paragraph" style:parent-style-name="Delphi_20_Code">
      <style:text-properties officeooo:paragraph-rsid="006fd82a"/>
    </style:style>
    <style:style style:name="P91" style:family="paragraph" style:parent-style-name="CodeExampleHeader">
      <style:text-properties style:use-window-font-color="true" loext:opacity="0%" style:text-underline-style="none" officeooo:paragraph-rsid="002c9164"/>
    </style:style>
    <style:style style:name="P92" style:family="paragraph" style:parent-style-name="Heading_20_1">
      <style:text-properties officeooo:rsid="002dd1fe" officeooo:paragraph-rsid="002dd1fe"/>
    </style:style>
    <style:style style:name="P93" style:family="paragraph" style:parent-style-name="Heading_20_2">
      <style:text-properties officeooo:rsid="00643a95" officeooo:paragraph-rsid="00643a95"/>
    </style:style>
    <style:style style:name="P94" style:family="paragraph" style:parent-style-name="Heading_20_3">
      <style:text-properties officeooo:rsid="008fb550" officeooo:paragraph-rsid="008fb550"/>
    </style:style>
    <style:style style:name="P95" style:family="paragraph" style:parent-style-name="Standard" style:list-style-name="L31">
      <style:text-properties officeooo:rsid="008fb550" officeooo:paragraph-rsid="008fb550"/>
    </style:style>
    <style:style style:name="P96" style:family="paragraph" style:parent-style-name="Standard" style:list-style-name="L32">
      <style:text-properties officeooo:rsid="00643a95" officeooo:paragraph-rsid="00643a95"/>
    </style:style>
    <style:style style:name="P97" style:family="paragraph" style:parent-style-name="Heading_20_2">
      <style:text-properties officeooo:rsid="002dd1fe" officeooo:paragraph-rsid="002dd1fe"/>
    </style:style>
    <style:style style:name="P98" style:family="paragraph" style:parent-style-name="Standard">
      <style:text-properties officeooo:paragraph-rsid="0081fa86"/>
    </style:style>
    <style:style style:name="P99" style:family="paragraph" style:parent-style-name="Standard">
      <style:text-properties fo:font-weight="bold" style:font-weight-asian="bold" style:font-weight-complex="bold"/>
    </style:style>
    <style:style style:name="P100" style:family="paragraph" style:parent-style-name="Standard" style:list-style-name="L33"/>
    <style:style style:name="P101" style:family="paragraph" style:parent-style-name="Standard" style:list-style-name="L34"/>
    <style:style style:name="P102" style:family="paragraph" style:parent-style-name="Heading_20_2">
      <style:text-properties officeooo:rsid="0013fab0" officeooo:paragraph-rsid="0013fab0"/>
    </style:style>
    <style:style style:name="P103" style:family="paragraph" style:parent-style-name="Standard">
      <style:text-properties officeooo:rsid="0013fab0" officeooo:paragraph-rsid="0013fab0"/>
    </style:style>
    <style:style style:name="P104" style:family="paragraph" style:parent-style-name="Standard">
      <style:text-properties officeooo:rsid="008d3d57" officeooo:paragraph-rsid="008d3d57"/>
    </style:style>
    <style:style style:name="P105" style:family="paragraph" style:parent-style-name="Standard" style:list-style-name="L35"/>
    <style:style style:name="P106" style:family="paragraph" style:parent-style-name="Standard" style:list-style-name="L36"/>
    <style:style style:name="P107" style:family="paragraph" style:parent-style-name="List_20_Indent" style:list-style-name="L36">
      <style:text-properties fo:font-weight="normal" style:font-weight-asian="normal" style:font-weight-complex="normal"/>
    </style:style>
    <style:style style:name="P108"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9" style:family="paragraph" style:parent-style-name="Standard">
      <style:paragraph-properties fo:padding="0.049cm" fo:border="0.06pt solid #000000" style:shadow="none"/>
    </style:style>
    <style:style style:name="P110" style:family="paragraph" style:parent-style-name="Standard">
      <style:text-properties officeooo:paragraph-rsid="00655b8e"/>
    </style:style>
    <style:style style:name="P111" style:family="paragraph" style:parent-style-name="Footnote">
      <style:text-properties officeooo:paragraph-rsid="0020b0e2"/>
    </style:style>
    <style:style style:name="P112" style:family="paragraph" style:parent-style-name="Standard">
      <style:text-properties officeooo:paragraph-rsid="001bd31e"/>
    </style:style>
    <style:style style:name="P113" style:family="paragraph" style:parent-style-name="Index_20_1">
      <style:paragraph-properties>
        <style:tab-stops>
          <style:tab-stop style:position="8.149cm" style:type="right" style:leader-style="dotted" style:leader-text="."/>
        </style:tab-stops>
      </style:paragraph-properties>
    </style:style>
    <style:style style:name="P114" style:family="paragraph" style:parent-style-name="Standard">
      <style:paragraph-properties fo:break-before="page"/>
    </style:style>
    <style:style style:name="P115" style:family="paragraph" style:parent-style-name="Table_20_index_20_1">
      <style:paragraph-properties>
        <style:tab-stops>
          <style:tab-stop style:position="16.999cm" style:type="right" style:leader-style="dotted" style:leader-text="."/>
        </style:tab-stops>
      </style:paragraph-properties>
    </style:style>
    <style:style style:name="P116"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officeooo:rsid="0081fa86"/>
    </style:style>
    <style:style style:name="T2" style:family="text">
      <style:text-properties style:font-name="Verdana1" fo:font-size="10.5pt" style:font-name-asian="Verdana1" style:font-size-asian="10.5pt" style:font-name-complex="Verdana1" style:font-size-complex="10.5pt"/>
    </style:style>
    <style:style style:name="T3" style:family="text">
      <style:text-properties fo:font-weight="bold"/>
    </style:style>
    <style:style style:name="T4" style:family="text">
      <style:text-properties officeooo:rsid="007db254"/>
    </style:style>
    <style:style style:name="T5" style:family="text">
      <style:text-properties style:font-name="Verdana1" fo:font-size="10.5pt" officeooo:rsid="002a4c3c" style:font-name-asian="Verdana1" style:font-size-asian="10.5pt" style:font-name-complex="Verdana1" style:font-size-complex="10.5pt"/>
    </style:style>
    <style:style style:name="T6" style:family="text">
      <style:text-properties officeooo:rsid="002a4c3c"/>
    </style:style>
    <style:style style:name="T7" style:family="text">
      <style:text-properties fo:font-weight="normal" style:font-weight-asian="normal" style:font-weight-complex="normal"/>
    </style:style>
    <style:style style:name="T8" style:family="text">
      <style:text-properties fo:font-weight="normal" officeooo:rsid="007ec111" style:font-weight-asian="normal" style:font-weight-complex="normal"/>
    </style:style>
    <style:style style:name="T9" style:family="text">
      <style:text-properties fo:font-weight="normal" officeooo:rsid="00775a24"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fo:font-weight="normal" officeooo:rsid="00624c69" style:font-weight-asian="normal" style:font-weight-complex="normal"/>
    </style:style>
    <style:style style:name="T15" style:family="text">
      <style:text-properties officeooo:rsid="00775a24"/>
    </style:style>
    <style:style style:name="T16" style:family="text">
      <style:text-properties style:font-name="Consolas" fo:font-size="10.5pt" officeooo:rsid="002a4c3c" style:font-name-asian="Verdana1" style:font-size-asian="10.5pt" style:font-name-complex="Verdana1" style:font-size-complex="10.5pt"/>
    </style:style>
    <style:style style:name="T17" style:family="text">
      <style:text-properties fo:font-weight="bold" style:font-weight-asian="bold" style:font-weight-complex="bold"/>
    </style:style>
    <style:style style:name="T18" style:family="text">
      <style:text-properties officeooo:rsid="001bb1c5"/>
    </style:style>
    <style:style style:name="T19" style:family="text">
      <style:text-properties fo:font-style="italic" style:font-style-asian="italic" style:font-style-complex="italic"/>
    </style:style>
    <style:style style:name="T20" style:family="text">
      <style:text-properties officeooo:rsid="00508d9b"/>
    </style:style>
    <style:style style:name="T21" style:family="text">
      <style:text-properties style:font-name="Consolas" fo:font-weight="normal" style:font-weight-asian="normal" style:font-weight-complex="normal"/>
    </style:style>
    <style:style style:name="T22" style:family="text">
      <style:text-properties officeooo:rsid="00156131"/>
    </style:style>
    <style:style style:name="T23" style:family="text">
      <style:text-properties officeooo:rsid="00561a42"/>
    </style:style>
    <style:style style:name="T24" style:family="text">
      <style:text-properties style:use-window-font-color="true" loext:opacity="0%" style:text-underline-style="none"/>
    </style:style>
    <style:style style:name="T25" style:family="text">
      <style:text-properties style:use-window-font-color="true" loext:opacity="0%" style:text-underline-style="none" officeooo:rsid="00561a42"/>
    </style:style>
    <style:style style:name="T26" style:family="text">
      <style:text-properties style:use-window-font-color="true" loext:opacity="0%" style:text-underline-style="none" fo:font-weight="bold" style:font-weight-asian="bold" style:font-weight-complex="bold"/>
    </style:style>
    <style:style style:name="T27" style:family="text">
      <style:text-properties style:use-window-font-color="true" loext:opacity="0%" style:text-underline-style="none" officeooo:rsid="002a4c3c"/>
    </style:style>
    <style:style style:name="T28" style:family="text">
      <style:text-properties fo:font-family="SimSun" style:font-family-generic="modern" fo:font-size="12pt" style:font-family-asian="SimSun" style:font-family-generic-asian="modern" style:font-size-asian="12pt" style:font-family-complex="SimSun" style:font-family-generic-complex="modern" style:font-size-complex="12pt"/>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51e031"/>
    </style:style>
    <style:style style:name="T31" style:family="text">
      <style:text-properties style:use-window-font-color="true" loext:opacity="0%" fo:font-style="italic" style:text-underline-style="none" style:font-style-asian="italic" style:font-style-complex="italic"/>
    </style:style>
    <style:style style:name="T32" style:family="text">
      <style:text-properties style:use-window-font-color="true" loext:opacity="0%" style:text-underline-style="none" fo:font-weight="normal" style:font-weight-asian="normal" style:font-weight-complex="normal"/>
    </style:style>
    <style:style style:name="T33" style:family="text">
      <style:text-properties style:font-name="Verdana1" fo:font-size="10.5pt" style:font-size-asian="10.5pt" style:font-size-complex="10.5pt"/>
    </style:style>
    <style:style style:name="T34" style:family="text">
      <style:text-properties style:font-name="Verdana1" fo:font-size="10.5pt" fo:font-style="italic" style:font-size-asian="10.5pt" style:font-style-asian="italic" style:font-size-complex="10.5pt" style:font-style-complex="italic"/>
    </style:style>
    <style:style style:name="T35" style:family="text">
      <style:text-properties style:font-name="Verdana1" fo:font-size="10.5pt" fo:font-weight="bold" style:font-size-asian="10.5pt" style:font-size-complex="10.5pt"/>
    </style:style>
    <style:style style:name="T36" style:family="text">
      <style:text-properties officeooo:rsid="0065415b"/>
    </style:style>
    <style:style style:name="T37" style:family="text">
      <style:text-properties officeooo:rsid="003f8361"/>
    </style:style>
    <style:style style:name="T38" style:family="text">
      <style:text-properties style:font-name="Consolas" fo:font-weight="bold" style:font-weight-asian="bold" style:font-weight-complex="bold"/>
    </style:style>
    <style:style style:name="T39" style:family="text">
      <style:text-properties officeooo:rsid="0069175f"/>
    </style:style>
    <style:style style:name="T40" style:family="text">
      <style:text-properties officeooo:rsid="00655b8e"/>
    </style:style>
    <style:style style:name="T41" style:family="text">
      <style:text-properties officeooo:rsid="0020b0e2"/>
    </style:style>
    <style:style style:name="T42" style:family="text">
      <style:text-properties officeooo:rsid="002472f9"/>
    </style:style>
    <style:style style:name="T43" style:family="text">
      <style:text-properties officeooo:rsid="001431dd"/>
    </style:style>
    <style:style style:name="T44" style:family="text">
      <style:text-properties officeooo:rsid="00789da4"/>
    </style:style>
    <style:style style:name="T45"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1.0</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Creating a “Hello, World!” application<text:tab/>4</text:p>
          <text:p text:style-name="P7">Project Setup<text:tab/>4</text:p>
          <text:p text:style-name="P7">Creating the main uni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Url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1<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already in use” error?<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text:span text:style-name="T1">Creating a </text:span>“Hello, World!” application<text:bookmark-end text:name="__RefHeading___Toc4036_661956188"/></text:h>
      <text:p text:style-name="Standard">The following short tutorial takes you through some of the basic steps of developing a “Hello, World!” example<text:span text:style-name="T2">. </text:span>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utorial/hello</text:span>.</text:p>
      <text:p text:style-name="Standard">This tutorial takes approximately 10 minutes to complete.</text:p>
      <text:p text:style-name="Standard"><text:span text:style-name="T3">To complete this tutorial, you need the software and resources listed in the following table.</text:span> </text:p>
      <text:list xml:id="list3046125233" text:style-name="L1">
        <text:list-item>
          <text:p text:style-name="P10"><text:span text:style-name="T2"><text:title>Daraja HTTP Framework</text:title></text:span><text:span text:style-name="T2"><text:s/></text:span><text:span text:style-name="T2"><text:keywords>3.1.0</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2">add the path to the </text:span><text:span text:style-name="FlowSource">&lt;inst&gt;\source</text:span><text:span text:style-name="T2"> folder to the project search path</text:span></text:p>
        </text:list-item>
        <text:list-item>
          <text:p text:style-name="P15"><text:span text:style-name="T2">save the project as </text:span><text:span text:style-name="FlowSource">HelloWorldServer</text:span></text:p>
        </text:list-item>
      </text:list>
      <text:h text:style-name="P12" text:outline-level="3"><text:bookmark-start text:name="__RefHeading___Toc4040_661956188"/>Creating the <text:span text:style-name="T4">main unit</text:span><text:bookmark-end text:name="__RefHeading___Toc4040_661956188"/></text:h>
      <text:p text:style-name="P16">The <text:span text:style-name="T4">main unit declares a web component, and a Demo procedure which configures and starts the server.</text:span></text:p>
      <text:list text:style-name="L3">
        <text:list-item>
          <text:p text:style-name="P17">create a unit with the code below and save it as <text:span text:style-name="Source_20_Text"><text:span text:style-name="T4">MainUnit</text:span></text:span><text:span text:style-name="Source_20_Text">.pas</text:span></text:p>
        </text:list-item>
      </text:list>
      <text:p text:style-name="P18"><text:span text:style-name="FlowSource"><text:span text:style-name="T5">Code ex</text:span></text:span><text:span text:style-name="FlowSource"><text:span text:style-name="T2">ample</text:span></text:span></text:p>
      <text:p text:style-name="P19"/>
      <text:p text:style-name="SourceCode">unit MainUnit;</text:p>
      <text:p text:style-name="SourceCode"/>
      <text:p text:style-name="SourceCode">interface</text:p>
      <text:p text:style-name="SourceCode"/>
      <text:p text:style-name="SourceCode">procedure Demo;</text:p>
      <text:p text:style-name="SourceCode"><text:soft-page-break/></text:p>
      <text:p text:style-name="SourceCode">implementation</text:p>
      <text:p text:style-name="SourceCode"/>
      <text:p text:style-name="SourceCode">uses</text:p>
      <text:p text:style-name="SourceCode"><text:s text:c="2"/>djWebComponent, djServer, djWebAppContext, djTypes;</text:p>
      <text:p text:style-name="SourceCode"/>
      <text:p text:style-name="SourceCode">type</text:p>
      <text:p text:style-name="SourceCode"><text:s text:c="2"/>THelloWorld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procedure THelloWorldResource.OnGet(Request: TdjRequest; Response: TdjResponse);</text:p>
      <text:p text:style-name="SourceCode">begin</text:p>
      <text:p text:style-name="SourceCode"><text:s text:c="2"/>Response.ContentText := 'Hello, World!';</text:p>
      <text:p text:style-name="SourceCode"><text:s text:c="2"/>Response.ContentType := 'text/plain';</text:p>
      <text:p text:style-name="SourceCode">end;</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Server is running, please open http://127.0.0.1/tutorial/hello');</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 </text:p>
      <text:h text:style-name="P12" text:outline-level="3"><text:bookmark-start text:name="__RefHeading___Toc4042_661956188"/>Create the server configuration and start-up code<text:bookmark-end text:name="__RefHeading___Toc4042_661956188"/></text:h>
      <text:list text:style-name="L4">
        <text:list-item>
          <text:p text:style-name="P20">open the <text:span text:style-name="FlowSource">HelloWorldServer.dpr</text:span> application project file </text:p>
        </text:list-item>
        <text:list-item>
          <text:p text:style-name="P20">paste the code shown below</text:p>
        </text:list-item>
      </text:list>
      <text:p text:style-name="P18"><text:span text:style-name="T6">Code ex</text:span>ample</text:p>
      <text:p text:style-name="SourceCode">program HelloWorldServer;</text:p>
      <text:p text:style-name="SourceCode"/>
      <text:p text:style-name="SourceCode">{$APPTYPE CONSOLE}</text:p>
      <text:p text:style-name="SourceCode"/>
      <text:p text:style-name="P21">uses</text:p>
      <text:p text:style-name="SourceCode"><text:s text:c="2"/>MainUnit in 'MainUnit.pas';</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P23">To test the server, open a web browser and navigate to <text:a xlink:type="simple" xlink:href="http://127.0.0.1/tutorial/hello" text:style-name="Internet_20_link" text:visited-style-name="Visited_20_Internet_20_Link"><text:span text:style-name="Source_20_Text"><text:span text:style-name="T1">127.0.0.1/tutorial/hello</text:span></text:span></text:a><text:span text:style-name="T7">.</text:span></text:p>
      <text:p text:style-name="P24">This will cause a HTTP GET request to be sent from the web browser, asking for the resource.</text:p>
      <text:list text:style-name="L6">
        <text:list-item>
          <text:p text:style-name="P25"><text:span text:style-name="T7">The server will parse the request, look up the </text:span><text:span text:style-name="T8">given </text:span><text:span text:style-name="T7">context </text:span><text:span text:style-name="Source_20_Text"><text:span text:style-name="T7">tutorial</text:span></text:span><text:span text:style-name="T7"> and the web component responsible for this resource. It will find that </text:span><text:span text:style-name="Source_20_Text">THelloWorldResource</text:span><text:span text:style-name="T7"> is mapped to the path '/hello'.</text:span></text:p>
        </text:list-item>
        <text:list-item>
          <text:p text:style-name="P25"><text:span text:style-name="T7">The server then will invoke the GET request handler </text:span><text:span text:style-name="Source_20_Text">THelloWorldResource.OnGet</text:span><text:span text:style-name="T7">, passing request and response objects.</text:span></text:p>
        </text:list-item>
        <text:list-item>
          <text:p text:style-name="P25"><text:span text:style-name="T7">Finally, the </text:span><text:span text:style-name="T9">request handler </text:span><text:span text:style-name="T7">code builds the response, which will be sent back to the web browser.</text:span></text:p>
        </text:list-item>
      </text:list>
      <text:h text:style-name="Heading_20_3" text:outline-level="3"><text:bookmark-start text:name="__RefHeading___Toc4048_661956188"/>Terminating the HTTP server<text:bookmark-end text:name="__RefHeading___Toc4048_661956188"/></text:h>
      <text:p text:style-name="P26">To shut down the HTTP server, activate the console application window and press the enter key.</text:p>
      <text:p text:style-name="P26"/>
      <text:p text:style-name="P26"><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2"><text:title>Daraja HTTP Framework</text:title></text:span><text:span text:style-name="T2"><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127.0.0.1/tutorial/session</text:span>.</text:p>
      <text:p text:style-name="Standard">This tutorial takes approximately 10 minutes to complete.</text:p>
      <text:p text:style-name="Standard"><text:span text:style-name="T3">To complete this tutorial, you need the software and resources listed in the following table.</text:span> </text:p>
      <text:list xml:id="list95015744459803" text:continue-list="list3046125233" text:style-name="L1">
        <text:list-item>
          <text:p text:style-name="P10"><text:span text:style-name="T2"><text:title>Daraja HTTP Framework</text:title></text:span><text:span text:style-name="T2"><text:s/></text:span><text:span text:style-name="T2"><text:keywords>3.1.0</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7">
        <text:list-item>
          <text:p text:style-name="P27">in the IDE, use the project wizard to create a new console line application project</text:p>
        </text:list-item>
        <text:list-item>
          <text:p text:style-name="P28"><text:span text:style-name="T2">add the path to the </text:span><text:span text:style-name="T12">&lt;inst&gt;\source</text:span><text:span text:style-name="T2"> folder to the project search path</text:span></text:p>
        </text:list-item>
        <text:list-item>
          <text:p text:style-name="P27">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8">
        <text:list-item>
          <text:p text:style-name="P29"><text:span text:style-name="T2">create a unit with the code below and save it as </text:span><text:span text:style-name="T11">SessionDemoResource.pas</text:span></text:p>
        </text:list-item>
      </text:list>
      <text:p text:style-name="P30"><text:span text:style-name="T6">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9">
        <text:list-item>
          <text:p text:style-name="P31">open the HttpSessionServer.dpr application project file </text:p>
        </text:list-item>
        <text:list-item>
          <text:p text:style-name="P31">paste the code shown below</text:p>
        </text:list-item>
      </text:list>
      <text:p text:style-name="P32"><text:span text:style-name="T6">Code ex</text:span>ample</text:p>
      <text:p text:style-name="SourceCode">program HttpSessionServer;</text:p>
      <text:p text:style-name="SourceCode"/>
      <text:p text:style-name="SourceCode">{$APPTYPE CONSOLE}</text:p>
      <text:p text:style-name="SourceCode"/>
      <text:p text:style-name="SourceCode">uses</text:p>
      <text:p text:style-name="P33"><text:s text:c="2"/>SessionDemoResource in 'SessionDemoResource.pas',</text:p>
      <text:p text:style-name="P33"><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 True);</text:p>
      <text:p text:style-name="P33"><text:s text:c="4"/>Context.Add(TSessionDemoResource, '/session');<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10">
        <text:list-item>
          <text:p text:style-name="P3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P35">To test the server, open a web browser and navigate to <text:a xlink:type="simple" xlink:href="http://127.0.0.1:8080/tutorial/session" text:style-name="Internet_20_link" text:visited-style-name="Visited_20_Internet_20_Link"><text:span text:style-name="T7">http://127.0.0.1/tutorial/session</text:span></text:a><text:span text:style-name="T7">.</text:span></text:p>
      <text:p text:style-name="P35"><text:span text:style-name="T7">This will cause a HTTP GET request to be sent from the web browser, asking the server for the resource at </text:span><text:span text:style-name="T14">this location</text:span><text:span text:style-name="T7">.</text:span></text:p>
      <text:list text:style-name="L11">
        <text:list-item>
          <text:p text:style-name="P36"><text:span text:style-name="T7">The server will parse the request, look up the context ('tutorial') and the web component responsible for this resource. It will find that </text:span><text:span text:style-name="T12">TSessionDemoResource</text:span><text:span text:style-name="T7"> is mapped to the path '/session'.</text:span></text:p>
        </text:list-item>
        <text:list-item>
          <text:p text:style-name="P36"><text:span text:style-name="T7">The server then will invoke the GET request handler </text:span><text:span text:style-name="T12">TSessionDemoResource.OnGet</text:span><text:span text:style-name="T7">, passing request and response objects.</text:span></text:p>
        </text:list-item>
        <text:list-item>
          <text:p text:style-name="P36"><text:span text:style-name="T7">Finally, the </text:span><text:span text:style-name="T9">GET request handler </text:span><text:span text:style-name="T7">builds the response, which will be sent back to the web browser.</text:span></text:p>
        </text:list-item>
      </text:list>
      <text:h text:style-name="Heading_20_3" text:outline-level="3"><text:bookmark-start text:name="__RefHeading___Toc4064_661956188"/>Terminating the HTTP server<text:bookmark-end text:name="__RefHeading___Toc4064_661956188"/></text:h>
      <text:p text:style-name="P26">To shut down the HTTP server, activate the console application window and press the enter key.</text:p>
      <text:p text:style-name="P26"><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text:span text:style-name="T15">Url </text:span>Mappings of a Web Component<text:bookmark-end text:name="__RefHeading___Toc4068_661956188"/></text:h>
      <text:p text:style-name="Standard">The following short tutorial takes you through some of the basic steps of creating a <text:span text:style-name="T2"><text:title>Daraja HTTP Framework</text:title></text:span><text:span text:style-name="T2"><text:s/>framework application which uses multiple mappings to deliver different HTTP response content types depending on the HTTP request document path.</text:span></text:p>
      <text:p text:style-name="Standard"><text:soft-page-break/>You will create an application that runs a HTTP server on the local computer and serves requests for two resource paths.</text:p>
      <text:p text:style-name="Standard">The response content type <text:span text:style-name="T15">will </text:span>depend on the request:</text:p>
      <text:list text:style-name="L12">
        <text:list-item>
          <text:p text:style-name="P37">for http://127.0.0.1/tutorial/fib.txt, the content type is <text:span text:style-name="T13">text/plain</text:span></text:p>
        </text:list-item>
        <text:list-item>
          <text:p text:style-name="P38">for http://127.0.0.1/tutorial/fib.html, the content type is <text:span text:style-name="T13">text/html</text:span></text:p>
        </text:list-item>
      </text:list>
      <text:p text:style-name="P35">The application will <text:span text:style-name="T15">read</text:span> a query parameter with the name “n” to calculate the Fibonacci number for the parameter value. </text:p>
      <text:p text:style-name="P35"><text:span text:style-name="T15">A</text:span> complete request URL will be for example</text:p>
      <text:list text:style-name="L13">
        <text:list-item>
          <text:p text:style-name="P39">http://127.0.0.1/tutorial/fib.html<text:span text:style-name="T7">?n=8</text:span></text:p>
        </text:list-item>
      </text:list>
      <text:p text:style-name="Standard">This tutorial takes approximately 10 minutes to complete.</text:p>
      <text:p text:style-name="Standard"><text:span text:style-name="T3">To complete this tutorial, you need the software and resources listed in the following table.</text:span> </text:p>
      <text:list text:continue-list="list95015744459803" text:style-name="L1">
        <text:list-item>
          <text:p text:style-name="P10"><text:span text:style-name="T2"><text:title>Daraja HTTP Framework</text:title></text:span><text:span text:style-name="T2"><text:s/></text:span><text:span text:style-name="T2"><text:keywords>3.1.0</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4">
        <text:list-item>
          <text:p text:style-name="P40">in the IDE, use the project wizard to create a new console line application project</text:p>
        </text:list-item>
        <text:list-item>
          <text:p text:style-name="P41"><text:span text:style-name="T2">add the path to the </text:span><text:span text:style-name="T12">&lt;inst&gt;\source</text:span><text:span text:style-name="T2"> folder to the project search path</text:span></text:p>
        </text:list-item>
        <text:list-item>
          <text:p text:style-name="P40">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5">
        <text:list-item>
          <text:p text:style-name="P42"><text:span text:style-name="T2">create a unit with the code below and save it as </text:span><text:span text:style-name="T11">FibonacciResource.pas</text:span></text:p>
        </text:list-item>
      </text:list>
      <text:p text:style-name="P30"><text:span text:style-name="T16">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text:soft-page-break/></text:p>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6">
        <text:list-item>
          <text:p text:style-name="P43">open the TwoMappingsServer.dpr application project file </text:p>
        </text:list-item>
        <text:list-item>
          <text:p text:style-name="P43">paste the code shown below</text:p>
        </text:list-item>
      </text:list>
      <text:p text:style-name="P32"><text:span text:style-name="T6">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oft-page-break/><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7">
        <text:list-item>
          <text:p text:style-name="P4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7">http://127.0.0.1/tutorial/fib.txt?n=7</text:span></text:a><text:span text:style-name="T7">. This will cause a HTTP GET request to be sent, asking for the resource http://127.0.0.1/tutorial/fib.txt, and passing the query parameter n with value 7.</text:span></text:p>
      <text:p text:style-name="P26">The server will parse the request, look up the context ('tutorial') and the web component responsible for this resource address. It will find that <text:span text:style-name="T11">TFibonacciResource</text:span> is mapped to the absolute path '/fib.txt'.</text:p>
      <text:p text:style-name="P26">The server then will invoke the GET request handler <text:span text:style-name="T11">TFibonacciResource.OnGet</text:span>, passing request and response objects.</text:p>
      <text:p text:style-name="P26">Finally, the code in <text:span text:style-name="T11">TFibonacciResource.OnGet</text:span> builds the response, which will be sent back to the web browser.</text:p>
      <text:p text:style-name="P26"><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6">To receive the HTTP response as HTML, use the address <text:a xlink:type="simple" xlink:href="http://localhost/tutorial/fib.html?n=7" text:style-name="Internet_20_link" text:visited-style-name="Visited_20_Internet_20_Link">http://127.0.0.1/tutorial/fib.html?n=7</text:a> – the same web component is mapped to the absolute path /fib.html. This time, the <text:soft-page-break/>code in OnGet will detect the .html extension and return a response with content type <text:span text:style-name="T13">text/html</text:span> and a simple HTML body back to the browser.</text:p>
      <text:p text:style-name="P26"><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6">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8">
        <text:list-item>
          <text:p text:style-name="P45"><text:span text:style-name="T17">Embarcadero Delphi</text:span> 2009 <text:span text:style-name="T18">(</text:span>Update 4<text:span text:style-name="T18">)<text:line-break/></text:span><text:span text:style-name="T19">or</text:span></text:p>
        </text:list-item>
        <text:list-item>
          <text:p text:style-name="P45"><text:alphabetical-index-mark-start text:id="IMark2051289474016"/><text:alphabetical-index-mark-start text:id="IMark2051289474816"/><text:span text:style-name="T17">Free Pascal</text:span><text:alphabetical-index-mark-end text:id="IMark2051289474816"/><text:alphabetical-index-mark-end text:id="IMark2051289474016"/> <text:span text:style-name="T18">3.</text:span><text:span text:style-name="T20">2.0 or newer</text:span></text:p>
        </text:list-item>
        <text:list-item>
          <text:p text:style-name="P46"><text:span text:style-name="T17">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9">
        <text:list-item>
          <text:p text:style-name="P47">add the <text:title>Daraja HTTP Framework</text:title><text:s/><text:span text:style-name="T13">&lt;Install&gt;/</text:span><text:span text:style-name="T21">source</text:span> folder to the project search path </text:p>
        </text:list-item>
        <text:list-item>
          <text:p text:style-name="P47">add the folders <text:span text:style-name="T13">&lt;Indy&gt;/Lib/Core</text:span>, <text:span text:style-name="T13">&lt;Indy&gt;/Lib/System</text:span> and <text:span text:style-name="T13">&lt;Indy&gt;/Lib/Protocols</text:span> to the project search path</text:p>
        </text:list-item>
        <text:list-item>
          <text:p text:style-name="P48">add the folder <text:span text:style-name="T13">&lt;Indy&gt;/Lib/Core</text:span> to the project <text:span text:style-name="T22">include</text:span> path</text:p>
        </text:list-item>
      </text:list>
      <text:p text:style-name="P49"/>
      <text:p text:style-name="Standard"><text:span text:style-name="T22">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20">
        <text:list-item>
          <text:p text:style-name="P50">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051289477536"/>Conditional Symbols<text:bookmark-end text:name="__RefHeading___Toc4096_661956188"/><text:alphabetical-index-mark-end text:id="IMark2051289477536"/></text:h>
      <table:table table:name="Tabelle2" table:style-name="Tabelle2">
        <table:table-column table:style-name="Tabelle2.A"/>
        <table:table-column table:style-name="Tabelle2.B"/>
        <table:table-row>
          <table:table-cell table:style-name="Tabelle2.A1" office:value-type="string">
            <text:p text:style-name="P51">Conditional symbol </text:p>
          </table:table-cell>
          <table:table-cell table:style-name="Tabelle2.B1" office:value-type="string">
            <text:p text:style-name="P51">Description</text:p>
          </table:table-cell>
        </table:table-row>
        <table:table-row>
          <table:table-cell table:style-name="Tabelle2.A2" office:value-type="string">
            <text:p text:style-name="P52">DARAJA_LOGGING</text:p>
          </table:table-cell>
          <table:table-cell table:style-name="Tabelle2.B2" office:value-type="string">
            <text:p text:style-name="P52">Enables <text:alphabetical-index-mark-start text:id="IMark2051289476576"/>logging<text:alphabetical-index-mark-end text:id="IMark2051289476576"/></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051289474336"/>development mode<text:alphabetical-index-mark-end text:id="IMark2051289474336"/></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051289474256"/>madExcept<text:alphabetical-index-mark-end text:id="IMark2051289474256"/>, this requires <text:alphabetical-index-mark-start text:id="IMark2051289478336"/>development mode<text:alphabetical-index-mark-end text:id="IMark2051289478336"/></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051289477536"/>development mode<text:alphabetical-index-mark-end text:id="IMark2051289477536"/></text:p>
          </table:table-cell>
        </table:table-row>
      </table:table>
      <text:p text:style-name="Table">Table <text:sequence text:ref-name="refTable0" text:name="Table" text:formula="ooow:Table+1" style:num-format="1">1</text:sequence>: <text:alphabetical-index-mark-start text:id="IMark2051289476976"/>Conditional symbols<text:alphabetical-index-mark-end text:id="IMark2051289476976"/></text:p>
      <text:h text:style-name="Heading_20_1" text:outline-level="1"><text:bookmark-start text:name="__RefHeading___Toc4098_661956188"/>Introduction <text:span text:style-name="T20">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53">A Web Component has t<text:span text:style-name="T23">wo</text:span> minimum requirements:</text:p>
      <text:list text:style-name="L21">
        <text:list-item>
          <text:p text:style-name="P54"><text:span text:style-name="T24">it must be a subclass of </text:span><text:alphabetical-index-mark-start text:id="IMark2051289475376"/><text:span text:style-name="T24">TdjWebComponent</text:span><text:alphabetical-index-mark-end text:id="IMark2051289475376"/></text:p>
        </text:list-item>
        <text:list-item>
          <text:p text:style-name="P54"><text:span text:style-name="T24">it must override at least one of the predefined </text:span><text:alphabetical-index-mark-start text:id="IMark2051289476976"/><text:span text:style-name="T24">HTTP</text:span><text:alphabetical-index-mark-end text:id="IMark2051289476976"/><text:span text:style-name="T24"> method handlers – </text:span><text:alphabetical-index-mark-start text:id="IMark2051289476736"/><text:span text:style-name="T24">OnGet</text:span><text:alphabetical-index-mark-end text:id="IMark2051289476736"/><text:span text:style-name="T24">, </text:span><text:alphabetical-index-mark-start text:id="IMark2051289473856"/><text:span text:style-name="T24">OnPost</text:span><text:alphabetical-index-mark-end text:id="IMark2051289473856"/><text:span text:style-name="T24"> etc.</text:span></text:p>
        </text:list-item>
      </text:list>
      <text:p text:style-name="P53">It may also optionally override two other meth<text:span text:style-name="T23">ods</text:span></text:p>
      <text:list text:style-name="L22">
        <text:list-item>
          <text:p text:style-name="P55"><text:span text:style-name="T24">the </text:span><text:alphabetical-index-mark-start text:id="IMark2051289476736"/><text:span text:style-name="T24">Init</text:span><text:alphabetical-index-mark-end text:id="IMark2051289476736"/><text:span text:style-name="T24"> method, to perform </text:span><text:span text:style-name="T25">init</text:span><text:span text:style-name="T24">ialization tasks</text:span></text:p>
        </text:list-item>
        <text:list-item>
          <text:p text:style-name="P55"><text:span text:style-name="T24">the destructor (</text:span><text:alphabetical-index-mark-start text:id="IMark2051289475376"/><text:span text:style-name="T24">Destroy</text:span><text:alphabetical-index-mark-end text:id="IMark2051289475376"/><text:span text:style-name="T24">), to perform cleanup tasks</text:span></text:p>
        </text:list-item>
      </text:list>
      <text:h text:style-name="P56" text:outline-level="3"><text:bookmark-start text:name="__RefHeading___Toc4102_661956188"/>Example<text:bookmark-end text:name="__RefHeading___Toc4102_661956188"/></text:h>
      <text:p text:style-name="P53">A minimal example is shown below. </text:p>
      <text:list text:style-name="L23">
        <text:list-item>
          <text:p text:style-name="P57"><text:span text:style-name="T24">It overrides </text:span><text:alphabetical-index-mark-start text:id="IMark2051289475376"/><text:span text:style-name="T26">OnGet</text:span><text:alphabetical-index-mark-end text:id="IMark2051289475376"/><text:span text:style-name="T24">, which has two parameters for the Indy </text:span><text:alphabetical-index-mark-start text:id="IMark2051289475856"/><text:span text:style-name="T24">HTTP</text:span><text:alphabetical-index-mark-end text:id="IMark2051289475856"/><text:span text:style-name="T24"> </text:span><text:alphabetical-index-mark-start text:id="IMark2051289478496"/><text:span text:style-name="T24">Request</text:span><text:alphabetical-index-mark-end text:id="IMark2051289478496"/><text:span text:style-name="T24"> and </text:span><text:alphabetical-index-mark-start text:id="IMark2051289474416"/><text:span text:style-name="T24">Response</text:span><text:alphabetical-index-mark-end text:id="IMark2051289474416"/><text:span text:style-name="T24"> objects. </text:span></text:p>
        </text:list-item>
        <text:list-item>
          <text:p text:style-name="P57"><text:span text:style-name="T24">In the method body, it sets the </text:span><text:alphabetical-index-mark-start text:id="IMark2051289478416"/><text:span text:style-name="T26">ContentText</text:span><text:alphabetical-index-mark-end text:id="IMark2051289478416"/><text:span text:style-name="T24"> property of the </text:span><text:alphabetical-index-mark-start text:id="IMark2051289474896"/><text:span text:style-name="T24">Response</text:span><text:alphabetical-index-mark-end text:id="IMark2051289474896"/><text:span text:style-name="T24"> object to '&lt;html&gt;Hello world!&lt;/html&gt;':</text:span></text:p>
        </text:list-item>
      </text:list>
      <text:p text:style-name="P30"><text:span text:style-name="T27">Code ex</text:span><text:span text:style-name="T24">ample</text:span></text:p>
      <text:p text:style-name="Preformatted_20_Text"/>
      <text:p text:style-name="Preformatted_20_Text">type</text:p>
      <text:p text:style-name="Preformatted_20_Text"><text:s text:c="2"/><text:alphabetical-index-mark-start text:id="IMark2051289478416"/><text:alphabetical-index-mark-start text:id="IMark2051289477536"/>TMyWebPage<text:alphabetical-index-mark-end text:id="IMark2051289477536"/><text:alphabetical-index-mark-end text:id="IMark2051289478416"/> = class(<text:alphabetical-index-mark-start text:id="IMark2051289474016"/><text:alphabetical-index-mark-start text:id="IMark2051289474896"/>TdjWebComponent<text:alphabetical-index-mark-end text:id="IMark2051289474896"/><text:alphabetical-index-mark-end text:id="IMark2051289474016"/>)</text:p>
      <text:p text:style-name="Preformatted_20_Text"><text:s text:c="2"/>public</text:p>
      <text:p text:style-name="Preformatted_20_Text"><text:s text:c="4"/>procedure <text:alphabetical-index-mark-start text:id="IMark2051289474256"/>OnGet<text:alphabetical-index-mark-end text:id="IMark2051289474256"/>(<text:alphabetical-index-mark-start text:id="IMark2051289476336"/>Request<text:alphabetical-index-mark-end text:id="IMark2051289476336"/>: <text:alphabetical-index-mark-start text:id="IMark2051289476976"/><text:alphabetical-index-mark-start text:id="IMark2051289474336"/><text:alphabetical-index-mark-start text:id="IMark2051289477696"/>TdjRequest<text:alphabetical-index-mark-end text:id="IMark2051289477696"/><text:alphabetical-index-mark-end text:id="IMark2051289474336"/><text:alphabetical-index-mark text:string-value=" "/><text:alphabetical-index-mark-end text:id="IMark2051289476976"/><text:alphabetical-index-mark text:string-value=" "/>; <text:alphabetical-index-mark-start text:id="IMark2051289478656"/>Response<text:alphabetical-index-mark-end text:id="IMark2051289478656"/>:</text:p>
      <text:p text:style-name="Preformatted_20_Text"><text:s text:c="6"/><text:alphabetical-index-mark-start text:id="IMark2051289474976"/><text:alphabetical-index-mark-start text:id="IMark2051289474256"/><text:alphabetical-index-mark-start text:id="IMark2051289477776"/>TdjResponse<text:alphabetical-index-mark-end text:id="IMark2051289477776"/><text:alphabetical-index-mark-end text:id="IMark2051289474256"/><text:alphabetical-index-mark text:string-value=" "/><text:alphabetical-index-mark-end text:id="IMark205128947497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51289475856"/>TMyWebPage<text:alphabetical-index-mark-end text:id="IMark2051289475856"/> }</text:p>
      <text:p text:style-name="Preformatted_20_Text"/>
      <text:p text:style-name="Preformatted_20_Text">procedure <text:alphabetical-index-mark-start text:id="IMark2051289474976"/>TMyWebPage<text:alphabetical-index-mark-end text:id="IMark2051289474976"/>.<text:alphabetical-index-mark-start text:id="IMark2051289477216"/>OnGet<text:alphabetical-index-mark-end text:id="IMark2051289477216"/>(<text:alphabetical-index-mark-start text:id="IMark2051289477056"/>Request<text:alphabetical-index-mark-end text:id="IMark2051289477056"/>: <text:alphabetical-index-mark-start text:id="IMark2051289478416"/><text:alphabetical-index-mark-start text:id="IMark2051289478656"/>TdjRequest<text:alphabetical-index-mark-end text:id="IMark2051289478656"/><text:alphabetical-index-mark text:string-value=" "/><text:alphabetical-index-mark-end text:id="IMark2051289478416"/><text:alphabetical-index-mark text:string-value=" "/>;</text:p>
      <text:p text:style-name="Preformatted_20_Text"><text:s text:c="2"/><text:alphabetical-index-mark-start text:id="IMark2051289474256"/>Response<text:alphabetical-index-mark-end text:id="IMark2051289474256"/>: <text:alphabetical-index-mark-start text:id="IMark2051289477536"/><text:alphabetical-index-mark-start text:id="IMark2051289475376"/>TdjResponse<text:alphabetical-index-mark-end text:id="IMark2051289475376"/><text:alphabetical-index-mark text:string-value=" "/><text:alphabetical-index-mark-end text:id="IMark2051289477536"/><text:alphabetical-index-mark text:string-value=" "/>);</text:p>
      <text:p text:style-name="Preformatted_20_Text">begin</text:p>
      <text:p text:style-name="Preformatted_20_Text"><text:s text:c="2"/><text:alphabetical-index-mark-start text:id="IMark2051289475376"/>Response<text:alphabetical-index-mark-end text:id="IMark2051289475376"/>.<text:alphabetical-index-mark-start text:id="IMark2051289473856"/>ContentText<text:alphabetical-index-mark-end text:id="IMark2051289473856"/> := '&lt;html&gt;Hello world!&lt;/html&gt;;</text:p>
      <text:p text:style-name="Preformatted_20_Text"><text:s text:c="2"/>Response.<text:alphabetical-index-mark-start text:id="IMark2051289478656"/>ContentType<text:alphabetical-index-mark-end text:id="IMark2051289478656"/> := 'text/html';</text:p>
      <text:p text:style-name="Preformatted_20_Text"><text:s text:c="2"/>Response.<text:alphabetical-index-mark-start text:id="IMark2051289477536"/>CharSet<text:alphabetical-index-mark-end text:id="IMark2051289477536"/> := '<text:alphabetical-index-mark-start text:id="IMark2051289476576"/>utf-8<text:alphabetical-index-mark-end text:id="IMark2051289476576"/>'; </text:p>
      <text:p text:style-name="P58">end;</text:p>
      <text:p text:style-name="P58"/>
      <text:h text:style-name="Heading_20_2" text:outline-level="2"><text:bookmark-start text:name="__RefHeading___Toc4104_661956188"/><text:soft-page-break/>Web Application <text:alphabetical-index-mark-start text:id="IMark2051289476336"/><text:alphabetical-index-mark-start text:id="IMark2051289478256"/>Context<text:bookmark-end text:name="__RefHeading___Toc4104_661956188"/><text:alphabetical-index-mark-end text:id="IMark2051289478256"/><text:alphabetical-index-mark-end text:id="IMark2051289476336"/></text:h>
      <text:p text:style-name="P59">In a <text:title>Daraja HTTP Framework</text:title><text:s/>web application, a <text:alphabetical-index-mark-start text:id="IMark2051289475616"/><text:span text:style-name="T17">context</text:span><text:alphabetical-index-mark-end text:id="IMark2051289475616"/> is an object that is created when the web application is started and destroyed when the web application is taken out of service.</text:p>
      <text:p text:style-name="P59">The <text:alphabetical-index-mark-start text:id="IMark2051289477536"/>context<text:alphabetical-index-mark-end text:id="IMark2051289477536"/> object can contain initialization parameters which can be accessed from web components.</text:p>
      <text:p text:style-name="P59">A <text:alphabetical-index-mark-start text:id="IMark2051289477776"/>context<text:alphabetical-index-mark-end text:id="IMark2051289477776"/> can provide <text:span text:style-name="T17">dynamic</text:span> and <text:alphabetical-index-mark-start text:id="IMark2051289478656"/><text:span text:style-name="T17">static</text:span> <text:alphabetical-index-mark-start text:id="IMark2051289478496"/>resource<text:alphabetical-index-mark-end text:id="IMark2051289478656"/>s<text:alphabetical-index-mark-end text:id="IMark2051289478496"/>:</text:p>
      <text:list text:style-name="L24">
        <text:list-item>
          <text:p text:style-name="P60"><text:span text:style-name="T17">Dynamic</text:span> <text:alphabetical-index-mark-start text:id="IMark2051289477536"/>resources<text:alphabetical-index-mark-end text:id="IMark2051289477536"/> are created by <text:span text:style-name="T17">Web Components</text:span> when a client sends a request which matches their <text:alphabetical-index-mark-start text:id="IMark2051289474976"/><text:span text:style-name="T19">resource path mapping</text:span><text:alphabetical-index-mark-end text:id="IMark2051289474976"/></text:p>
        </text:list-item>
        <text:list-item>
          <text:p text:style-name="P60"><text:alphabetical-index-mark-start text:id="IMark2051289476976"/><text:span text:style-name="T17">Static</text:span> <text:alphabetical-index-mark-start text:id="IMark2051289474416"/>resource<text:alphabetical-index-mark-end text:id="IMark2051289476976"/>s<text:alphabetical-index-mark-end text:id="IMark2051289474416"/> are located in the <text:span text:style-name="T19">file system</text:span>. A special web component in the framework handles requests for <text:alphabetical-index-mark-start text:id="IMark2051289475856"/>static <text:alphabetical-index-mark-start text:id="IMark2051289475616"/>resource<text:alphabetical-index-mark-end text:id="IMark2051289475856"/>s<text:alphabetical-index-mark-end text:id="IMark2051289475616"/>. It also <text:span text:style-name="T19">caches</text:span> requests to save bandwidth</text:p>
        </text:list-item>
      </text:list>
      <text:p text:style-name="Standard">The <text:alphabetical-index-mark-start text:id="IMark2051289475216"/>context<text:alphabetical-index-mark-end text:id="IMark2051289475216"/> path must be set in the constructor and can not be changed later.</text:p>
      <text:p text:style-name="P30"><text:span text:style-name="T6">Code ex</text:span>ample</text:p>
      <text:p text:style-name="Preformatted_20_Text"/>
      <text:p text:style-name="Preformatted_20_Text"><text:alphabetical-index-mark-start text:id="IMark2051289477776"/>Context<text:alphabetical-index-mark-end text:id="IMark2051289477776"/> := <text:alphabetical-index-mark-start text:id="IMark2051289475376"/>TdjWebApp<text:alphabetical-index-mark-start text:id="IMark2051289476736"/>Context<text:alphabetical-index-mark-end text:id="IMark2051289476736"/><text:alphabetical-index-mark-end text:id="IMark2051289475376"/>.Create('demo');</text:p>
      <text:p text:style-name="Preformatted_20_Text"/>
      <text:p text:style-name="P61"/>
      <text:p text:style-name="P61">By default, web components can not use HTTP sessions.</text:p>
      <text:p text:style-name="P61">A second parameter optionally enables HTTP sessions for the <text:alphabetical-index-mark-start text:id="IMark2051289476976"/>context<text:alphabetical-index-mark-end text:id="IMark2051289476976"/>.</text:p>
      <text:p text:style-name="P62"><text:span text:style-name="T6">Code ex</text:span>ample</text:p>
      <text:p text:style-name="P63"><text:s text:c="4"/></text:p>
      <text:p text:style-name="P63"><text:alphabetical-index-mark-start text:id="IMark2051289476736"/>Context<text:alphabetical-index-mark-end text:id="IMark2051289476736"/> := TdjWebApp<text:alphabetical-index-mark-start text:id="IMark2051289475376"/>Context<text:alphabetical-index-mark-end text:id="IMark2051289475376"/>.Create('demo', True);</text:p>
      <text:p text:style-name="P63"/>
      <text:h text:style-name="Heading_20_2" text:outline-level="2"><text:bookmark-start text:name="__RefHeading___Toc4106_661956188"/><text:alphabetical-index-mark-start text:id="IMark2051289476256"/>Path Mapping<text:bookmark-end text:name="__RefHeading___Toc4106_661956188"/><text:alphabetical-index-mark-end text:id="IMark2051289476256"/></text:h>
      <text:h text:style-name="Heading_20_3" text:outline-level="3"><text:bookmark-start text:name="__RefHeading___Toc4108_661956188"/><text:alphabetical-index-mark-start text:id="IMark2051289477696"/>Mapping rules<text:bookmark-end text:name="__RefHeading___Toc4108_661956188"/><text:alphabetical-index-mark-end text:id="IMark2051289477696"/></text:h>
      <text:list text:style-name="L25">
        <text:list-item>
          <text:p text:style-name="P64">the framework uses <text:span text:style-name="T17">path mappings</text:span> to find the matching Web Component for a request URL and executes its On... method handler </text:p>
        </text:list-item>
        <text:list-item>
          <text:p text:style-name="P64">if no match is found, and a default handler has been installed, the framework will try to serve the request using a <text:alphabetical-index-mark-start text:id="IMark2051289476976"/><text:span text:style-name="T17">static resource</text:span><text:alphabetical-index-mark-end text:id="IMark2051289476976"/> </text:p>
        </text:list-item>
        <text:list-item>
          <text:p text:style-name="P65">if no static file exists, the framework will return a 404 error </text:p>
        </text:list-item>
      </text:list>
      <text:p text:style-name="Heading_20_4"><text:alphabetical-index-mark-start text:id="IMark2051289474016"/>Support<text:alphabetical-index-mark-end text:id="IMark2051289474016"/>ed Mapping Syntax</text:p>
      <text:p text:style-name="Text_20_body"><text:alphabetical-index-mark-start text:id="IMark2051289478496"/>Support<text:alphabetical-index-mark-end text:id="IMark2051289478496"/>ed mapping styles in order of priority are</text:p>
      <text:list text:style-name="L26">
        <text:list-item>
          <text:p text:style-name="P66"><text:soft-page-break/>absolute paths, for example '/mypage.html' </text:p>
        </text:list-item>
        <text:list-item>
          <text:p text:style-name="P66">prefix mappings, for example '/myfolder/subfolder/*' </text:p>
        </text:list-item>
        <text:list-item>
          <text:p text:style-name="P67">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7">
        <text:list-item>
          <text:p text:style-name="P68">WebCompontentA maps to '*.html' </text:p>
        </text:list-item>
        <text:list-item>
          <text:p text:style-name="P69">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051289474016"/>support<text:alphabetical-index-mark-end text:id="IMark2051289474016"/>ed. Example: </text:p>
      <text:list text:style-name="L28">
        <text:list-item>
          <text:p text:style-name="P70">WebCompontentA maps to '*.html', '*.doc' and '*.pdf' </text:p>
        </text:list-item>
        <text:list-item>
          <text:p text:style-name="P71">WebCompontentB maps to '/secure/*' and '/protected/*' </text:p>
        </text:list-item>
      </text:list>
      <text:p text:style-name="Text_20_body">With this mapping, resource /<text:alphabetical-index-mark-start text:id="IMark2051289477776"/>context<text:alphabetical-index-mark-end text:id="IMark2051289477776"/>/secure/example.pdf will be handled by WebComponentB, and resource /<text:alphabetical-index-mark-start text:id="IMark2051289476576"/>context<text:alphabetical-index-mark-end text:id="IMark2051289476576"/>/example.pdf will be handled by WebCompontentA.</text:p>
      <text:p text:style-name="Text_20_body"/>
      <text:h text:style-name="P72" text:outline-level="2"><text:bookmark-start text:name="__RefHeading___Toc4112_661956188"/><text:alphabetical-index-mark-start text:id="IMark2051289474016"/>Setting parameters of a context<text:bookmark-end text:name="__RefHeading___Toc4112_661956188"/><text:alphabetical-index-mark-end text:id="IMark2051289474016"/></text:h>
      <text:p text:style-name="P73">A <text:alphabetical-index-mark-start text:id="IMark2051289478176"/>context<text:alphabetical-index-mark-end text:id="IMark2051289478176"/> contains a key-value map which can be used to keep <text:alphabetical-index-mark-start text:id="IMark2051289476736"/>configuration<text:alphabetical-index-mark-end text:id="IMark2051289476736"/> information.</text:p>
      <text:p text:style-name="CodeExampleHeader"><text:span text:style-name="T6">Code </text:span>example</text:p>
      <text:p text:style-name="Delphi_20_Code"/>
      <text:p text:style-name="Delphi_20_Code"><text:alphabetical-index-mark-start text:id="IMark2051289478656"/>Context<text:alphabetical-index-mark-end text:id="IMark2051289478656"/>.<text:alphabetical-index-mark-start text:id="IMark2051289474256"/>SetInitParameter<text:alphabetical-index-mark-end text:id="IMark2051289474256"/>('key', 'value');</text:p>
      <text:p text:style-name="Delphi_20_Code"/>
      <text:p text:style-name="P73"/>
      <text:p text:style-name="P73">To access the <text:alphabetical-index-mark-start text:id="IMark2051289477376"/>context<text:alphabetical-index-mark-end text:id="IMark2051289477376"/> init parameter, use <text:alphabetical-index-mark-start text:id="IMark2051289476736"/>GetInitParameter<text:alphabetical-index-mark-end text:id="IMark2051289476736"/></text:p>
      <text:p text:style-name="P74"><text:span text:style-name="T6">Code ex</text:span>ample</text:p>
      <text:p text:style-name="P75"/>
      <text:p text:style-name="P75">procedure TExampleComponent.OnGet(Request: <text:alphabetical-index-mark-start text:id="IMark2051289474256"/>TdjRequest<text:alphabetical-index-mark-end text:id="IMark2051289474256"/>; Response: <text:alphabetical-index-mark-start text:id="IMark2051289477296"/>TdjResponse<text:alphabetical-index-mark-end text:id="IMark2051289477296"/>);</text:p>
      <text:p text:style-name="P75">var</text:p>
      <text:p text:style-name="P75"><text:s text:c="2"/>Param: string;</text:p>
      <text:p text:style-name="P75">begin</text:p>
      <text:p text:style-name="P75"><text:s text:c="2"/>Param := Config.Get<text:alphabetical-index-mark-start text:id="IMark2051289475856"/>Context<text:alphabetical-index-mark-end text:id="IMark2051289475856"/>.<text:alphabetical-index-mark-start text:id="IMark2051289476016"/><text:alphabetical-index-mark-start text:id="IMark2051289476256"/>GetInitParameter<text:alphabetical-index-mark-end text:id="IMark2051289476256"/><text:alphabetical-index-mark-end text:id="IMark2051289476016"/>('key');</text:p>
      <text:p text:style-name="P75">end;</text:p>
      <text:p text:style-name="P75"/>
      <text:p text:style-name="P73"/>
      <text:p text:style-name="P73">Use <text:alphabetical-index-mark-start text:id="IMark2051289476016"/><text:span text:style-name="T17">GetInitParameter</text:span><text:alphabetical-index-mark-end text:id="IMark2051289476016"/><text:span text:style-name="T17">Names</text:span> to get a list of all parameter names:</text:p>
      <text:p text:style-name="P30"><text:span text:style-name="T6">Code ex</text:span>ample</text:p>
      <text:p text:style-name="P75"/>
      <text:p text:style-name="P75">Config.Get<text:alphabetical-index-mark-start text:id="IMark2051289475616"/>Context<text:alphabetical-index-mark-end text:id="IMark2051289475616"/>.<text:alphabetical-index-mark-start text:id="IMark2051289476096"/><text:alphabetical-index-mark-start text:id="IMark2051289476016"/>GetInitParameter<text:alphabetical-index-mark-end text:id="IMark2051289476016"/>Names<text:alphabetical-index-mark-end text:id="IMark2051289476096"/>;</text:p>
      <text:p text:style-name="P75"/>
      <text:p text:style-name="Standard"/>
      <text:h text:style-name="Heading_20_2" text:outline-level="2"><text:bookmark-start text:name="__RefHeading___Toc4114_661956188"/>Unicode (<text:alphabetical-index-mark-start text:id="IMark2051289474816"/>UTF-8<text:alphabetical-index-mark-end text:id="IMark2051289474816"/>)<text:bookmark-end text:name="__RefHeading___Toc4114_661956188"/></text:h>
      <text:p text:style-name="Standard">By setting the Response <text:alphabetical-index-mark-start text:id="IMark2051289474976"/>ContentType<text:alphabetical-index-mark-end text:id="IMark2051289474976"/> and <text:alphabetical-index-mark-start text:id="IMark2051289478416"/>CharSet<text:alphabetical-index-mark-end text:id="IMark2051289478416"/>,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6">Code ex</text:span>ample</text:p>
      <text:p text:style-name="Preformatted_20_Text"/>
      <text:p text:style-name="Preformatted_20_Text">procedure THelloPage.OnGet(Request: <text:alphabetical-index-mark-start text:id="IMark2051289478496"/>TdjRequest<text:alphabetical-index-mark-end text:id="IMark2051289478496"/>;</text:p>
      <text:p text:style-name="Preformatted_20_Text"><text:s text:c="2"/>Response: <text:alphabetical-index-mark-start text:id="IMark2051289475376"/>TdjResponse<text:alphabetical-index-mark-end text:id="IMark2051289475376"/>);</text:p>
      <text:p text:style-name="Preformatted_20_Text"><text:soft-page-break/>begin</text:p>
      <text:p text:style-name="Preformatted_20_Text"><text:s text:c="2"/>Response.<text:alphabetical-index-mark-start text:id="IMark2051289474976"/>ContentText<text:alphabetical-index-mark-end text:id="IMark2051289474976"/> := '<text:span text:style-name="T28">中文</text:span>';</text:p>
      <text:p text:style-name="Preformatted_20_Text"><text:s text:c="2"/>Response.<text:alphabetical-index-mark-start text:id="IMark2051289476256"/>ContentType<text:alphabetical-index-mark-end text:id="IMark2051289476256"/> := 'text/plain';</text:p>
      <text:p text:style-name="Preformatted_20_Text"><text:s text:c="2"/>Response.<text:alphabetical-index-mark-start text:id="IMark2051289476976"/>CharSet<text:alphabetical-index-mark-end text:id="IMark2051289476976"/> := '<text:alphabetical-index-mark-start text:id="IMark2051289478016"/>utf-8<text:alphabetical-index-mark-end text:id="IMark2051289478016"/>'; </text:p>
      <text:p text:style-name="Preformatted_20_Text">end;</text:p>
      <text:p text:style-name="Preformatted_20_Text"/>
      <text:p text:style-name="Heading_20_4"/>
      <text:h text:style-name="Heading_20_2" text:outline-level="2"><text:bookmark-start text:name="__RefHeading___Toc4116_661956188"/><text:alphabetical-index-mark-start text:id="IMark2051289474976"/>HTML Encoding<text:alphabetical-index-mark-end text:id="IMark2051289474976"/> of <text:alphabetical-index-mark-start text:id="IMark2051289477056"/>special characters<text:bookmark-end text:name="__RefHeading___Toc4116_661956188"/><text:alphabetical-index-mark-end text:id="IMark2051289477056"/></text:h>
      <text:p text:style-name="Standard">If the web component returns HTML, some characters have to be replaced as they are HTML entities.</text:p>
      <text:p text:style-name="Standard">Unit <text:alphabetical-index-mark-start text:id="IMark2051289476736"/><text:span text:style-name="T17">djGlobal</text:span><text:alphabetical-index-mark-end text:id="IMark2051289476736"/> contains the <text:alphabetical-index-mark-start text:id="IMark2051289476976"/><text:span text:style-name="T17">HTMLEncode</text:span><text:alphabetical-index-mark-end text:id="IMark2051289476976"/> function which replaces &lt;, &gt; , &amp; and “ to the corresponding HTML entities <text:span text:style-name="T29">&amp;lt;</text:span>, <text:span text:style-name="T17">&amp;gt;</text:span>, <text:span text:style-name="T17">&amp;amp;</text:span> and <text:span text:style-name="T17">&amp;quot;</text:span>.</text:p>
      <text:p text:style-name="Standard">Important: only inner text (between HTML elements) must be encoded.</text:p>
      <text:p text:style-name="P30"><text:span text:style-name="T6">Code ex</text:span>ample</text:p>
      <text:p text:style-name="Preformatted_20_Text"/>
      <text:p text:style-name="Preformatted_20_Text">procedure THelloPage.OnGet(Request: <text:alphabetical-index-mark-start text:id="IMark2051289476096"/>TdjRequest<text:alphabetical-index-mark-end text:id="IMark2051289476096"/>;</text:p>
      <text:p text:style-name="Preformatted_20_Text"><text:s text:c="2"/>Response: <text:alphabetical-index-mark-start text:id="IMark2051289475136"/>TdjResponse<text:alphabetical-index-mark-end text:id="IMark2051289475136"/>);</text:p>
      <text:p text:style-name="Preformatted_20_Text">begin</text:p>
      <text:p text:style-name="Preformatted_20_Text"><text:s text:c="2"/>Response.<text:alphabetical-index-mark-start text:id="IMark2051289474816"/>ContentText<text:alphabetical-index-mark-end text:id="IMark2051289474816"/> := '<text:span text:style-name="T17">&lt;html&gt;&lt;p&gt;' + </text:span><text:alphabetical-index-mark-start text:id="IMark2051289478496"/><text:span text:style-name="T17">HTMLEncode</text:span><text:alphabetical-index-mark-end text:id="IMark2051289478496"/><text:span text:style-name="T17">('rhythm &amp; blues') + '&lt;/p&gt;&lt;/html&gt;</text:span>';</text:p>
      <text:p text:style-name="Preformatted_20_Text"><text:s text:c="2"/>Response.<text:alphabetical-index-mark-start text:id="IMark2051289473856"/>ContentType<text:alphabetical-index-mark-end text:id="IMark2051289473856"/> := 'text/html';</text:p>
      <text:p text:style-name="Preformatted_20_Text"><text:s text:c="2"/>Response.<text:alphabetical-index-mark-start text:id="IMark2051289475376"/>CharSet<text:alphabetical-index-mark-end text:id="IMark2051289475376"/> := '<text:alphabetical-index-mark-start text:id="IMark2051289478416"/>utf-8<text:alphabetical-index-mark-end text:id="IMark2051289478416"/>';</text:p>
      <text:p text:style-name="Preformatted_20_Text">end;</text:p>
      <text:p text:style-name="Preformatted_20_Text"/>
      <text:p text:style-name="Standard"/>
      <text:h text:style-name="P76" text:outline-level="1"><text:bookmark-start text:name="__RefHeading___Toc4425_921300063"/><text:span text:style-name="T23">Introduction to </text:span>Web Filters<text:bookmark-end text:name="__RefHeading___Toc4425_921300063"/></text:h>
      <text:h text:style-name="P77" text:outline-level="2"><text:bookmark-start text:name="__RefHeading___Toc4100_661956188 Kopie 1"/>General structure<text:bookmark-end text:name="__RefHeading___Toc4100_661956188 Kopie 1"/></text:h>
      <text:p text:style-name="P78">A Web <text:span text:style-name="T23">Filter</text:span> <text:span text:style-name="T23">class must fulfill two</text:span> requirements:</text:p>
      <text:list text:style-name="L29">
        <text:list-item>
          <text:p text:style-name="P79"><text:span text:style-name="T24">it must be a subclass of </text:span><text:span text:style-name="T25">TdjWebFilter</text:span></text:p>
        </text:list-item>
        <text:list-item>
          <text:p text:style-name="P79"><text:span text:style-name="T24">it must override at least </text:span><text:span text:style-name="T25">the DoFilter method</text:span></text:p>
        </text:list-item>
      </text:list>
      <text:p text:style-name="P78">It may also optionally override other meth<text:span text:style-name="T23">ods:</text:span></text:p>
      <text:list text:style-name="L30">
        <text:list-item>
          <text:p text:style-name="P80"><text:span text:style-name="T24">the </text:span><text:span text:style-name="T25">Init</text:span><text:span text:style-name="T24"> method</text:span></text:p>
        </text:list-item>
        <text:list-item>
          <text:p text:style-name="P81">the destructor</text:p>
        </text:list-item>
      </text:list>
      <text:h text:style-name="P77" text:outline-level="2"><text:bookmark-start text:name="__RefHeading___Toc4427_921300063"/>Declaration <text:span text:style-name="T30">of DoFilter</text:span><text:bookmark-end text:name="__RefHeading___Toc4427_921300063"/></text:h>
      <text:p text:style-name="P82">A web filter must be inherited from TdjWebFilter and at least implement the DoFilter method.</text:p>
      <text:h text:style-name="P83" text:outline-level="3"><text:bookmark-start text:name="__RefHeading___Toc4429_921300063"/>Example: add text to the response<text:bookmark-end text:name="__RefHeading___Toc4429_921300063"/></text:h>
      <text:p text:style-name="P82">In this example, the filter first invokes the DoFilter method of the filter chain, and finally appends a hard coded text to the response.</text:p>
      <text:p text:style-name="P84"><text:span text:style-name="T6">Code ex</text:span>ample</text:p>
      <text:p text:style-name="P85"><text:line-break/>TTestFilter = class(TdjWebFilter)</text:p>
      <text:p text:style-name="P85">public</text:p>
      <text:p text:style-name="P85"><text:s text:c="2"/>procedure DoFilter(Context: TdjServerContext; Request: TdjRequest;</text:p>
      <text:p text:style-name="P85"><text:s text:c="4"/>Response: TdjResponse; const Chain: IWebFilterChain); override;</text:p>
      <text:p text:style-name="P85">end;<text:line-break/><text:line-break/>procedure TTestFilter.DoFilter(Context: TdjServerContext; Request: TdjRequest;</text:p>
      <text:p text:style-name="P85"><text:s text:c="2"/>Response: TdjResponse; const Chain: IWebFilterChain);</text:p>
      <text:p text:style-name="P85">begin</text:p>
      <text:p text:style-name="P85"><text:s text:c="2"/>Chain.DoFilter(Context, Request, Response);</text:p>
      <text:p text:style-name="P85"><text:s text:c="2"/>Response.ContentText := Response.ContentText + ' (filtered)';</text:p>
      <text:p text:style-name="P85">end;<text:line-break/></text:p>
      <text:p text:style-name="P86"/>
      <text:h text:style-name="P87" text:outline-level="2"><text:bookmark-start text:name="__RefHeading___Toc4431_921300063"/><text:soft-page-break/>Declaration of an initialization method<text:bookmark-end text:name="__RefHeading___Toc4431_921300063"/></text:h>
      <text:p text:style-name="P82">A web filter may optionally declare a Init method which will be called by the framework on startup.</text:p>
      <text:h text:style-name="P83" text:outline-level="3"><text:bookmark-start text:name="__RefHeading___Toc4433_921300063"/>Example: add an initialization parameter value to the response<text:bookmark-end text:name="__RefHeading___Toc4433_921300063"/></text:h>
      <text:p text:style-name="P88">The example filter below reads a value from the filter configuration, and stores it in a field for later usage.</text:p>
      <text:p text:style-name="P84"><text:span text:style-name="T6">Code ex</text:span>ample</text:p>
      <text:p text:style-name="P85"><text:line-break/>TFilterWithInit = class(TdjWebFilter)</text:p>
      <text:p text:style-name="P85">private</text:p>
      <text:p text:style-name="P85"><text:s text:c="2"/>FInitParam: string;</text:p>
      <text:p text:style-name="P85">public</text:p>
      <text:p text:style-name="P85"><text:s text:c="2"/>procedure Init; override;</text:p>
      <text:p text:style-name="P85"><text:s text:c="2"/>procedure DoFilter(Context: TdjServerContext; Request: TdjRequest;</text:p>
      <text:p text:style-name="P85"><text:s text:c="4"/>Response: TdjResponse; const Chain: IWebFilterChain); override;</text:p>
      <text:p text:style-name="P85">end;<text:line-break/><text:line-break/>procedure TFilterWithInit.Init;</text:p>
      <text:p text:style-name="P85">begin</text:p>
      <text:p text:style-name="P85"><text:s text:c="2"/>FInitParam := Config.GetInitParameter('key');</text:p>
      <text:p text:style-name="P85">end;<text:line-break/><text:line-break/>procedure TFilterWithInit.DoFilter(Context: TdjServerContext;</text:p>
      <text:p text:style-name="P85"><text:s text:c="2"/>Request: TdjRequest; Response: TdjResponse; const Chain: IWebFilterChain);</text:p>
      <text:p text:style-name="P85">begin</text:p>
      <text:p text:style-name="P85"><text:s text:c="2"/>Chain.DoFilter(Context, Request, Response);</text:p>
      <text:p text:style-name="P85"><text:s text:c="2"/>Response.ContentText := Response.ContentText + 'Param key=' + FInitParam;</text:p>
      <text:p text:style-name="P85">end; </text:p>
      <text:p text:style-name="P86"/>
      <text:p text:style-name="P89">The next code excerpt is a test which uses the filter and verifies that the GET request to the resource has the expected request body content.</text:p>
      <text:p text:style-name="P84"><text:span text:style-name="T6">Code ex</text:span>ample</text:p>
      <text:p text:style-name="P90">procedure TAPIConfigTests.TestFilterWithInit;</text:p>
      <text:p text:style-name="P90">var</text:p>
      <text:p text:style-name="P90"><text:s text:c="2"/>Server: TdjServer;</text:p>
      <text:p text:style-name="P90"><text:s text:c="2"/>Context: TdjWebAppContext;</text:p>
      <text:p text:style-name="P90">begin</text:p>
      <text:p text:style-name="P90"><text:s text:c="2"/>// configure</text:p>
      <text:p text:style-name="P90"><text:s text:c="2"/>Context := TdjWebAppContext.Create('web');</text:p>
      <text:p text:style-name="P90"><text:s text:c="2"/>Context.AddWebComponent(TExamplePage, '*.filter');</text:p>
      <text:p text:style-name="P90"><text:s text:c="2"/>with Context.AddWebFilter(TTestFilterWithInit, '*.filter') do</text:p>
      <text:p text:style-name="P90"><text:s text:c="2"/>begin</text:p>
      <text:p text:style-name="P90"><text:s text:c="4"/>SetInitParameter('key', 'Hello, World V3!');</text:p>
      <text:p text:style-name="P90"><text:s text:c="2"/>end;</text:p>
      <text:p text:style-name="P90"/>
      <text:p text:style-name="P90"><text:s text:c="2"/>// run</text:p>
      <text:p text:style-name="P90"><text:s text:c="2"/>Server := TdjServer.Create;</text:p>
      <text:p text:style-name="P90"><text:s text:c="2"/>try</text:p>
      <text:p text:style-name="P90"><text:soft-page-break/><text:s text:c="4"/>Server.Add(Context);</text:p>
      <text:p text:style-name="P90"><text:s text:c="4"/>Server.Start;</text:p>
      <text:p text:style-name="P90"><text:s text:c="4"/>CheckGETResponseEquals('example, Param key=Hello, World V3!', '/web/page.filter');</text:p>
      <text:p text:style-name="P90"><text:s text:c="2"/>finally</text:p>
      <text:p text:style-name="P90"><text:s text:c="4"/>Server.Free;</text:p>
      <text:p text:style-name="P90"><text:s text:c="2"/>end;</text:p>
      <text:p text:style-name="P90">end;<text:line-break/></text:p>
      <text:p text:style-name="P86"/>
      <text:h text:style-name="Heading_20_1" text:outline-level="1"><text:bookmark-start text:name="__RefHeading___Toc4118_661956188"/>Web Components and <text:alphabetical-index-mark-start text:id="IMark2051289474816"/>multi-threading<text:bookmark-end text:name="__RefHeading___Toc4118_661956188"/><text:alphabetical-index-mark-end text:id="IMark2051289474816"/></text:h>
      <text:h text:style-name="Heading_20_2" text:outline-level="2"><text:bookmark-start text:name="__RefHeading___Toc4120_661956188"/>Design rules for your Web Components<text:bookmark-end text:name="__RefHeading___Toc4120_661956188"/></text:h>
      <text:h text:style-name="P56" text:outline-level="3"><text:bookmark-start text:name="__RefHeading___Toc4122_661956188"/>Design for <text:alphabetical-index-mark-start text:id="IMark2051289477376"/>multi-threaded<text:alphabetical-index-mark-end text:id="IMark2051289477376"/> operation<text:bookmark-end text:name="__RefHeading___Toc4122_661956188"/></text:h>
      <text:p text:style-name="Standard"><text:span text:style-name="T24">When we say that a program is </text:span><text:alphabetical-index-mark-start text:id="IMark2051289474816"/><text:span text:style-name="T31">multi-threaded</text:span><text:alphabetical-index-mark-end text:id="IMark2051289474816"/><text:span text:style-name="T2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1">single instance of code</text:span><text:span text:style-name="T24">. This means that more than one sequential flow of control runs through the same memory block.</text:span></text:p>
      <text:p text:style-name="P53">When multiple threads execute a single instance of a program and therefore share memory, multiple threads could possibly be attempting to read and write to the same place in memory.</text:p>
      <text:p text:style-name="Standard"><text:span text:style-name="T24">What happens if you introduce a field in your Web Component and use it in the </text:span><text:alphabetical-index-mark-start text:id="IMark2051289476736"/><text:span text:style-name="T24">OnGet</text:span><text:alphabetical-index-mark-end text:id="IMark2051289476736"/><text:span text:style-name="T24"> (or </text:span><text:alphabetical-index-mark-start text:id="IMark2051289476976"/><text:span text:style-name="T24">OnPost</text:span><text:alphabetical-index-mark-end text:id="IMark2051289476976"/><text:span text:style-name="T24">) method, when two or more threads execute it at the same time? Look at the example below. If two threads execute </text:span><text:alphabetical-index-mark-start text:id="IMark2051289475856"/><text:span text:style-name="T24">OnGet</text:span><text:alphabetical-index-mark-end text:id="IMark2051289475856"/><text:span text:style-name="T24">, they both will read and increment the value of the private </text:span><text:span text:style-name="T31">MyVar</text:span><text:span text:style-name="T24"> variable, with unexpected results.</text:span></text:p>
      <text:p text:style-name="P91"><text:span text:style-name="T6">Code ex</text:span>ample</text:p>
      <text:p text:style-name="Preformatted_20_Text">type</text:p>
      <text:p text:style-name="Preformatted_20_Text"><text:s text:c="2"/><text:alphabetical-index-mark-start text:id="IMark2051289477296"/><text:alphabetical-index-mark-start text:id="IMark2051289477696"/>TMyWebPage<text:alphabetical-index-mark-end text:id="IMark2051289477696"/><text:alphabetical-index-mark-end text:id="IMark2051289477296"/> = class(<text:alphabetical-index-mark-start text:id="IMark2051289474816"/><text:alphabetical-index-mark-start text:id="IMark2051289478336"/>TdjWebComponent<text:alphabetical-index-mark-end text:id="IMark2051289478336"/><text:alphabetical-index-mark-end text:id="IMark2051289474816"/>)</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051289477536"/>OnGet<text:alphabetical-index-mark-end text:id="IMark2051289477536"/>(<text:alphabetical-index-mark-start text:id="IMark2051289475856"/>Request<text:alphabetical-index-mark-end text:id="IMark2051289475856"/>: <text:alphabetical-index-mark-start text:id="IMark2051289478656"/><text:alphabetical-index-mark-start text:id="IMark2051289475136"/><text:alphabetical-index-mark-start text:id="IMark2051289473856"/>TdjRequest<text:alphabetical-index-mark-end text:id="IMark2051289473856"/><text:alphabetical-index-mark-end text:id="IMark2051289475136"/><text:alphabetical-index-mark text:string-value=" "/><text:alphabetical-index-mark-end text:id="IMark2051289478656"/><text:alphabetical-index-mark text:string-value=" "/>; <text:alphabetical-index-mark-start text:id="IMark2051289475616"/>Response<text:alphabetical-index-mark-end text:id="IMark2051289475616"/>:</text:p>
      <text:p text:style-name="Preformatted_20_Text"><text:s text:c="6"/><text:alphabetical-index-mark-start text:id="IMark2051289478656"/><text:alphabetical-index-mark-start text:id="IMark2051289477536"/><text:alphabetical-index-mark-start text:id="IMark2051289476976"/>TdjResponse<text:alphabetical-index-mark-end text:id="IMark2051289476976"/><text:alphabetical-index-mark-end text:id="IMark2051289477536"/><text:alphabetical-index-mark text:string-value=" "/><text:alphabetical-index-mark-end text:id="IMark205128947865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51289474016"/>TMyWebPage<text:alphabetical-index-mark-end text:id="IMark2051289474016"/> }</text:p>
      <text:p text:style-name="Preformatted_20_Text"/>
      <text:p text:style-name="Preformatted_20_Text">procedure <text:alphabetical-index-mark-start text:id="IMark2051289474336"/>TMyWebPage<text:alphabetical-index-mark-end text:id="IMark2051289474336"/>.<text:alphabetical-index-mark-start text:id="IMark2051289474816"/>OnGet<text:alphabetical-index-mark-end text:id="IMark2051289474816"/>(<text:alphabetical-index-mark-start text:id="IMark2051289475056"/>Request<text:alphabetical-index-mark-end text:id="IMark2051289475056"/>: <text:alphabetical-index-mark-start text:id="IMark2051289477536"/><text:alphabetical-index-mark-start text:id="IMark2051289475616"/>TdjRequest<text:alphabetical-index-mark-end text:id="IMark2051289475616"/><text:alphabetical-index-mark text:string-value=" "/><text:alphabetical-index-mark-end text:id="IMark2051289477536"/><text:alphabetical-index-mark text:string-value=" "/>;</text:p>
      <text:p text:style-name="Preformatted_20_Text"><text:s text:c="2"/><text:alphabetical-index-mark-start text:id="IMark2051289474016"/>Response<text:alphabetical-index-mark-end text:id="IMark2051289474016"/>: <text:alphabetical-index-mark-start text:id="IMark2051289474256"/><text:alphabetical-index-mark-start text:id="IMark2051289474816"/>TdjResponse<text:alphabetical-index-mark-end text:id="IMark2051289474816"/><text:alphabetical-index-mark text:string-value=" "/><text:alphabetical-index-mark-end text:id="IMark2051289474256"/><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8">end;</text:p>
      <text:p text:style-name="P53"/>
      <text:p text:style-name="Standard"><text:soft-page-break/><text:span text:style-name="T24">It would not be practical to build a site that required a Web Component to be instantiated for each </text:span><text:alphabetical-index-mark-start text:id="IMark2051289478496"/><text:span text:style-name="T24">request</text:span><text:alphabetical-index-mark-end text:id="IMark2051289478496"/><text:span text:style-name="T24">. </text:span><text:span text:style-name="T32">Web Components</text:span><text:span text:style-name="T24"> are </text:span><text:alphabetical-index-mark-start text:id="IMark2051289476016"/><text:span text:style-name="T32">multi-threaded</text:span><text:alphabetical-index-mark-end text:id="IMark2051289476016"/><text:span text:style-name="T24"> by design, this means a single instance will handle all </text:span><text:alphabetical-index-mark-start text:id="IMark2051289474816"/><text:span text:style-name="T24">HTTP</text:span><text:alphabetical-index-mark-end text:id="IMark2051289474816"/><text:span text:style-name="T24"> </text:span><text:alphabetical-index-mark-start text:id="IMark2051289477296"/><text:span text:style-name="T24">request</text:span><text:alphabetical-index-mark-end text:id="IMark2051289477296"/><text:span text:style-name="T24">s.</text:span></text:p>
      <text:p text:style-name="Standard"><text:span text:style-name="T24">The framework allocates a thread for </text:span><text:span text:style-name="T31">each new </text:span><text:alphabetical-index-mark-start text:id="IMark2051289475616"/><text:span text:style-name="T31">request</text:span><text:alphabetical-index-mark-end text:id="IMark2051289475616"/><text:span text:style-name="T24"> for a single Web Component without any special programming. </text:span></text:p>
      <text:p text:style-name="Standard"><text:span text:style-name="T24">To avoid multithreading problems, only use </text:span><text:span text:style-name="T31">read-only</text:span><text:span text:style-name="T24"> or </text:span><text:span text:style-name="T31">application-wide</text:span><text:span text:style-name="T24"> variables in a Web Component.</text:span></text:p>
      <text:p text:style-name="P53">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3">Under most circumstances, there is only one instance of your Web Component, no matter how many client </text:span><text:alphabetical-index-mark-start text:id="IMark2051289478176"/><text:span text:style-name="T33">request</text:span><text:alphabetical-index-mark-end text:id="IMark2051289478176"/><text:span text:style-name="T33">s are in process. That means that at any given moment, there may be many threads running inside the </text:span><text:span text:style-name="T34">S</text:span><text:span text:style-name="Teletype"><text:span text:style-name="T34">ervice</text:span></text:span><text:span text:style-name="T33"> method of your solo instance, all sharing the same instance data and potentially stepping on each others toes. This means that you should be careful to </text:span><text:span text:style-name="T35">synchronize</text:span><text:span text:style-name="T33">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051289475856"/>multi-threaded<text:alphabetical-index-mark-end text:id="IMark2051289475856"/>? <text:bookmark-end text:name="__RefHeading___Toc4128_661956188"/></text:h>
      <text:p text:style-name="Text_20_body">A: Yes, Web Components are normally <text:alphabetical-index-mark-start text:id="IMark2051289474016"/>multi-threaded<text:alphabetical-index-mark-end text:id="IMark2051289474016"/>. The Web Component server allocates a thread for each new <text:alphabetical-index-mark-start text:id="IMark2051289474976"/>request<text:alphabetical-index-mark-end text:id="IMark2051289474976"/> for a single Web Component without any special programming. Each <text:alphabetical-index-mark-start text:id="IMark2051289476976"/>request<text:alphabetical-index-mark-end text:id="IMark2051289476976"/>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051289475376"/>request<text:alphabetical-index-mark-end text:id="IMark2051289475376"/>s?</text:p>
      <text:p text:style-name="Standard">A: The way that the server handles <text:alphabetical-index-mark-start text:id="IMark2051289473856"/>request<text:alphabetical-index-mark-end text:id="IMark2051289473856"/>s is not prescribed to this extent; it may use a single Web Component, it may use Web Component pooling, it depends on the internal system architecture. New threads are not necessarily created for every Web Component <text:alphabetical-index-mark-start text:id="IMark2051289475616"/>request<text:alphabetical-index-mark-end text:id="IMark2051289475616"/> but may be recycled through a worker thread pool for efficiency. The point is that you should write your Web Component code to take account of a <text:alphabetical-index-mark-start text:id="IMark2051289477056"/>multi-threaded<text:alphabetical-index-mark-end text:id="IMark2051289477056"/> <text:alphabetical-index-mark-start text:id="IMark2051289475856"/>context<text:alphabetical-index-mark-end text:id="IMark2051289475856"/>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051289473856"/>request<text:alphabetical-index-mark-end text:id="IMark2051289473856"/>s it will receive.</text:p>
      <text:h text:style-name="P92" text:outline-level="1"><text:bookmark-start text:name="__RefHeading___Toc4130_661956188"/>Appendix<text:bookmark-end text:name="__RefHeading___Toc4130_661956188"/></text:h>
      <text:h text:style-name="P93" text:outline-level="2"><text:bookmark-start text:name="__RefHeading___Toc4574_1042170583"/>Breaking Changes<text:bookmark-end text:name="__RefHeading___Toc4574_1042170583"/></text:h>
      <text:h text:style-name="P94" text:outline-level="3"><text:bookmark-start text:name="__RefHeading___Toc3266_3375935026"/>Breaking Changes in v 3.1<text:bookmark-end text:name="__RefHeading___Toc3266_3375935026"/></text:h>
      <text:list text:style-name="L31">
        <text:list-item>
          <text:p text:style-name="P95">Minimum supported version of the slf4p logging facade is 1.0.8</text:p>
        </text:list-item>
      </text:list>
      <text:h text:style-name="Heading_20_3" text:outline-level="3"><text:bookmark-start text:name="__RefHeading___Toc4576_1042170583"/>Breaking Changes in v 3.0<text:bookmark-end text:name="__RefHeading___Toc4576_1042170583"/></text:h>
      <text:list text:style-name="L32">
        <text:list-item>
          <text:p text:style-name="P96">Remove deprecated methods</text:p>
        </text:list-item>
        <text:list-item>
          <text:p text:style-name="P96">Use port 8080 as by default instead of port 80</text:p>
        </text:list-item>
      </text:list>
      <text:h text:style-name="P97"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which does not allow connections from other computers.</text:p>
      <text:p text:style-name="Standard">Solution: either bind the server to IP address 0.0.0.0, or to the IP address of a specific network adapter.</text:p>
      <text:p text:style-name="P30"><text:span text:style-name="T6">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text:span text:style-name="T1">already in use” error</text:span>?<text:bookmark-end text:name="__RefHeading___Toc4136_661956188"/></text:h>
      <text:p text:style-name="P98">If a server application is already listening on <text:span text:style-name="T1">the same </text:span>port <text:span text:style-name="T1">as your code</text:span>, your program will not be able to open the same port.</text:p>
      <text:p text:style-name="P98"><text:soft-page-break/><text:span text:style-name="T36">H</text:span>ere are two <text:span text:style-name="T36">ways </text:span>find the process which opened the port:</text:p>
      <text:p text:style-name="P99">Find the process by its process ID</text:p>
      <text:p text:style-name="Standard">Go to a command line and enter</text:p>
      <text:p text:style-name="Delphi_20_Code"><text:line-break/>netstat -o -n -a | findstr :80<text:span text:style-name="T36">80</text:span><text:line-break/></text:p>
      <text:p text:style-name="Standard"/>
      <text:p text:style-name="Standard">The last number in the output is the process ID using port 80<text:span text:style-name="T36">80</text:span>.</text:p>
      <text:p text:style-name="Standard">Example:</text:p>
      <text:p text:style-name="Delphi_20_Code"><text:line-break/> <text:s/>TCP <text:s text:c="3"/>127.0.0.1:80<text:span text:style-name="T36">80</text:span> <text:s text:c="8"/>0.0.0.0:0 <text:s text:c="13"/>LISTEN <text:s text:c="8"/>5636<text:line-break/></text:p>
      <text:p text:style-name="Standard"/>
      <text:p text:style-name="P99">Find the process name (requires administrator privileges)</text:p>
      <text:p text:style-name="Standard">Run the following from an elevated command prompt: </text:p>
      <text:p text:style-name="Delphi_20_Code"><text:line-break/>netstat -ab <text:line-break/></text:p>
      <text:p text:style-name="P99"/>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6">80</text:span> <text:s text:c="10"/>my-PC:0 <text:s text:c="12"/>LISTEN</text:p>
      <text:p text:style-name="Delphi_20_Code"><text:s/>[MyOtherServer.exe]<text:line-break/> <text:s/>...<text:line-break/></text:p>
      <text:p text:style-name="Standard"/>
      <text:p text:style-name="P99">Solutions:</text:p>
      <text:list text:style-name="L33">
        <text:list-item>
          <text:p text:style-name="P100">stop the application or service with this process ID, and try again</text:p>
        </text:list-item>
        <text:list-item>
          <text:p text:style-name="P100">use a different port (for example 808<text:span text:style-name="T36">1</text:span>)</text:p>
        </text:list-item>
      </text:list>
      <text:p text:style-name="Standard">Related articles:</text:p>
      <text:list text:style-name="L34">
        <text:list-item>
          <text:p text:style-name="P101"><text:a xlink:type="simple" xlink:href="http://stackoverflow.com/questions/20558410" text:style-name="Internet_20_link" text:visited-style-name="Visited_20_Internet_20_Link">http://stackoverflow.com/questions/20558410</text:a></text:p>
        </text:list-item>
        <text:list-item>
          <text:p text:style-name="P101"><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051289475376"/>Exception stack traces<text:alphabetical-index-mark-end text:id="IMark2051289475376"/> <text:bookmark-end text:name="__RefHeading___Toc4142_661956188"/></text:h>
      <text:h text:style-name="Heading_20_3" text:outline-level="3"><text:bookmark-start text:name="__RefHeading___Toc4144_661956188"/>Stack traces with <text:alphabetical-index-mark-start text:id="IMark2051289478416"/><text:alphabetical-index-mark-start text:id="IMark2051289474816"/>madExcept<text:bookmark-end text:name="__RefHeading___Toc4144_661956188"/><text:alphabetical-index-mark-end text:id="IMark2051289474816"/><text:alphabetical-index-mark-end text:id="IMark2051289478416"/></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051289474016"/><text:span text:style-name="FlowSource">MADEXCEPT</text:span><text:alphabetical-index-mark-end text:id="IMark2051289474016"/> in the project settings will enable stack traces on <text:alphabetical-index-mark-start text:id="IMark2051289474816"/><text:alphabetical-index-mark-start text:id="IMark2051289475376"/>exceptions<text:alphabetical-index-mark-end text:id="IMark2051289475376"/><text:alphabetical-index-mark-end text:id="IMark2051289474816"/>. The stack traces will appear in the HTML response and – if <text:span text:style-name="FlowSource">DARAJA_LOGGING</text:span> is defined - <text:s/>in the log output.</text:p>
      <text:p text:style-name="Standard"><text:soft-page-break/>Note this is an un<text:alphabetical-index-mark-start text:id="IMark2051289478176"/>support<text:alphabetical-index-mark-end text:id="IMark2051289478176"/>ed bonus feature and only has been tested with <text:alphabetical-index-mark-start text:id="IMark2051289476976"/>madExcept<text:alphabetical-index-mark-end text:id="IMark2051289476976"/>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051289475616"/><text:alphabetical-index-mark-start text:id="IMark2051289473856"/>exceptions<text:alphabetical-index-mark-end text:id="IMark2051289473856"/><text:alphabetical-index-mark-end text:id="IMark2051289475616"/>. The stack traces will appear in the HTML response and – if <text:span text:style-name="FlowSource">DARAJA_LOGGING</text:span> is defined<text:span text:style-name="T37">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051289473856"/>Configuration<text:alphabetical-index-mark-end text:id="IMark2051289473856"/> of internal Indy HTTP Server<text:bookmark-end text:name="__RefHeading___Toc4148_661956188"/></text:h>
      <text:p text:style-name="Standard">The new property <text:alphabetical-index-mark-start text:id="IMark2051289475856"/>HTTPServer<text:alphabetical-index-mark-end text:id="IMark2051289475856"/> of the class <text:alphabetical-index-mark-start text:id="IMark2051289478176"/>TdjHTTPConnector<text:alphabetical-index-mark-end text:id="IMark2051289478176"/> allows to query and modify properties of the internal Indy HTTP server component.</text:p>
      <text:h text:style-name="Heading_20_3" text:outline-level="3"><text:bookmark-start text:name="__RefHeading___Toc4150_661956188"/><text:alphabetical-index-mark-start text:id="IMark2051289474016"/>MaxConnections<text:alphabetical-index-mark-end text:id="IMark2051289474016"/> example<text:bookmark-end text:name="__RefHeading___Toc4150_661956188"/></text:h>
      <text:p text:style-name="Standard">To reject new HTTP connections in high load situations, set the server property <text:alphabetical-index-mark-start text:id="IMark2051289474816"/>MaxConnections<text:alphabetical-index-mark-end text:id="IMark2051289474816"/>:</text:p>
      <text:p text:style-name="P30"><text:span text:style-name="T6">Code ex</text:span>ample</text:p>
      <text:p text:style-name="SourceCode"/>
      <text:p text:style-name="SourceCode">// allow a maximum of 100 concurrent connections</text:p>
      <text:p text:style-name="SourceCode">Connector.HTTPServer.<text:alphabetical-index-mark-start text:id="IMark2051289477056"/>MaxConnections<text:alphabetical-index-mark-end text:id="IMark2051289477056"/>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6">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051289475616"/>Interceptor<text:alphabetical-index-mark-end text:id="IMark2051289475616"/>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051289474816"/>interceptor<text:alphabetical-index-mark-end text:id="IMark2051289474816"/> output.</text:p>
      <text:p text:style-name="P30"><text:span text:style-name="T6">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051289477616"/>Context<text:alphabetical-index-mark-end text:id="IMark2051289477616"/>: TdjWebApp<text:alphabetical-index-mark-start text:id="IMark2051289476016"/>Context<text:alphabetical-index-mark-end text:id="IMark2051289476016"/>;</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6">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051289474416"/>Context<text:alphabetical-index-mark-end text:id="IMark2051289474416"/> := TdjWebApp<text:alphabetical-index-mark-start text:id="IMark2051289476736"/>Context<text:alphabetical-index-mark-end text:id="IMark2051289476736"/>.Create('get');</text:p>
      <text:p text:style-name="SourceCode"><text:s text:c="6"/><text:alphabetical-index-mark-start text:id="IMark2051289475376"/>Context<text:alphabetical-index-mark-end text:id="IMark2051289475376"/>.Add(TNoOpComponent, '/hello');</text:p>
      <text:p text:style-name="SourceCode"><text:s text:c="6"/>Server.Add(<text:alphabetical-index-mark-start text:id="IMark2051289474016"/>Context<text:alphabetical-index-mark-end text:id="IMark2051289474016"/>);</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102" text:outline-level="2"><text:bookmark-start text:name="__RefHeading___Toc4156_661956188"/>SLF4P support<text:bookmark-end text:name="__RefHeading___Toc4156_661956188"/></text:h>
      <text:p text:style-name="P103">The framework supports the <text:span text:style-name="T17">Simple Logging Facade for Pascal</text:span> (SLF4P) which is available from GitHub at <text:a xlink:type="simple" xlink:href="https://github.com/michaelJustin/slf4p" text:style-name="Internet_20_link" text:visited-style-name="Visited_20_Internet_20_Link">https://github.com/michaelJustin/slf4p</text:a>.</text:p>
      <text:p text:style-name="P104">Starting with version 3.1.0 of the framework, the minimum supported version of slf4p is 1.0.8.</text:p>
      <text:h text:style-name="Heading_20_3" text:outline-level="3"><text:bookmark-start text:name="__RefHeading___Toc4158_661956188"/>IDE <text:alphabetical-index-mark-start text:id="IMark2051289475376"/>configuration<text:bookmark-end text:name="__RefHeading___Toc4158_661956188"/><text:alphabetical-index-mark-end text:id="IMark2051289475376"/></text:h>
      <text:p text:style-name="Standard">In order to compile with <text:span text:style-name="T10">logging</text:span> <text:alphabetical-index-mark-start text:id="IMark2051289473856"/>support<text:alphabetical-index-mark-end text:id="IMark2051289473856"/>, add the conditional symbol <text:alphabetical-index-mark-start text:id="IMark2051289476016"/><text:span text:style-name="T13">DARAJA_LOGGING</text:span><text:alphabetical-index-mark-end text:id="IMark2051289476016"/> to the project options:</text:p>
      <text:list text:style-name="L35">
        <text:list-item>
          <text:p text:style-name="P105">in Delphi, choose Project | Options... | Delphi Compiler &gt; Conditional defines and add <text:span text:style-name="FlowSource">DARAJA_LOGGING</text:span></text:p>
        </text:list-item>
        <text:list-item>
          <text:p text:style-name="P105">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051289475856"/>Exceptions<text:bookmark-end text:name="__RefHeading___Toc4162_661956188"/><text:alphabetical-index-mark-end text:id="IMark2051289475856"/></text:h>
      <text:p text:style-name="Standard">During the unit tests, some expected <text:alphabetical-index-mark-start text:id="IMark2051289478656"/>exceptions<text:alphabetical-index-mark-end text:id="IMark2051289478656"/> will be thrown. In the Delphi IDE, these <text:alphabetical-index-mark-start text:id="IMark2051289476736"/>exceptions<text:alphabetical-index-mark-end text:id="IMark2051289476736"/> should not cause the debugger to interrupt program execution.</text:p>
      <text:p text:style-name="Standard">To fix this, either add the <text:alphabetical-index-mark-start text:id="IMark2051289474256"/>exceptions<text:alphabetical-index-mark-end text:id="IMark2051289474256"/>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2051289478416"/>exceptions<text:alphabetical-index-mark-end text:id="IMark2051289478416"/> are thrown in the tests:</text:p>
      <text:list text:style-name="L36">
        <text:list-item>
          <text:p text:style-name="P106"><text:alphabetical-index-mark-start text:id="IMark2051289475536"/>EidHTTPProtocolException<text:alphabetical-index-mark-end text:id="IMark2051289475536"/></text:p>
        </text:list-item>
        <text:list-item>
          <text:p text:style-name="P106"><text:alphabetical-index-mark-start text:id="IMark2051289478576"/>EWebComponentException<text:alphabetical-index-mark-end text:id="IMark2051289478576"/></text:p>
        </text:list-item>
        <text:list-item>
          <text:p text:style-name="P107"><text:alphabetical-index-mark-start text:id="IMark2051289474816"/>EUnitTestException<text:alphabetical-index-mark-end text:id="IMark2051289474816"/></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051289478656"/>TdjDefaultWebComponent<text:bookmark-end text:name="__RefHeading___Toc4166_661956188"/><text:alphabetical-index-mark-end text:id="IMark2051289478656"/></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6">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051289476016"/>static resource folder<text:alphabetical-index-mark-end text:id="IMark2051289476016"/>.</text:p>
      <text:p text:style-name="Standard">The static resource folder is located under the <text:span text:style-name="T21">webapps</text:span> directory of the server and has the same name as the context. Example directory:</text:p>
      <text:p text:style-name="P108"><text:line-break/> \MyWebApp</text:p>
      <text:p text:style-name="P108"><text:s text:c="2"/>- MyWebApp.exe</text:p>
      <text:p text:style-name="P108"><text:s text:c="2"/>- \webapps</text:p>
      <text:p text:style-name="P109"><text:span text:style-name="T21"><text:s text:c="4"/>- \myapp1 ← folder for static resource files in context “myapp1”&gt;</text:span><text:span text:style-name="T38"><text:line-break/></text:span></text:p>
      <text:h text:style-name="Heading_20_2" text:outline-level="2"><text:bookmark-start text:name="__RefHeading___Toc4168_661956188"/><text:alphabetical-index-mark-start text:id="IMark2051289473856"/>TdjNCSALog<text:span text:style-name="T39">Filt</text:span>er<text:bookmark-end text:name="__RefHeading___Toc4168_661956188"/><text:alphabetical-index-mark-end text:id="IMark2051289473856"/></text:h>
      <text:p text:style-name="P110">TdjNCSALog<text:span text:style-name="T40">Filte</text:span>r is a web <text:span text:style-name="T40">filter</text:span> which provides logging support in the NCSA log format.<text:note text:id="ftn2" text:note-class="footnote"><text:note-citation>2</text:note-citation><text:note-body><text:p text:style-name="P111"><text:a xlink:type="simple" xlink:href="https://en.wikipedia.org/wiki/Common_Log_Format" text:style-name="Internet_20_link" text:visited-style-name="Visited_20_Internet_20_Link"><text:span text:style-name="T41">https://en.wikipedia.org/wiki/Common_Log_Format</text:span></text:a></text:p></text:note-body></text:note></text:p>
      <text:p text:style-name="P110"><text:span text:style-name="T42">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0">Filter</text:span><text:bookmark-end text:name="__RefHeading___Toc4170_661956188"/></text:h>
      <text:p text:style-name="Standard">TdjStatistics<text:span text:style-name="T40">Filt</text:span>er collects statistical information about number of requests and more.</text:p>
      <text:h text:style-name="Heading_20_1" text:outline-level="1"><text:bookmark-start text:name="__RefHeading___Toc4172_661956188"/><text:alphabetical-index-mark-start text:id="IMark2051289476336"/><text:span text:style-name="T43">Other optional</text:span> units<text:bookmark-end text:name="__RefHeading___Toc4172_661956188"/><text:alphabetical-index-mark-end text:id="IMark2051289476336"/></text:h>
      <text:h text:style-name="Heading_20_2" text:outline-level="2"><text:bookmark-start text:name="__RefHeading___Toc4174_661956188"/><text:alphabetical-index-mark-start text:id="IMark2051289474016"/>ShutdownHelper<text:bookmark-end text:name="__RefHeading___Toc4174_661956188"/><text:alphabetical-index-mark-end text:id="IMark2051289474016"/></text:h>
      <text:p text:style-name="Standard">This unit is included in the <text:span text:style-name="FlowSource">demo/commons</text:span> folder and registers a console control event handler.</text:p>
      <text:p text:style-name="Standard">It has one method, <text:alphabetical-index-mark-start text:id="IMark2051289477056"/><text:span text:style-name="T17">SetShutdownHook</text:span><text:alphabetical-index-mark-end text:id="IMark2051289477056"/>. This method takes a single parameter which is a <text:span text:style-name="T17">TdjServer</text:span> instance.</text:p>
      <text:p text:style-name="Standard">If the console window receives a Ctrl+<text:span text:style-name="T44">C </text:span>/ break / close / shutdown / logoff event, the <text:span text:style-name="FlowSource">Server.Stop</text:span> method will be called.</text:p>
      <text:p text:style-name="P30"><text:span text:style-name="T6">Code ex</text:span>ample</text:p>
      <text:p text:style-name="SourceCode"/>
      <text:p text:style-name="SourceCode">procedure SetShutdownHook(const Server: TdjServer);</text:p>
      <text:p text:style-name="SourceCode"/>
      <text:p text:style-name="Standard"/>
      <text:p text:style-name="List_20_Indent"><text:span text:style-name="T17">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12">Indy will be compiled into applications built with <text:title>Daraja HTTP Framework</text:title>, this means that the Indy license applies to your application.</text:p>
      <text:p text:style-name="P112"><text:span text:style-name="T45">L</text:span>icense information <text:span text:style-name="T45">for Indy </text:span>can be found at <text:a xlink:type="simple" xlink:href="https://www.indyproject.org/license/" text:style-name="Internet_20_link" text:visited-style-name="Visited_20_Internet_20_Link">https://www.indyproject.org/license/</text:a></text:p>
      <text:p text:style-name="P112"/>
      <text:p text:style-name="P112"/>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13">CharSet<text:tab/>16, 19f.</text:p>
          <text:p text:style-name="P113">Conditional symbols<text:tab/>15</text:p>
          <text:p text:style-name="P113">Conditional Symbols<text:tab/>15</text:p>
          <text:p text:style-name="P113">Configuration<text:tab/>19, 30, 32</text:p>
          <text:p text:style-name="P113">ContentText<text:tab/>16, 20</text:p>
          <text:p text:style-name="P113">ContentType<text:tab/>16, 19f.</text:p>
          <text:p text:style-name="P113">Context<text:tab/>17ff., 25, 31</text:p>
          <text:p text:style-name="P113">DARAJA_LOGGING<text:tab/>32</text:p>
          <text:p text:style-name="P113">Destroy<text:tab/>16</text:p>
          <text:p text:style-name="P113">Development mode<text:tab/>15</text:p>
          <text:p text:style-name="P113">DjGlobal<text:tab/>20</text:p>
          <text:p text:style-name="P113">EidHTTPProtocolException<text:tab/>33</text:p>
          <text:p text:style-name="P113">EUnitTestException<text:tab/>33</text:p>
          <text:p text:style-name="P113">EWebComponentException<text:tab/>33</text:p>
          <text:p text:style-name="P113">Exception stack traces<text:tab/>29</text:p>
          <text:p text:style-name="P113">Exceptions<text:tab/>29f., 33</text:p>
          <text:p text:style-name="P113">Free Pascal<text:tab/>14</text:p>
          <text:p text:style-name="P113">GetInitParameter<text:tab/>19</text:p>
          <text:p text:style-name="P113">GetInitParameterNames<text:tab/>19</text:p>
          <text:p text:style-name="P113">HTML Encoding<text:tab/>20</text:p>
          <text:p text:style-name="P113">HTMLEncode<text:tab/>20</text:p>
          <text:p text:style-name="P113">HTTP<text:tab/>16, 25</text:p>
          <text:p text:style-name="P113">HTTPServer<text:tab/>30</text:p>
          <text:p text:style-name="P113">Init<text:tab/>16</text:p>
          <text:p text:style-name="P113">Interceptor<text:tab/>31</text:p>
          <text:p text:style-name="P113">Logging<text:tab/>15</text:p>
          <text:p text:style-name="P113">MadExcept<text:tab/>15, 29f.</text:p>
          <text:p text:style-name="P113">MADEXCEPT<text:tab/>29</text:p>
          <text:p text:style-name="P113">Mapping rules<text:tab/>17</text:p>
          <text:p text:style-name="P113">MaxConnections<text:tab/>30</text:p>
          <text:p text:style-name="P113">Multi-threaded<text:tab/>24f.</text:p>
          <text:p text:style-name="P113">Multi-threading<text:tab/>24</text:p>
          <text:p text:style-name="P113">OnGet<text:tab/>16, 24</text:p>
          <text:p text:style-name="P113">OnPost<text:tab/>16, 24</text:p>
          <text:p text:style-name="P113">Other optional units<text:tab/>36</text:p>
          <text:p text:style-name="P113">Path Mapping<text:tab/>17</text:p>
          <text:p text:style-name="P113">Request<text:tab/>16, 24ff.</text:p>
          <text:p text:style-name="P113">Resource path mapping<text:tab/>17</text:p>
          <text:p text:style-name="P113">Resources<text:tab/>17</text:p>
          <text:p text:style-name="P113">Response<text:tab/>16, 24</text:p>
          <text:p text:style-name="P113">SetInitParameter<text:tab/>19</text:p>
          <text:p text:style-name="P113">SetShutdownHook<text:tab/>36</text:p>
          <text:p text:style-name="P113">Setting parameters of a context<text:tab/>19</text:p>
          <text:p text:style-name="P113">ShutdownHelper<text:tab/>36</text:p>
          <text:p text:style-name="P113">Special characters<text:tab/>20</text:p>
          <text:p text:style-name="P113">Static resource<text:tab/>17</text:p>
          <text:p text:style-name="P113">Static resource folder<text:tab/>34</text:p>
          <text:p text:style-name="P113">Support<text:tab/>17f., 30, 32</text:p>
          <text:p text:style-name="P113">TdjDefaultWebComponent<text:tab/>34</text:p>
          <text:p text:style-name="P113">TdjHTTPConnector<text:tab/>30</text:p>
          <text:p text:style-name="P113">TdjNCSALogFilter<text:tab/>34</text:p>
          <text:p text:style-name="P113">TdjRequest<text:tab/>16, 19f., 24</text:p>
          <text:p text:style-name="P113">TdjResponse<text:tab/>16, 19f., 24</text:p>
          <text:p text:style-name="P113">TdjWebAppContext<text:tab/>17</text:p>
          <text:p text:style-name="P113">TdjWebComponent<text:tab/>16, 24</text:p>
          <text:p text:style-name="P113">TMyWebPage<text:tab/>16, 24</text:p>
          <text:p text:style-name="P113">Utf-8<text:tab/>16, 20</text:p>
          <text:p text:style-name="P113">UTF-8<text:tab/>19</text:p>
          <text:p text:style-name="P113"><text:tab/>16, 24</text:p>
        </text:index-body>
      </text:alphabetical-index>
      <text:p text:style-name="Standard"/>
      <text:p text:style-name="P114"/>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15">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16">Illustration 1: Hello world example<text:tab/>6</text:p>
          <text:p text:style-name="P116">Illustration 2: HTTP session example<text:tab/>9</text:p>
          <text:p text:style-name="P116">Illustration 3: Fibonacci calculation result as plain text<text:tab/>12</text:p>
          <text:p text:style-name="P116">Illustration 4: Fibonacci calculation result as HTML<text:tab/>13</text:p>
          <text:p text:style-name="P116">Illustration 5: Exception stack trace with madExcept<text:tab/>29</text:p>
          <text:p text:style-name="P116">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chapter"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chapter">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chapter">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chapter">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chapter">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chapter">
      <style:paragraph-properties fo:margin-top="0.423cm" fo:margin-bottom="0.106cm" style:contextual-spacing="false"/>
    </style:style>
    <style:style style:name="Heading_20_8" style:display-name="Heading 8" style:family="paragraph" style:parent-style-name="Standard" style:next-style-name="Standard" style:class="chapter">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chapter">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lef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3"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nsolas2" fo:font-family="Consolas" style:font-style-name="Regular"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hird-Party Product Licenses</text:chapter></text:span><text:span text:style-name="MT3"><text:tab/></text:span><text:span text:style-name="MT2"><text:page-number text:select-page="current">37</text:page-number></text:span></text:p>
      </style:header>
      <style:header-left>
        <text:p text:style-name="MP2"><text:page-number text:select-page="current">38</text:page-number><text:tab/><text:title>Daraja HTTP Framework</text:title> <text:keywords>3.1.0</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meta:initial-creator>Michael Justin</meta:initial-creator>
    <meta:creation-date>2007-10-03T18:31:29</meta:creation-date>
    <dc:date>2026-05-17T09:50:15.488294500</dc:date>
    <meta:editing-cycles>1749</meta:editing-cycles>
    <meta:editing-duration>P4DT15H19M5S</meta:editing-duration>
    <dc:title>Daraja HTTP Framework</dc:title>
    <meta:print-date>2026-05-17T09:46:23.158009700</meta:print-date>
    <meta:printed-by>PDF files</meta:printed-by>
    <meta:keyword>3.1.0</meta:keyword>
    <meta:document-statistic meta:table-count="1" meta:image-count="7" meta:object-count="0" meta:page-count="39" meta:paragraph-count="812" meta:word-count="5133" meta:character-count="36698" meta:non-whitespace-character-count="31740"/>
    <meta:user-defined meta:name="Info 1"/>
    <meta:user-defined meta:name="Info 2"/>
    <meta:user-defined meta:name="Info 3"/>
    <meta:user-defined meta:name="Info 4"/>
  </office:meta>
</office:document-meta>
</file>