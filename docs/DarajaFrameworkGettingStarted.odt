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000000267000000BAAC8003A9.png" manifest:media-type="image/png"/>
  <manifest:file-entry manifest:full-path="Pictures/10000000000003EA00000320E75BF104.png" manifest:media-type="image/png"/>
  <manifest:file-entry manifest:full-path="Pictures/100000000000022D000000AA71839787.png" manifest:media-type="image/png"/>
  <manifest:file-entry manifest:full-path="Pictures/1000000000000203000000D73EE80221.png" manifest:media-type="image/png"/>
  <manifest:file-entry manifest:full-path="Pictures/1000000000000285000000DB431F8AA5.png" manifest:media-type="image/png"/>
  <manifest:file-entry manifest:full-path="Pictures/100000000000022D000000AAE1C5EF9C.png" manifest:media-type="image/png"/>
  <manifest:file-entry manifest:full-path="Pictures/1000000000000265000000A807C785E5.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Bahnschrift" svg:font-family="Bahnschrift" style:font-adornments="Fett" style:font-family-generic="swiss" style:font-pitch="variable"/>
    <style:font-face style:name="Bahnschrift Light" svg:font-family="'Bahnschrift Light'" style:font-adornments="Fett" style:font-family-generic="swiss" style:font-pitch="variable"/>
    <style:font-face style:name="Bahnschrift SemiBold" svg:font-family="'Bahnschrift SemiBold'" style:font-adornments="Halbfett" style:font-family-generic="swiss" style:font-pitch="variable"/>
    <style:font-face style:name="Consolas" svg:font-family="Consolas" style:font-family-generic="modern" style:font-pitch="fixed"/>
    <style:font-face style:name="Consolas1" svg:font-family="Consolas" style:font-adornments="Fett" style:font-family-generic="modern" style:font-pitch="fixed"/>
    <style:font-face style:name="Consolas2" svg:font-family="Consolas" style:font-adornments="Regular" style:font-family-generic="modern" style:font-pitch="fixed"/>
    <style:font-face style:name="Consolas3" svg:font-family="Consolas" style:font-adornments="Standard" style:font-family-generic="modern" style:font-pitch="fixed"/>
    <style:font-face style:name="Courier New" svg:font-family="'Courier New'" style:font-family-generic="modern"/>
    <style:font-face style:name="Courier New1" svg:font-family="'Courier New'" style:font-family-generic="modern" style:font-pitch="fixed"/>
    <style:font-face style:name="Exo" svg:font-family="Exo" style:font-family-generic="modern" style:font-pitch="variable"/>
    <style:font-face style:name="Lucida Console" svg:font-family="'Lucida Console'" style:font-family-generic="modern"/>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StarSymbol" svg:font-family="StarSymbol"/>
    <style:font-face style:name="Symbol" svg:font-family="Symbol" style:font-charset="x-symbol"/>
    <style:font-face style:name="Symbol1" svg:font-family="Symbol" style:font-family-generic="roman" style:font-pitch="variable"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Verdana" svg:font-family="Verdana"/>
    <style:font-face style:name="Verdana1" svg:font-family="Verdana" style:font-family-generic="swiss" style:font-pitch="variable"/>
  </office:font-face-decls>
  <office:automatic-styles>
    <style:style style:name="Tabelle2" style:family="table">
      <style:table-properties style:width="16.796cm" table:align="left" fo:keep-with-next="always" style:writing-mode="lr-tb"/>
    </style:style>
    <style:style style:name="Tabelle2.A" style:family="table-column">
      <style:table-column-properties style:column-width="8.149cm"/>
    </style:style>
    <style:style style:name="Tabelle2.B" style:family="table-column">
      <style:table-column-properties style:column-width="8.647cm"/>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P1" style:family="paragraph" style:parent-style-name="Title" style:master-page-name="First_20_Page">
      <style:paragraph-properties style:page-number="auto"/>
    </style:style>
    <style:style style:name="P2" style:family="paragraph" style:parent-style-name="Title" style:master-page-name="">
      <loext:graphic-properties draw:fill-gradient-name="gradient" draw:fill-hatch-name="hatch"/>
      <style:paragraph-properties fo:margin-top="0cm" fo:margin-bottom="0.109cm" style:contextual-spacing="false" style:page-number="auto"/>
      <style:text-properties fo:color="#333366" loext:opacity="100%" style:font-name="Bahnschrift Light" fo:font-size="42pt" fo:language="en" fo:country="US" fo:font-weight="normal" officeooo:paragraph-rsid="004f81d4" style:letter-kerning="true" style:font-name-asian="Times New Roman" style:font-size-asian="42pt" style:font-weight-asian="normal" style:font-name-complex="Arial" style:font-size-complex="42pt" style:language-complex="he" style:country-complex="IL" style:font-weight-complex="normal"/>
    </style:style>
    <style:style style:name="P3" style:family="paragraph" style:parent-style-name="Title">
      <loext:graphic-properties draw:fill-gradient-name="gradient" draw:fill-hatch-name="hatch"/>
      <style:paragraph-properties fo:margin-top="0cm" fo:margin-bottom="0.109cm" style:contextual-spacing="false"/>
      <style:text-properties fo:color="#333366" loext:opacity="100%" style:font-name="Bahnschrift Light" fo:font-size="24pt" fo:language="en" fo:country="US" fo:font-weight="normal" officeooo:rsid="004f81d4" officeooo:paragraph-rsid="004f81d4" style:letter-kerning="true" style:font-name-asian="Times New Roman" style:font-size-asian="24pt" style:font-weight-asian="normal" style:font-name-complex="Arial" style:font-size-complex="24pt" style:language-complex="he" style:country-complex="IL" style:font-weight-complex="normal"/>
    </style:style>
    <style:style style:name="P4" style:family="paragraph" style:parent-style-name="Contents_20_Heading">
      <style:paragraph-properties fo:break-before="page"/>
    </style:style>
    <style:style style:name="P5" style:family="paragraph" style:parent-style-name="Contents_20_1">
      <style:paragraph-properties>
        <style:tab-stops>
          <style:tab-stop style:position="16.999cm" style:type="right" style:leader-style="dotted" style:leader-text="."/>
        </style:tab-stops>
      </style:paragraph-properties>
    </style:style>
    <style:style style:name="P6" style:family="paragraph" style:parent-style-name="Contents_20_2">
      <style:paragraph-properties>
        <style:tab-stops>
          <style:tab-stop style:position="16.499cm" style:type="right" style:leader-style="dotted" style:leader-text="."/>
        </style:tab-stops>
      </style:paragraph-properties>
    </style:style>
    <style:style style:name="P7" style:family="paragraph" style:parent-style-name="Contents_20_3">
      <style:paragraph-properties>
        <style:tab-stops>
          <style:tab-stop style:position="16cm" style:type="right" style:leader-style="dotted" style:leader-text="."/>
        </style:tab-stops>
      </style:paragraph-properties>
    </style:style>
    <style:style style:name="P8" style:family="paragraph" style:parent-style-name="Heading_20_1" style:list-style-name="" style:master-page-name="">
      <loext:graphic-properties draw:fill-gradient-name="gradient" draw:fill-hatch-name="hatch"/>
      <style:paragraph-properties fo:orphans="2" fo:widows="2" style:page-number="auto" fo:break-before="auto" fo:break-after="auto"/>
    </style:style>
    <style:style style:name="P9" style:family="paragraph" style:parent-style-name="Heading_20_1">
      <loext:graphic-properties draw:fill-gradient-name="gradient" draw:fill-hatch-name="hatch"/>
      <style:paragraph-properties fo:break-before="page"/>
    </style:style>
    <style:style style:name="P10" style:family="paragraph" style:parent-style-name="Standard" style:list-style-name="L1"/>
    <style:style style:name="P11" style:family="paragraph" style:parent-style-name="Standard" style:list-style-name="L1">
      <style:text-properties style:font-name="Verdana1" fo:font-size="10.5pt" style:font-name-asian="Verdana1" style:font-size-asian="10.5pt" style:font-name-complex="Verdana1" style:font-size-complex="10.5pt"/>
    </style:style>
    <style:style style:name="P12" style:family="paragraph" style:parent-style-name="Heading_20_3">
      <style:text-properties style:font-name="Verdana1" fo:font-size="10.5pt" style:font-name-asian="Verdana1" style:font-size-asian="10.5pt" style:font-name-complex="Verdana1" style:font-size-complex="10.5pt"/>
    </style:style>
    <style:style style:name="P13" style:family="paragraph" style:parent-style-name="Standard">
      <style:text-properties style:font-name="Verdana1" fo:font-size="10.5pt" style:font-name-asian="Verdana1" style:font-size-asian="10.5pt" style:font-name-complex="Verdana1" style:font-size-complex="10.5pt"/>
    </style:style>
    <style:style style:name="P14" style:family="paragraph" style:parent-style-name="Standard" style:list-style-name="L2">
      <style:text-properties style:font-name="Verdana1" fo:font-size="10.5pt" style:font-name-asian="Verdana1" style:font-size-asian="10.5pt" style:font-name-complex="Verdana1" style:font-size-complex="10.5pt"/>
    </style:style>
    <style:style style:name="P15" style:family="paragraph" style:parent-style-name="Standard" style:list-style-name="L2"/>
    <style:style style:name="P16" style:family="paragraph" style:parent-style-name="Standard">
      <style:text-properties style:font-name="Verdana1" fo:font-size="10.5pt" officeooo:rsid="0075b04f" officeooo:paragraph-rsid="0075b04f" style:font-name-asian="Verdana1" style:font-size-asian="10.5pt" style:font-name-complex="Verdana1" style:font-size-complex="10.5pt"/>
    </style:style>
    <style:style style:name="P17" style:family="paragraph" style:parent-style-name="Standard" style:list-style-name="L3">
      <style:text-properties style:font-name="Verdana1" fo:font-size="10.5pt" style:font-name-asian="Verdana1" style:font-size-asian="10.5pt" style:font-name-complex="Verdana1" style:font-size-complex="10.5pt"/>
    </style:style>
    <style:style style:name="P18" style:family="paragraph" style:parent-style-name="CodeExampleHeader">
      <style:text-properties style:font-name="Verdana1" fo:font-size="10.5pt" officeooo:paragraph-rsid="002e61e5" style:font-name-asian="Verdana1" style:font-size-asian="10.5pt" style:font-name-complex="Verdana1" style:font-size-complex="10.5pt"/>
    </style:style>
    <style:style style:name="P19" style:family="paragraph" style:parent-style-name="SourceCode">
      <style:text-properties fo:font-size="10.5pt" style:font-name-asian="Verdana1" style:font-size-asian="10.5pt" style:font-name-complex="Verdana1" style:font-size-complex="10.5pt"/>
    </style:style>
    <style:style style:name="P20" style:family="paragraph" style:parent-style-name="Standard" style:list-style-name="L4">
      <style:text-properties style:font-name="Verdana1" fo:font-size="10.5pt" style:font-name-asian="Verdana1" style:font-size-asian="10.5pt" style:font-name-complex="Verdana1" style:font-size-complex="10.5pt"/>
    </style:style>
    <style:style style:name="P21" style:family="paragraph" style:parent-style-name="SourceCode">
      <style:text-properties officeooo:paragraph-rsid="007493dc"/>
    </style:style>
    <style:style style:name="P22" style:family="paragraph" style:parent-style-name="Standard" style:list-style-name="L5"/>
    <style:style style:name="P23" style:family="paragraph" style:parent-style-name="Standard">
      <style:text-properties officeooo:paragraph-rsid="007ec111"/>
    </style:style>
    <style:style style:name="P24" style:family="paragraph" style:parent-style-name="Standard">
      <style:text-properties fo:font-weight="normal" officeooo:paragraph-rsid="007ec111" style:font-weight-asian="normal" style:font-weight-complex="normal"/>
    </style:style>
    <style:style style:name="P25" style:family="paragraph" style:parent-style-name="Standard" style:list-style-name="L6"/>
    <style:style style:name="P26" style:family="paragraph" style:parent-style-name="Standard">
      <style:text-properties fo:font-weight="normal" style:font-weight-asian="normal" style:font-weight-complex="normal"/>
    </style:style>
    <style:style style:name="P27" style:family="paragraph" style:parent-style-name="Standard" style:list-style-name="L7">
      <style:text-properties style:font-name="Verdana1" fo:font-size="10.5pt" style:font-name-asian="Verdana1" style:font-size-asian="10.5pt" style:font-name-complex="Verdana1" style:font-size-complex="10.5pt"/>
    </style:style>
    <style:style style:name="P28" style:family="paragraph" style:parent-style-name="Standard" style:list-style-name="L7">
      <style:text-properties officeooo:paragraph-rsid="0013fab0"/>
    </style:style>
    <style:style style:name="P29" style:family="paragraph" style:parent-style-name="Standard" style:list-style-name="L8"/>
    <style:style style:name="P30" style:family="paragraph" style:parent-style-name="CodeExampleHeader">
      <style:text-properties officeooo:paragraph-rsid="002c9164"/>
    </style:style>
    <style:style style:name="P31" style:family="paragraph" style:parent-style-name="Standard" style:list-style-name="L9">
      <style:text-properties style:font-name="Verdana1" fo:font-size="10.5pt" style:font-name-asian="Verdana1" style:font-size-asian="10.5pt" style:font-name-complex="Verdana1" style:font-size-complex="10.5pt"/>
    </style:style>
    <style:style style:name="P32" style:family="paragraph" style:parent-style-name="CodeExampleHeader">
      <style:text-properties style:font-name="Verdana1" fo:font-size="10.5pt" officeooo:paragraph-rsid="002c9164" style:font-name-asian="Verdana1" style:font-size-asian="10.5pt" style:font-name-complex="Verdana1" style:font-size-complex="10.5pt"/>
    </style:style>
    <style:style style:name="P33" style:family="paragraph" style:parent-style-name="SourceCode">
      <style:text-properties officeooo:paragraph-rsid="00775a24"/>
    </style:style>
    <style:style style:name="P34" style:family="paragraph" style:parent-style-name="Standard" style:list-style-name="L10"/>
    <style:style style:name="P35" style:family="paragraph" style:parent-style-name="Standard">
      <style:text-properties officeooo:paragraph-rsid="00775a24"/>
    </style:style>
    <style:style style:name="P36" style:family="paragraph" style:parent-style-name="Standard" style:list-style-name="L11"/>
    <style:style style:name="P37" style:family="paragraph" style:parent-style-name="Standard" style:list-style-name="L12"/>
    <style:style style:name="P38" style:family="paragraph" style:parent-style-name="Standard" style:list-style-name="L12">
      <style:text-properties officeooo:paragraph-rsid="00624c69"/>
    </style:style>
    <style:style style:name="P39" style:family="paragraph" style:parent-style-name="Standard" style:list-style-name="L13">
      <style:text-properties officeooo:paragraph-rsid="00624c69"/>
    </style:style>
    <style:style style:name="P40" style:family="paragraph" style:parent-style-name="Standard" style:list-style-name="L14">
      <style:text-properties style:font-name="Verdana1" fo:font-size="10.5pt" style:font-name-asian="Verdana1" style:font-size-asian="10.5pt" style:font-name-complex="Verdana1" style:font-size-complex="10.5pt"/>
    </style:style>
    <style:style style:name="P41" style:family="paragraph" style:parent-style-name="Standard" style:list-style-name="L14"/>
    <style:style style:name="P42" style:family="paragraph" style:parent-style-name="Standard" style:list-style-name="L15"/>
    <style:style style:name="P43" style:family="paragraph" style:parent-style-name="Standard" style:list-style-name="L16">
      <style:text-properties style:font-name="Verdana1" fo:font-size="10.5pt" style:font-name-asian="Verdana1" style:font-size-asian="10.5pt" style:font-name-complex="Verdana1" style:font-size-complex="10.5pt"/>
    </style:style>
    <style:style style:name="P44" style:family="paragraph" style:parent-style-name="Standard" style:list-style-name="L17"/>
    <style:style style:name="P45" style:family="paragraph" style:parent-style-name="Standard" style:list-style-name="L18">
      <style:text-properties officeooo:paragraph-rsid="00508d9b"/>
    </style:style>
    <style:style style:name="P46" style:family="paragraph" style:parent-style-name="Standard" style:list-style-name="L18"/>
    <style:style style:name="P47" style:family="paragraph" style:parent-style-name="Standard" style:list-style-name="L19"/>
    <style:style style:name="P48" style:family="paragraph" style:parent-style-name="Standard" style:list-style-name="L19">
      <style:text-properties officeooo:paragraph-rsid="00156131"/>
    </style:style>
    <style:style style:name="P49" style:family="paragraph" style:parent-style-name="Standard">
      <style:text-properties officeooo:paragraph-rsid="00156131"/>
    </style:style>
    <style:style style:name="P50" style:family="paragraph" style:parent-style-name="Standard" style:list-style-name="L20"/>
    <style:style style:name="P51" style:family="paragraph" style:parent-style-name="Table_20_Contents">
      <style:text-properties fo:font-weight="bold" style:font-weight-asian="bold" style:font-weight-complex="bold"/>
    </style:style>
    <style:style style:name="P52" style:family="paragraph" style:parent-style-name="Table_20_Contents">
      <style:text-properties officeooo:rsid="0023c3ee" officeooo:paragraph-rsid="0023c3ee"/>
    </style:style>
    <style:style style:name="P53" style:family="paragraph" style:parent-style-name="Standard">
      <style:text-properties style:use-window-font-color="true" loext:opacity="0%" style:text-underline-style="none"/>
    </style:style>
    <style:style style:name="P54" style:family="paragraph" style:parent-style-name="Standard" style:list-style-name="L21"/>
    <style:style style:name="P55" style:family="paragraph" style:parent-style-name="Standard" style:list-style-name="L22"/>
    <style:style style:name="P56" style:family="paragraph" style:parent-style-name="Heading_20_3">
      <style:text-properties style:use-window-font-color="true" loext:opacity="0%" style:text-underline-style="none"/>
    </style:style>
    <style:style style:name="P57" style:family="paragraph" style:parent-style-name="Standard" style:list-style-name="L23"/>
    <style:style style:name="P58" style:family="paragraph" style:parent-style-name="Preformatted_20_Text">
      <style:text-properties style:use-window-font-color="true" loext:opacity="0%" style:text-underline-style="none"/>
    </style:style>
    <style:style style:name="P59" style:family="paragraph" style:parent-style-name="Standard">
      <style:text-properties officeooo:paragraph-rsid="001582a7"/>
    </style:style>
    <style:style style:name="P60" style:family="paragraph" style:parent-style-name="Standard" style:list-style-name="L24"/>
    <style:style style:name="P61" style:family="paragraph" style:parent-style-name="Standard">
      <style:paragraph-properties fo:orphans="2" fo:widows="2"/>
    </style:style>
    <style:style style:name="P62" style:family="paragraph" style:parent-style-name="CodeExampleHeader">
      <style:paragraph-properties fo:orphans="2" fo:widows="2"/>
      <style:text-properties officeooo:paragraph-rsid="002c9164"/>
    </style:style>
    <style:style style:name="P63" style:family="paragraph" style:parent-style-name="Preformatted_20_Text">
      <style:paragraph-properties fo:orphans="2" fo:widows="2"/>
    </style:style>
    <style:style style:name="P64" style:family="paragraph" style:parent-style-name="Text_20_body" style:list-style-name="L25">
      <style:paragraph-properties fo:margin-top="0cm" fo:margin-bottom="0cm" style:contextual-spacing="false"/>
    </style:style>
    <style:style style:name="P65" style:family="paragraph" style:parent-style-name="Text_20_body" style:list-style-name="L25"/>
    <style:style style:name="P66" style:family="paragraph" style:parent-style-name="Text_20_body" style:list-style-name="L26">
      <style:paragraph-properties fo:margin-top="0cm" fo:margin-bottom="0cm" style:contextual-spacing="false"/>
    </style:style>
    <style:style style:name="P67" style:family="paragraph" style:parent-style-name="Text_20_body" style:list-style-name="L26"/>
    <style:style style:name="P68" style:family="paragraph" style:parent-style-name="Text_20_body" style:list-style-name="L27">
      <style:paragraph-properties fo:margin-top="0cm" fo:margin-bottom="0cm" style:contextual-spacing="false"/>
    </style:style>
    <style:style style:name="P69" style:family="paragraph" style:parent-style-name="Text_20_body" style:list-style-name="L27"/>
    <style:style style:name="P70" style:family="paragraph" style:parent-style-name="Text_20_body" style:list-style-name="L28">
      <style:paragraph-properties fo:margin-top="0cm" fo:margin-bottom="0cm" style:contextual-spacing="false"/>
    </style:style>
    <style:style style:name="P71" style:family="paragraph" style:parent-style-name="Text_20_body" style:list-style-name="L28"/>
    <style:style style:name="P72" style:family="paragraph" style:parent-style-name="Heading_20_2">
      <style:paragraph-properties fo:break-before="page"/>
      <style:text-properties officeooo:rsid="0027c038"/>
    </style:style>
    <style:style style:name="P73" style:family="paragraph" style:parent-style-name="Standard">
      <style:text-properties officeooo:paragraph-rsid="0026c639"/>
    </style:style>
    <style:style style:name="P74" style:family="paragraph" style:parent-style-name="CodeExampleHeader">
      <style:text-properties officeooo:paragraph-rsid="0035783c"/>
    </style:style>
    <style:style style:name="P75" style:family="paragraph" style:parent-style-name="Preformatted_20_Text">
      <style:text-properties officeooo:paragraph-rsid="0026c639"/>
    </style:style>
    <style:style style:name="P76" style:family="paragraph" style:parent-style-name="Heading_20_1">
      <style:text-properties officeooo:rsid="0051e031" officeooo:paragraph-rsid="00561a42"/>
    </style:style>
    <style:style style:name="P77" style:family="paragraph" style:parent-style-name="Heading_20_2">
      <style:text-properties officeooo:paragraph-rsid="00561a42"/>
    </style:style>
    <style:style style:name="P78" style:family="paragraph" style:parent-style-name="Standard">
      <style:text-properties style:use-window-font-color="true" loext:opacity="0%" style:text-underline-style="none" officeooo:paragraph-rsid="00561a42"/>
    </style:style>
    <style:style style:name="P79" style:family="paragraph" style:parent-style-name="Standard" style:list-style-name="L29">
      <style:text-properties officeooo:paragraph-rsid="00561a42"/>
    </style:style>
    <style:style style:name="P80" style:family="paragraph" style:parent-style-name="Standard" style:list-style-name="L30">
      <style:text-properties officeooo:paragraph-rsid="00561a42"/>
    </style:style>
    <style:style style:name="P81" style:family="paragraph" style:parent-style-name="Standard" style:list-style-name="L30">
      <style:text-properties style:use-window-font-color="true" loext:opacity="0%" style:text-underline-style="none" officeooo:rsid="00561a42" officeooo:paragraph-rsid="00561a42"/>
    </style:style>
    <style:style style:name="P82" style:family="paragraph" style:parent-style-name="Standard">
      <style:text-properties officeooo:rsid="0051e031" officeooo:paragraph-rsid="00561a42"/>
    </style:style>
    <style:style style:name="P83" style:family="paragraph" style:parent-style-name="Heading_20_3">
      <style:text-properties officeooo:rsid="0051e031" officeooo:paragraph-rsid="00561a42"/>
    </style:style>
    <style:style style:name="P84" style:family="paragraph" style:parent-style-name="CodeExampleHeader">
      <style:text-properties style:use-window-font-color="true" loext:opacity="0%" style:text-underline-style="none" officeooo:paragraph-rsid="00561a42"/>
    </style:style>
    <style:style style:name="P85" style:family="paragraph" style:parent-style-name="Delphi_20_Code">
      <style:text-properties officeooo:paragraph-rsid="00561a42"/>
    </style:style>
    <style:style style:name="P86" style:family="paragraph" style:parent-style-name="Standard">
      <style:text-properties officeooo:paragraph-rsid="00561a42"/>
    </style:style>
    <style:style style:name="P87" style:family="paragraph" style:parent-style-name="Heading_20_2">
      <style:text-properties officeooo:rsid="0051e031" officeooo:paragraph-rsid="00561a42"/>
    </style:style>
    <style:style style:name="P88" style:family="paragraph" style:parent-style-name="Standard">
      <style:text-properties officeooo:rsid="0053b45a" officeooo:paragraph-rsid="00561a42"/>
    </style:style>
    <style:style style:name="P89" style:family="paragraph" style:parent-style-name="Standard">
      <style:text-properties officeooo:rsid="005554e8" officeooo:paragraph-rsid="00561a42"/>
    </style:style>
    <style:style style:name="P90" style:family="paragraph" style:parent-style-name="Delphi_20_Code">
      <style:text-properties officeooo:paragraph-rsid="006fd82a"/>
    </style:style>
    <style:style style:name="P91" style:family="paragraph" style:parent-style-name="CodeExampleHeader">
      <style:text-properties style:use-window-font-color="true" loext:opacity="0%" style:text-underline-style="none" officeooo:paragraph-rsid="002c9164"/>
    </style:style>
    <style:style style:name="P92" style:family="paragraph" style:parent-style-name="Heading_20_1">
      <style:text-properties officeooo:rsid="002dd1fe" officeooo:paragraph-rsid="002dd1fe"/>
    </style:style>
    <style:style style:name="P93" style:family="paragraph" style:parent-style-name="Heading_20_2">
      <style:text-properties officeooo:rsid="00643a95" officeooo:paragraph-rsid="00643a95"/>
    </style:style>
    <style:style style:name="P94" style:family="paragraph" style:parent-style-name="Standard" style:list-style-name="L31">
      <style:text-properties officeooo:rsid="00643a95" officeooo:paragraph-rsid="00643a95"/>
    </style:style>
    <style:style style:name="P95" style:family="paragraph" style:parent-style-name="Heading_20_2">
      <style:text-properties officeooo:rsid="002dd1fe" officeooo:paragraph-rsid="002dd1fe"/>
    </style:style>
    <style:style style:name="P96" style:family="paragraph" style:parent-style-name="Standard">
      <style:text-properties officeooo:paragraph-rsid="0081fa86"/>
    </style:style>
    <style:style style:name="P97" style:family="paragraph" style:parent-style-name="Standard">
      <style:text-properties fo:font-weight="bold" style:font-weight-asian="bold" style:font-weight-complex="bold"/>
    </style:style>
    <style:style style:name="P98" style:family="paragraph" style:parent-style-name="Standard" style:list-style-name="L32"/>
    <style:style style:name="P99" style:family="paragraph" style:parent-style-name="Standard" style:list-style-name="L33"/>
    <style:style style:name="P100" style:family="paragraph" style:parent-style-name="Heading_20_2">
      <style:text-properties officeooo:rsid="0013fab0" officeooo:paragraph-rsid="0013fab0"/>
    </style:style>
    <style:style style:name="P101" style:family="paragraph" style:parent-style-name="Standard">
      <style:text-properties officeooo:rsid="0013fab0" officeooo:paragraph-rsid="0013fab0"/>
    </style:style>
    <style:style style:name="P102" style:family="paragraph" style:parent-style-name="Standard">
      <style:text-properties officeooo:rsid="008d3d57" officeooo:paragraph-rsid="008d3d57"/>
    </style:style>
    <style:style style:name="P103" style:family="paragraph" style:parent-style-name="Standard" style:list-style-name="L34"/>
    <style:style style:name="P104" style:family="paragraph" style:parent-style-name="Standard" style:list-style-name="L35"/>
    <style:style style:name="P105" style:family="paragraph" style:parent-style-name="List_20_Indent" style:list-style-name="L35">
      <style:text-properties fo:font-weight="normal" style:font-weight-asian="normal" style:font-weight-complex="normal"/>
    </style:style>
    <style:style style:name="P106" style:family="paragraph" style:parent-style-name="Standard">
      <style:paragraph-properties fo:padding="0.049cm" fo:border="0.06pt solid #000000" style:shadow="none"/>
      <style:text-properties style:font-name="Consolas" fo:font-weight="normal" style:font-weight-asian="normal" style:font-weight-complex="normal"/>
    </style:style>
    <style:style style:name="P107" style:family="paragraph" style:parent-style-name="Standard">
      <style:paragraph-properties fo:padding="0.049cm" fo:border="0.06pt solid #000000" style:shadow="none"/>
    </style:style>
    <style:style style:name="P108" style:family="paragraph" style:parent-style-name="Standard">
      <style:text-properties officeooo:paragraph-rsid="00655b8e"/>
    </style:style>
    <style:style style:name="P109" style:family="paragraph" style:parent-style-name="Footnote">
      <style:text-properties officeooo:paragraph-rsid="0020b0e2"/>
    </style:style>
    <style:style style:name="P110" style:family="paragraph" style:parent-style-name="Standard">
      <style:text-properties officeooo:paragraph-rsid="001bd31e"/>
    </style:style>
    <style:style style:name="P111" style:family="paragraph" style:parent-style-name="Index_20_1">
      <style:paragraph-properties>
        <style:tab-stops>
          <style:tab-stop style:position="8.149cm" style:type="right" style:leader-style="dotted" style:leader-text="."/>
        </style:tab-stops>
      </style:paragraph-properties>
    </style:style>
    <style:style style:name="P112" style:family="paragraph" style:parent-style-name="Standard">
      <style:paragraph-properties fo:break-before="page"/>
    </style:style>
    <style:style style:name="P113" style:family="paragraph" style:parent-style-name="Table_20_index_20_1">
      <style:paragraph-properties>
        <style:tab-stops>
          <style:tab-stop style:position="16.999cm" style:type="right" style:leader-style="dotted" style:leader-text="."/>
        </style:tab-stops>
      </style:paragraph-properties>
    </style:style>
    <style:style style:name="P114" style:family="paragraph" style:parent-style-name="Illustration_20_Index_20_1">
      <style:paragraph-properties>
        <style:tab-stops>
          <style:tab-stop style:position="16.999cm" style:type="right" style:leader-style="dotted" style:leader-text="."/>
        </style:tab-stops>
      </style:paragraph-properties>
    </style:style>
    <style:style style:name="T1" style:family="text">
      <style:text-properties officeooo:rsid="0081fa86"/>
    </style:style>
    <style:style style:name="T2" style:family="text">
      <style:text-properties style:font-name="Verdana1" fo:font-size="10.5pt" style:font-name-asian="Verdana1" style:font-size-asian="10.5pt" style:font-name-complex="Verdana1" style:font-size-complex="10.5pt"/>
    </style:style>
    <style:style style:name="T3" style:family="text">
      <style:text-properties fo:font-weight="bold"/>
    </style:style>
    <style:style style:name="T4" style:family="text">
      <style:text-properties officeooo:rsid="007db254"/>
    </style:style>
    <style:style style:name="T5" style:family="text">
      <style:text-properties style:font-name="Verdana1" fo:font-size="10.5pt" officeooo:rsid="002a4c3c" style:font-name-asian="Verdana1" style:font-size-asian="10.5pt" style:font-name-complex="Verdana1" style:font-size-complex="10.5pt"/>
    </style:style>
    <style:style style:name="T6" style:family="text">
      <style:text-properties officeooo:rsid="002a4c3c"/>
    </style:style>
    <style:style style:name="T7" style:family="text">
      <style:text-properties fo:font-weight="normal" style:font-weight-asian="normal" style:font-weight-complex="normal"/>
    </style:style>
    <style:style style:name="T8" style:family="text">
      <style:text-properties fo:font-weight="normal" officeooo:rsid="007ec111" style:font-weight-asian="normal" style:font-weight-complex="normal"/>
    </style:style>
    <style:style style:name="T9" style:family="text">
      <style:text-properties fo:font-weight="normal" officeooo:rsid="00775a24" style:font-weight-asian="normal" style:font-weight-complex="normal"/>
    </style:style>
    <style:style style:name="T10" style:family="text">
      <style:text-properties officeooo:rsid="0013fab0"/>
    </style:style>
    <style:style style:name="T11" style:family="text">
      <style:text-properties style:font-name="Consolas" fo:font-size="10.5pt" style:font-name-asian="Verdana1" style:font-size-asian="10.5pt" style:font-name-complex="Verdana1" style:font-size-complex="10.5pt"/>
    </style:style>
    <style:style style:name="T12" style:family="text">
      <style:text-properties style:font-name="Consolas" fo:font-size="10.5pt" fo:font-weight="normal" style:font-name-asian="Verdana1" style:font-size-asian="10.5pt" style:font-weight-asian="normal" style:font-name-complex="Verdana1" style:font-size-complex="10.5pt" style:font-weight-complex="normal"/>
    </style:style>
    <style:style style:name="T13" style:family="text">
      <style:text-properties style:font-name="Consolas"/>
    </style:style>
    <style:style style:name="T14" style:family="text">
      <style:text-properties fo:font-weight="normal" officeooo:rsid="00624c69" style:font-weight-asian="normal" style:font-weight-complex="normal"/>
    </style:style>
    <style:style style:name="T15" style:family="text">
      <style:text-properties officeooo:rsid="00775a24"/>
    </style:style>
    <style:style style:name="T16" style:family="text">
      <style:text-properties style:font-name="Consolas" fo:font-size="10.5pt" officeooo:rsid="002a4c3c" style:font-name-asian="Verdana1" style:font-size-asian="10.5pt" style:font-name-complex="Verdana1" style:font-size-complex="10.5pt"/>
    </style:style>
    <style:style style:name="T17" style:family="text">
      <style:text-properties fo:font-weight="bold" style:font-weight-asian="bold" style:font-weight-complex="bold"/>
    </style:style>
    <style:style style:name="T18" style:family="text">
      <style:text-properties officeooo:rsid="001bb1c5"/>
    </style:style>
    <style:style style:name="T19" style:family="text">
      <style:text-properties fo:font-style="italic" style:font-style-asian="italic" style:font-style-complex="italic"/>
    </style:style>
    <style:style style:name="T20" style:family="text">
      <style:text-properties officeooo:rsid="00508d9b"/>
    </style:style>
    <style:style style:name="T21" style:family="text">
      <style:text-properties style:font-name="Consolas" fo:font-weight="normal" style:font-weight-asian="normal" style:font-weight-complex="normal"/>
    </style:style>
    <style:style style:name="T22" style:family="text">
      <style:text-properties officeooo:rsid="00156131"/>
    </style:style>
    <style:style style:name="T23" style:family="text">
      <style:text-properties officeooo:rsid="00561a42"/>
    </style:style>
    <style:style style:name="T24" style:family="text">
      <style:text-properties style:use-window-font-color="true" loext:opacity="0%" style:text-underline-style="none"/>
    </style:style>
    <style:style style:name="T25" style:family="text">
      <style:text-properties style:use-window-font-color="true" loext:opacity="0%" style:text-underline-style="none" officeooo:rsid="00561a42"/>
    </style:style>
    <style:style style:name="T26" style:family="text">
      <style:text-properties style:use-window-font-color="true" loext:opacity="0%" style:text-underline-style="none" fo:font-weight="bold" style:font-weight-asian="bold" style:font-weight-complex="bold"/>
    </style:style>
    <style:style style:name="T27" style:family="text">
      <style:text-properties style:use-window-font-color="true" loext:opacity="0%" style:text-underline-style="none" officeooo:rsid="002a4c3c"/>
    </style:style>
    <style:style style:name="T28" style:family="text">
      <style:text-properties fo:font-family="SimSun" style:font-family-generic="modern" fo:font-size="12pt" style:font-family-asian="SimSun" style:font-family-generic-asian="modern" style:font-size-asian="12pt" style:font-family-complex="SimSun" style:font-family-generic-complex="modern" style:font-size-complex="12pt"/>
    </style:style>
    <style:style style:name="T29" style:family="text">
      <style:text-properties fo:font-style="normal" fo:font-weight="bold" style:font-style-asian="normal" style:font-weight-asian="bold" style:font-style-complex="normal" style:font-weight-complex="bold"/>
    </style:style>
    <style:style style:name="T30" style:family="text">
      <style:text-properties officeooo:rsid="0051e031"/>
    </style:style>
    <style:style style:name="T31" style:family="text">
      <style:text-properties style:use-window-font-color="true" loext:opacity="0%" fo:font-style="italic" style:text-underline-style="none" style:font-style-asian="italic" style:font-style-complex="italic"/>
    </style:style>
    <style:style style:name="T32" style:family="text">
      <style:text-properties style:use-window-font-color="true" loext:opacity="0%" style:text-underline-style="none" fo:font-weight="normal" style:font-weight-asian="normal" style:font-weight-complex="normal"/>
    </style:style>
    <style:style style:name="T33" style:family="text">
      <style:text-properties style:font-name="Verdana1" fo:font-size="10.5pt" style:font-size-asian="10.5pt" style:font-size-complex="10.5pt"/>
    </style:style>
    <style:style style:name="T34" style:family="text">
      <style:text-properties style:font-name="Verdana1" fo:font-size="10.5pt" fo:font-style="italic" style:font-size-asian="10.5pt" style:font-style-asian="italic" style:font-size-complex="10.5pt" style:font-style-complex="italic"/>
    </style:style>
    <style:style style:name="T35" style:family="text">
      <style:text-properties style:font-name="Verdana1" fo:font-size="10.5pt" fo:font-weight="bold" style:font-size-asian="10.5pt" style:font-size-complex="10.5pt"/>
    </style:style>
    <style:style style:name="T36" style:family="text">
      <style:text-properties officeooo:rsid="0065415b"/>
    </style:style>
    <style:style style:name="T37" style:family="text">
      <style:text-properties officeooo:rsid="003f8361"/>
    </style:style>
    <style:style style:name="T38" style:family="text">
      <style:text-properties style:font-name="Consolas" fo:font-weight="bold" style:font-weight-asian="bold" style:font-weight-complex="bold"/>
    </style:style>
    <style:style style:name="T39" style:family="text">
      <style:text-properties officeooo:rsid="0069175f"/>
    </style:style>
    <style:style style:name="T40" style:family="text">
      <style:text-properties officeooo:rsid="00655b8e"/>
    </style:style>
    <style:style style:name="T41" style:family="text">
      <style:text-properties officeooo:rsid="0020b0e2"/>
    </style:style>
    <style:style style:name="T42" style:family="text">
      <style:text-properties officeooo:rsid="002472f9"/>
    </style:style>
    <style:style style:name="T43" style:family="text">
      <style:text-properties officeooo:rsid="001431dd"/>
    </style:style>
    <style:style style:name="T44" style:family="text">
      <style:text-properties officeooo:rsid="00789da4"/>
    </style:style>
    <style:style style:name="T45" style:family="text">
      <style:text-properties officeooo:rsid="001bd31e"/>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loext:rel-width-rel="paragraph"/>
    </style:style>
    <style:style style:name="fr2"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Frame">
      <style:graphic-properties style:wrap="none" style:vertical-pos="top" style:vertical-rel="paragraph" style:horizontal-pos="center" style:horizontal-rel="paragraph"/>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editable="false">
        <style:columns fo:column-count="2" fo:column-gap="0.699cm">
          <style:column-sep style:width="0.002cm" style:color="#000000" style:height="95%" style:style="solid" style:vertical-align="middle"/>
          <style:column style:rel-width="32767*" fo:start-indent="0cm" fo:end-indent="0.349cm"/>
          <style:column style:rel-width="32768*" fo:start-indent="0.349cm" fo:end-indent="0cm"/>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space-before="0.635cm" text:min-label-width="0.635cm"/>
        <style:text-properties style:font-name="StarSymbol"/>
      </text:list-level-style-bullet>
      <text:list-level-style-bullet text:level="2" text:style-name="Bullet_20_Symbols" loext:num-list-format="%2%" text:bullet-char="○">
        <style:list-level-properties text:space-before="1.27cm" text:min-label-width="0.635cm"/>
        <style:text-properties style:font-name="StarSymbol"/>
      </text:list-level-style-bullet>
      <text:list-level-style-bullet text:level="3" text:style-name="Bullet_20_Symbols" loext:num-list-format="%3%" text:bullet-char="■">
        <style:list-level-properties text:space-before="1.905cm" text:min-label-width="0.635cm"/>
        <style:text-properties style:font-name="StarSymbol"/>
      </text:list-level-style-bullet>
      <text:list-level-style-bullet text:level="4" text:style-name="Bullet_20_Symbols" loext:num-list-format="%4%" text:bullet-char="●">
        <style:list-level-properties text:space-before="2.54cm" text:min-label-width="0.635cm"/>
        <style:text-properties style:font-name="StarSymbol"/>
      </text:list-level-style-bullet>
      <text:list-level-style-bullet text:level="5" text:style-name="Bullet_20_Symbols" loext:num-list-format="%5%" text:bullet-char="○">
        <style:list-level-properties text:space-before="3.175cm" text:min-label-width="0.635cm"/>
        <style:text-properties style:font-name="StarSymbol"/>
      </text:list-level-style-bullet>
      <text:list-level-style-bullet text:level="6" text:style-name="Bullet_20_Symbols" loext:num-list-format="%6%" text:bullet-char="■">
        <style:list-level-properties text:space-before="3.81cm" text:min-label-width="0.635cm"/>
        <style:text-properties style:font-name="StarSymbol"/>
      </text:list-level-style-bullet>
      <text:list-level-style-bullet text:level="7" text:style-name="Bullet_20_Symbols" loext:num-list-format="%7%" text:bullet-char="●">
        <style:list-level-properties text:space-before="4.445cm" text:min-label-width="0.635cm"/>
        <style:text-properties style:font-name="StarSymbol"/>
      </text:list-level-style-bullet>
      <text:list-level-style-bullet text:level="8" text:style-name="Bullet_20_Symbols" loext:num-list-format="%8%" text:bullet-char="○">
        <style:list-level-properties text:space-before="5.08cm" text:min-label-width="0.635cm"/>
        <style:text-properties style:font-name="StarSymbol"/>
      </text:list-level-style-bullet>
      <text:list-level-style-bullet text:level="9" text:style-name="Bullet_20_Symbols" loext:num-list-format="%9%" text:bullet-char="■">
        <style:list-level-properties text:space-before="5.715cm" text:min-label-width="0.635cm"/>
        <style:text-properties style:font-name="StarSymbol"/>
      </text:list-level-style-bullet>
      <text:list-level-style-bullet text:level="10" text:style-name="Bullet_20_Symbols" loext:num-list-format="%10%" text:bullet-char="●">
        <style:list-level-properties text:space-before="6.35cm" text:min-label-width="0.635cm"/>
        <style:text-properties style:font-name="Star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401cm" fo:text-indent="-0.635cm" fo:margin-left="1.40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36cm" fo:text-indent="-0.635cm" fo:margin-left="2.03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71cm" fo:text-indent="-0.635cm" fo:margin-left="2.67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306cm" fo:text-indent="-0.635cm" fo:margin-left="3.30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41cm" fo:text-indent="-0.635cm" fo:margin-left="3.94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76cm" fo:text-indent="-0.635cm" fo:margin-left="4.57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11cm" fo:text-indent="-0.635cm" fo:margin-left="5.21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46cm" fo:text-indent="-0.635cm" fo:margin-left="5.84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81cm" fo:text-indent="-0.635cm" fo:margin-left="6.48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16cm" fo:text-indent="-0.635cm" fo:margin-left="7.116cm"/>
        </style:list-level-properties>
      </text:list-level-style-bullet>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7">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8">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401cm" fo:text-indent="-0.635cm" fo:margin-left="1.40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36cm" fo:text-indent="-0.635cm" fo:margin-left="2.03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71cm" fo:text-indent="-0.635cm" fo:margin-left="2.67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306cm" fo:text-indent="-0.635cm" fo:margin-left="3.30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41cm" fo:text-indent="-0.635cm" fo:margin-left="3.94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76cm" fo:text-indent="-0.635cm" fo:margin-left="4.57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11cm" fo:text-indent="-0.635cm" fo:margin-left="5.21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46cm" fo:text-indent="-0.635cm" fo:margin-left="5.84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81cm" fo:text-indent="-0.635cm" fo:margin-left="6.48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16cm" fo:text-indent="-0.635cm" fo:margin-left="7.116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xlink:href="../../../../../search/index.html" xlink:type="simple">
          <form:properties>
            <form:property form:property-name="PropertyChangeNotificationEnabled" office:value-type="boolean" office:boolean-value="true"/>
          </form:properties>
        </form:form>
        <form:form form:name="form" form:apply-filter="true" form:control-implementation="ooo:com.sun.star.form.component.Form" office:target-frame="" xlink:href="http://www.infoworld.com/newsletters/subscribe?showlist=infoworld_java&amp;source=jwnla_freenltmod"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alphabetical-index-auto-mark-file xlink:href="../HabariWebComponentsGettingStarted.sdi"/>
      <text:p text:style-name="P1"><draw:frame draw:style-name="fr1" draw:name="Bild1" text:anchor-type="paragraph" svg:width="5.95cm" style:rel-width="35%" svg:height="1.785cm" style:rel-height="scale" draw:z-index="10"><draw:image xlink:href="Pictures/1000000000000267000000BAAC8003A9.png" xlink:type="simple" xlink:show="embed" xlink:actuate="onLoad" draw:mime-type="image/png"/></draw:frame>Getting started with</text:p>
      <text:p text:style-name="P2"><text:title>Daraja HTTP Framework</text:title></text:p>
      <text:p text:style-name="P3"><text:keywords>3.1.0</text:keywords></text:p>
      <text:table-of-content text:style-name="Sect1" text:protected="true" text:name="Inhaltsverzeichnis2">
        <text:table-of-content-source text:outline-level="3">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2_Head" text:protected="true">
            <text:p text:style-name="P4">Contents</text:p>
          </text:index-title>
          <text:p text:style-name="P5">Tutorial<text:tab/>4</text:p>
          <text:p text:style-name="P6">Creating a “Hello, World!” application<text:tab/>4</text:p>
          <text:p text:style-name="P7">Project Setup<text:tab/>4</text:p>
          <text:p text:style-name="P7">Creating the main unit<text:tab/>4</text:p>
          <text:p text:style-name="P7">Create the server configuration and start-up code<text:tab/>5</text:p>
          <text:p text:style-name="P7">Compiling and Running the Application<text:tab/>6</text:p>
          <text:p text:style-name="P7">Testing the Application<text:tab/>6</text:p>
          <text:p text:style-name="P7">Terminating the HTTP server<text:tab/>6</text:p>
          <text:p text:style-name="P6">Developing an HTTP Session application<text:tab/>7</text:p>
          <text:p text:style-name="P7">Project Setup<text:tab/>7</text:p>
          <text:p text:style-name="P7">Creating the Web Component<text:tab/>7</text:p>
          <text:p text:style-name="P7">Create the server configuration and start-up code<text:tab/>8</text:p>
          <text:p text:style-name="P7">Compiling and Running the Application<text:tab/>9</text:p>
          <text:p text:style-name="P7">Testing the Application<text:tab/>9</text:p>
          <text:p text:style-name="P7">Terminating the HTTP server<text:tab/>9</text:p>
          <text:p text:style-name="P6">Multiple Url Mappings of a Web Component<text:tab/>9</text:p>
          <text:p text:style-name="P7">Project Setup<text:tab/>10</text:p>
          <text:p text:style-name="P7">Creating the Web Component<text:tab/>10</text:p>
          <text:p text:style-name="P7">Create the server configuration and start-up code<text:tab/>11</text:p>
          <text:p text:style-name="P7">Compiling and Running the Application<text:tab/>12</text:p>
          <text:p text:style-name="P7">Testing the Application<text:tab/>12</text:p>
          <text:p text:style-name="P7">Terminating the HTTP server<text:tab/>13</text:p>
          <text:p text:style-name="P5">Installation<text:tab/>14</text:p>
          <text:p text:style-name="P6">Requirements<text:tab/>14</text:p>
          <text:p text:style-name="P7">Development Environment<text:tab/>14</text:p>
          <text:p text:style-name="P6">IDE and project configuration<text:tab/>14</text:p>
          <text:p text:style-name="P7">Option 1: configure source code paths<text:tab/>14</text:p>
          <text:p text:style-name="P7">Option 2: compiled units<text:tab/>14</text:p>
          <text:p text:style-name="P7">Official Indy installation instructions<text:tab/>15</text:p>
          <text:p text:style-name="P6">Conditional Symbols<text:tab/>15</text:p>
          <text:p text:style-name="P5">Introduction to Web Components<text:tab/>16</text:p>
          <text:p text:style-name="P6">General structure<text:tab/>16</text:p>
          <text:p text:style-name="P7">Example<text:tab/>16</text:p>
          <text:p text:style-name="P6">Web Application Context<text:tab/>17</text:p>
          <text:p text:style-name="P6">Path Mapping<text:tab/>17</text:p>
          <text:p text:style-name="P7">Mapping rules<text:tab/>17</text:p>
          <text:p text:style-name="P6">Setting parameters of a context<text:tab/>19</text:p>
          <text:p text:style-name="P6">Unicode (UTF-8)<text:tab/>19</text:p>
          <text:p text:style-name="P6">HTML Encoding of special characters<text:tab/>20</text:p>
          <text:p text:style-name="P5">Introduction to Web Filters<text:tab/>21</text:p>
          <text:p text:style-name="P6">General structure<text:tab/>21</text:p>
          <text:p text:style-name="P6"><text:soft-page-break/>Declaration of DoFilter<text:tab/>21</text:p>
          <text:p text:style-name="P7">Example: add text to the response<text:tab/>21</text:p>
          <text:p text:style-name="P6">Declaration of an initialization method<text:tab/>22</text:p>
          <text:p text:style-name="P7">Example: add an initialization parameter value to the response<text:tab/>22</text:p>
          <text:p text:style-name="P5">Web Components and multi-threading<text:tab/>24</text:p>
          <text:p text:style-name="P6">Design rules for your Web Components<text:tab/>24</text:p>
          <text:p text:style-name="P7">Design for multi-threaded operation<text:tab/>24</text:p>
          <text:p text:style-name="P7">Synchronization<text:tab/>25</text:p>
          <text:p text:style-name="P6">Web Components thread implementation<text:tab/>25</text:p>
          <text:p text:style-name="P7">Q: Are Web Components multi-threaded?<text:tab/>25</text:p>
          <text:p text:style-name="P5">Appendix<text:tab/>27</text:p>
          <text:p text:style-name="P6">Breaking Changes<text:tab/>27</text:p>
          <text:p text:style-name="P7">Breaking Changes in v 3.0<text:tab/>27</text:p>
          <text:p text:style-name="P6">Frequently Asked Questions<text:tab/>27</text:p>
          <text:p text:style-name="P7">How do I allow connections from other computers?<text:tab/>27</text:p>
          <text:p text:style-name="P7">Why does the server fail to run with “port already in use” error?<text:tab/>27</text:p>
          <text:p text:style-name="P5">Advanced Topics<text:tab/>29</text:p>
          <text:p text:style-name="P6">Exception stack traces<text:tab/>29</text:p>
          <text:p text:style-name="P7">Stack traces with madExcept<text:tab/>29</text:p>
          <text:p text:style-name="P7">Stack traces with JclDebug<text:tab/>30</text:p>
          <text:p text:style-name="P6">Configuration of internal Indy HTTP Server<text:tab/>30</text:p>
          <text:p text:style-name="P7">MaxConnections example<text:tab/>30</text:p>
          <text:p text:style-name="P7">Thread pool example<text:tab/>30</text:p>
          <text:p text:style-name="P7">Interceptor example<text:tab/>31</text:p>
          <text:p text:style-name="P6">SLF4P support<text:tab/>32</text:p>
          <text:p text:style-name="P7">IDE configuration<text:tab/>32</text:p>
          <text:p text:style-name="P5">Unit Tests<text:tab/>33</text:p>
          <text:p text:style-name="P6">Expected Exceptions<text:tab/>33</text:p>
          <text:p text:style-name="P5">Example Web Components<text:tab/>34</text:p>
          <text:p text:style-name="P6">TdjDefaultWebComponent<text:tab/>34</text:p>
          <text:p text:style-name="P6">TdjNCSALogFilter<text:tab/>34</text:p>
          <text:p text:style-name="P6">TdjStatisticsFilter<text:tab/>35</text:p>
          <text:p text:style-name="P5">Other optional units<text:tab/>36</text:p>
          <text:p text:style-name="P6">ShutdownHelper<text:tab/>36</text:p>
          <text:p text:style-name="P5">Third-Party Product Licenses<text:tab/>37</text:p>
          <text:p text:style-name="P7">Internet Direct (Indy)<text:tab/>37</text:p>
          <text:p text:style-name="P5">Index<text:tab/>38</text:p>
        </text:index-body>
      </text:table-of-content>
      <text:h text:style-name="P8" text:outline-level="1"/>
      <text:h text:style-name="P9" text:outline-level="1"><text:bookmark-start text:name="__RefHeading___Toc4034_661956188"/>Tutorial<text:bookmark-end text:name="__RefHeading___Toc4034_661956188"/></text:h>
      <text:h text:style-name="Heading_20_2" text:outline-level="2"><text:bookmark-start text:name="__RefHeading___Toc4036_661956188"/><text:span text:style-name="T1">Creating a </text:span>“Hello, World!” application<text:bookmark-end text:name="__RefHeading___Toc4036_661956188"/></text:h>
      <text:p text:style-name="Standard">The following short tutorial takes you through some of the basic steps of developing a “Hello, World!” example<text:span text:style-name="T2">. </text:span>This tutorial assumes you already have some familiarity with developing Delphi applications.</text:p>
      <text:p text:style-name="Standard">You will create an application that runs a HTTP server on the local computer and serves requests for the resource <text:span text:style-name="FlowSource">http://127.0.0.1/tutorial/hello</text:span>.</text:p>
      <text:p text:style-name="Standard">This tutorial takes approximately 10 minutes to complete.</text:p>
      <text:p text:style-name="Standard"><text:span text:style-name="T3">To complete this tutorial, you need the software and resources listed in the following table.</text:span> </text:p>
      <text:list xml:id="list828335949" text:style-name="L1">
        <text:list-item>
          <text:p text:style-name="P10"><text:span text:style-name="T2"><text:title>Daraja HTTP Framework</text:title></text:span><text:span text:style-name="T2"><text:s/></text:span><text:span text:style-name="T2"><text:keywords>3.1.0</text:keywords></text:span></text:p>
        </text:list-item>
        <text:list-item>
          <text:p text:style-name="P11">Indy 10.6</text:p>
        </text:list-item>
        <text:list-item>
          <text:p text:style-name="P11">Delphi 2009</text:p>
        </text:list-item>
      </text:list>
      <text:h text:style-name="P12" text:outline-level="3"><text:bookmark-start text:name="__RefHeading___Toc4038_661956188"/>Project Setup<text:bookmark-end text:name="__RefHeading___Toc4038_661956188"/></text:h>
      <text:p text:style-name="P13">The application you create will contain one Delphi project, which is a console program.</text:p>
      <text:list text:style-name="L2">
        <text:list-item>
          <text:p text:style-name="P14">in the IDE, use the project wizard to create a new console line application project</text:p>
        </text:list-item>
        <text:list-item>
          <text:p text:style-name="P15"><text:span text:style-name="T2">add the path to the </text:span><text:span text:style-name="FlowSource">&lt;inst&gt;\source</text:span><text:span text:style-name="T2"> folder to the project search path</text:span></text:p>
        </text:list-item>
        <text:list-item>
          <text:p text:style-name="P15"><text:span text:style-name="T2">save the project as </text:span><text:span text:style-name="FlowSource">HelloWorldServer</text:span></text:p>
        </text:list-item>
      </text:list>
      <text:h text:style-name="P12" text:outline-level="3"><text:bookmark-start text:name="__RefHeading___Toc4040_661956188"/>Creating the <text:span text:style-name="T4">main unit</text:span><text:bookmark-end text:name="__RefHeading___Toc4040_661956188"/></text:h>
      <text:p text:style-name="P16">The <text:span text:style-name="T4">main unit declares a web component, and a Demo procedure which configures and starts the server.</text:span></text:p>
      <text:list text:style-name="L3">
        <text:list-item>
          <text:p text:style-name="P17">create a unit with the code below and save it as <text:span text:style-name="Source_20_Text"><text:span text:style-name="T4">MainUnit</text:span></text:span><text:span text:style-name="Source_20_Text">.pas</text:span></text:p>
        </text:list-item>
      </text:list>
      <text:p text:style-name="P18"><text:span text:style-name="FlowSource"><text:span text:style-name="T5">Code ex</text:span></text:span><text:span text:style-name="FlowSource"><text:span text:style-name="T2">ample</text:span></text:span></text:p>
      <text:p text:style-name="P19"/>
      <text:p text:style-name="SourceCode">unit MainUnit;</text:p>
      <text:p text:style-name="SourceCode"/>
      <text:p text:style-name="SourceCode">interface</text:p>
      <text:p text:style-name="SourceCode"/>
      <text:p text:style-name="SourceCode">procedure Demo;</text:p>
      <text:p text:style-name="SourceCode"><text:soft-page-break/></text:p>
      <text:p text:style-name="SourceCode">implementation</text:p>
      <text:p text:style-name="SourceCode"/>
      <text:p text:style-name="SourceCode">uses</text:p>
      <text:p text:style-name="SourceCode"><text:s text:c="2"/>djWebComponent, djServer, djWebAppContext, djTypes;</text:p>
      <text:p text:style-name="SourceCode"/>
      <text:p text:style-name="SourceCode">type</text:p>
      <text:p text:style-name="SourceCode"><text:s text:c="2"/>THelloWorldResource = class(TdjWebComponent)</text:p>
      <text:p text:style-name="SourceCode"><text:s text:c="2"/>public</text:p>
      <text:p text:style-name="SourceCode"><text:s text:c="4"/>procedure OnGet(Request: TdjRequest; Response: TdjResponse); override;</text:p>
      <text:p text:style-name="SourceCode"><text:s text:c="2"/>end;</text:p>
      <text:p text:style-name="SourceCode"/>
      <text:p text:style-name="SourceCode">procedure THelloWorldResource.OnGet(Request: TdjRequest; Response: TdjResponse);</text:p>
      <text:p text:style-name="SourceCode">begin</text:p>
      <text:p text:style-name="SourceCode"><text:s text:c="2"/>Response.ContentText := 'Hello, World!';</text:p>
      <text:p text:style-name="SourceCode"><text:s text:c="2"/>Response.ContentType := 'text/plain';</text:p>
      <text:p text:style-name="SourceCode">end;</text:p>
      <text:p text:style-name="SourceCode"/>
      <text:p text:style-name="SourceCode">procedure Demo;</text:p>
      <text:p text:style-name="SourceCode">var</text:p>
      <text:p text:style-name="SourceCode"><text:s text:c="2"/>Server: TdjServer;</text:p>
      <text:p text:style-name="SourceCode"><text:s text:c="2"/>Context: TdjWebAppContext;</text:p>
      <text:p text:style-name="SourceCode">begin</text:p>
      <text:p text:style-name="SourceCode"><text:s text:c="2"/>Server := TdjServer.Create<text:span text:style-name="T1">(80)</text:span>;</text:p>
      <text:p text:style-name="SourceCode"><text:s text:c="2"/>try</text:p>
      <text:p text:style-name="SourceCode"><text:s text:c="4"/>Context := TdjWebAppContext.Create('tutorial');</text:p>
      <text:p text:style-name="SourceCode"><text:s text:c="4"/>Context.Add(THelloWorldResource, '/hello');</text:p>
      <text:p text:style-name="SourceCode"><text:s text:c="4"/>Server.Add(Context);</text:p>
      <text:p text:style-name="SourceCode"><text:s text:c="4"/>Server.Start;</text:p>
      <text:p text:style-name="SourceCode"><text:s text:c="4"/>WriteLn('Server is running, please open http://127.0.0.1/tutorial/hello');</text:p>
      <text:p text:style-name="SourceCode"><text:s text:c="4"/>WriteLn('Hit enter to terminate.');</text:p>
      <text:p text:style-name="SourceCode"><text:s text:c="4"/>ReadLn;</text:p>
      <text:p text:style-name="SourceCode"><text:s text:c="2"/>finally</text:p>
      <text:p text:style-name="SourceCode"><text:s text:c="4"/>Server.Free;</text:p>
      <text:p text:style-name="SourceCode"><text:s text:c="2"/>end;</text:p>
      <text:p text:style-name="SourceCode">end; </text:p>
      <text:h text:style-name="P12" text:outline-level="3"><text:bookmark-start text:name="__RefHeading___Toc4042_661956188"/>Create the server configuration and start-up code<text:bookmark-end text:name="__RefHeading___Toc4042_661956188"/></text:h>
      <text:list text:style-name="L4">
        <text:list-item>
          <text:p text:style-name="P20">open the <text:span text:style-name="FlowSource">HelloWorldServer.dpr</text:span> application project file </text:p>
        </text:list-item>
        <text:list-item>
          <text:p text:style-name="P20">paste the code shown below</text:p>
        </text:list-item>
      </text:list>
      <text:p text:style-name="P18"><text:span text:style-name="T6">Code ex</text:span>ample</text:p>
      <text:p text:style-name="SourceCode">program HelloWorldServer;</text:p>
      <text:p text:style-name="SourceCode"/>
      <text:p text:style-name="SourceCode">{$APPTYPE CONSOLE}</text:p>
      <text:p text:style-name="SourceCode"/>
      <text:p text:style-name="P21">uses</text:p>
      <text:p text:style-name="SourceCode"><text:s text:c="2"/>MainUnit in 'MainUnit.pas';</text:p>
      <text:p text:style-name="SourceCode"/>
      <text:p text:style-name="SourceCode">begin</text:p>
      <text:p text:style-name="SourceCode"><text:s text:c="2"/>Demo;</text:p>
      <text:p text:style-name="SourceCode">end.</text:p>
      <text:h text:style-name="Heading_20_3" text:outline-level="3"><text:bookmark-start text:name="__RefHeading___Toc4044_661956188"/><text:soft-page-break/>Compiling and Running the Application<text:bookmark-end text:name="__RefHeading___Toc4044_661956188"/></text:h>
      <text:list text:style-name="L5">
        <text:list-item>
          <text:p text:style-name="P22">In the IDE, press F9 to start the application</text:p>
        </text:list-item>
      </text:list>
      <text:p text:style-name="Standard">Note: depending on your system, a firewall warning can appear, notifying you that the program tries to open a server port.</text:p>
      <text:h text:style-name="Heading_20_3" text:outline-level="3"><text:bookmark-start text:name="__RefHeading___Toc4046_661956188"/>Testing the Application<text:bookmark-end text:name="__RefHeading___Toc4046_661956188"/></text:h>
      <text:p text:style-name="P23">To test the server, open a web browser and navigate to <text:a xlink:type="simple" xlink:href="http://127.0.0.1/tutorial/hello" text:style-name="Internet_20_link" text:visited-style-name="Visited_20_Internet_20_Link"><text:span text:style-name="Source_20_Text"><text:span text:style-name="T1">127.0.0.1/tutorial/hello</text:span></text:span></text:a><text:span text:style-name="T7">.</text:span></text:p>
      <text:p text:style-name="P24">This will cause a HTTP GET request to be sent from the web browser, asking for the resource.</text:p>
      <text:list text:style-name="L6">
        <text:list-item>
          <text:p text:style-name="P25"><text:span text:style-name="T7">The server will parse the request, look up the </text:span><text:span text:style-name="T8">given </text:span><text:span text:style-name="T7">context </text:span><text:span text:style-name="Source_20_Text"><text:span text:style-name="T7">tutorial</text:span></text:span><text:span text:style-name="T7"> and the web component responsible for this resource. It will find that </text:span><text:span text:style-name="Source_20_Text">THelloWorldResource</text:span><text:span text:style-name="T7"> is mapped to the path '/hello'.</text:span></text:p>
        </text:list-item>
        <text:list-item>
          <text:p text:style-name="P25"><text:span text:style-name="T7">The server then will invoke the GET request handler </text:span><text:span text:style-name="Source_20_Text">THelloWorldResource.OnGet</text:span><text:span text:style-name="T7">, passing request and response objects.</text:span></text:p>
        </text:list-item>
        <text:list-item>
          <text:p text:style-name="P25"><text:span text:style-name="T7">Finally, the </text:span><text:span text:style-name="T9">request handler </text:span><text:span text:style-name="T7">code builds the response, which will be sent back to the web browser.</text:span></text:p>
        </text:list-item>
      </text:list>
      <text:h text:style-name="Heading_20_3" text:outline-level="3"><text:bookmark-start text:name="__RefHeading___Toc4048_661956188"/>Terminating the HTTP server<text:bookmark-end text:name="__RefHeading___Toc4048_661956188"/></text:h>
      <text:p text:style-name="P26">To shut down the HTTP server, activate the console application window and press the enter key.</text:p>
      <text:p text:style-name="P26"/>
      <text:p text:style-name="P26"><draw:frame draw:style-name="fr2" draw:name="Rahmen1" text:anchor-type="paragraph" svg:x="0cm" svg:y="0cm" svg:width="13.63cm" draw:z-index="2"><draw:text-box fo:min-height="5.69cm"><text:p text:style-name="Illustration"><draw:frame draw:style-name="fr3" draw:name="Grafik2" text:anchor-type="paragraph" svg:x="0.004cm" svg:y="0.002cm" svg:width="13.63cm" style:rel-width="100%" svg:height="5.69cm" style:rel-height="scale" draw:z-index="3"><draw:image xlink:href="Pictures/1000000000000203000000D73EE80221.png" xlink:type="simple" xlink:show="embed" xlink:actuate="onLoad" draw:mime-type="image/png"/></draw:frame>Illustration <text:sequence text:ref-name="refIllustration0" text:name="Illustration" text:formula="ooow:Illustration+1" style:num-format="1">1</text:sequence>: Hello world example</text:p></draw:text-box></draw:frame></text:p>
      <text:h text:style-name="Heading_20_2" text:outline-level="2"><text:bookmark-start text:name="__RefHeading___Toc4052_661956188"/><text:soft-page-break/>Developing an HTTP Session application<text:bookmark-end text:name="__RefHeading___Toc4052_661956188"/></text:h>
      <text:p text:style-name="Standard">The following short tutorial takes you through some of the basic steps of developing a<text:span text:style-name="T10">n</text:span> example for HTTP sessions with the <text:span text:style-name="T2"><text:title>Daraja HTTP Framework</text:title></text:span><text:span text:style-name="T2"><text:s/>framework.</text:span></text:p>
      <text:p text:style-name="Standard">This tutorial assumes you already have some familiarity with developing Delphi applications.</text:p>
      <text:p text:style-name="Standard">You will create an application that runs a HTTP server on the local computer and serves requests for the resource <text:span text:style-name="T11">http://127.0.0.1/tutorial/session</text:span>.</text:p>
      <text:p text:style-name="Standard">This tutorial takes approximately 10 minutes to complete.</text:p>
      <text:p text:style-name="Standard"><text:span text:style-name="T3">To complete this tutorial, you need the software and resources listed in the following table.</text:span> </text:p>
      <text:list xml:id="list155527760232641" text:continue-list="list828335949" text:style-name="L1">
        <text:list-item>
          <text:p text:style-name="P10"><text:span text:style-name="T2"><text:title>Daraja HTTP Framework</text:title></text:span><text:span text:style-name="T2"><text:s/></text:span><text:span text:style-name="T2"><text:keywords>3.1.0</text:keywords></text:span></text:p>
        </text:list-item>
        <text:list-item>
          <text:p text:style-name="P11">Indy 10.6</text:p>
        </text:list-item>
        <text:list-item>
          <text:p text:style-name="P11">Delphi 2009</text:p>
        </text:list-item>
      </text:list>
      <text:h text:style-name="P12" text:outline-level="3"><text:bookmark-start text:name="__RefHeading___Toc4054_661956188"/>Project Setup<text:bookmark-end text:name="__RefHeading___Toc4054_661956188"/></text:h>
      <text:p text:style-name="P13">The application you create will contain one Delphi project, which is a console program.</text:p>
      <text:list text:style-name="L7">
        <text:list-item>
          <text:p text:style-name="P27">in the IDE, use the project wizard to create a new console line application project</text:p>
        </text:list-item>
        <text:list-item>
          <text:p text:style-name="P28"><text:span text:style-name="T2">add the path to the </text:span><text:span text:style-name="T12">&lt;inst&gt;\source</text:span><text:span text:style-name="T2"> folder to the project search path</text:span></text:p>
        </text:list-item>
        <text:list-item>
          <text:p text:style-name="P27">save the project as <text:span text:style-name="T13">HttpSessionServer</text:span></text:p>
        </text:list-item>
      </text:list>
      <text:h text:style-name="P12" text:outline-level="3"><text:bookmark-start text:name="__RefHeading___Toc4056_661956188"/>Creating the Web Component<text:bookmark-end text:name="__RefHeading___Toc4056_661956188"/></text:h>
      <text:list text:style-name="L8">
        <text:list-item>
          <text:p text:style-name="P29"><text:span text:style-name="T2">create a unit with the code below and save it as </text:span><text:span text:style-name="T11">SessionDemoResource.pas</text:span></text:p>
        </text:list-item>
      </text:list>
      <text:p text:style-name="P30"><text:span text:style-name="T6">Code ex</text:span>ample</text:p>
      <text:p text:style-name="SourceCode">unit SessionDemoResource;</text:p>
      <text:p text:style-name="SourceCode"/>
      <text:p text:style-name="SourceCode">interface</text:p>
      <text:p text:style-name="SourceCode"/>
      <text:p text:style-name="SourceCode">uses djWebComponent, djTypes;</text:p>
      <text:p text:style-name="SourceCode"/>
      <text:p text:style-name="SourceCode">type</text:p>
      <text:p text:style-name="SourceCode"><text:s text:c="2"/>TSessionDemoResource = class(TdjWebComponent)</text:p>
      <text:p text:style-name="SourceCode"><text:s text:c="2"/>public</text:p>
      <text:p text:style-name="SourceCode"><text:s text:c="4"/>procedure OnGet(Request: TdjRequest; Response: TdjResponse); override;</text:p>
      <text:p text:style-name="SourceCode"><text:s text:c="2"/>end;</text:p>
      <text:p text:style-name="SourceCode"/>
      <text:p text:style-name="SourceCode">implementation</text:p>
      <text:p text:style-name="SourceCode"/>
      <text:p text:style-name="SourceCode">uses SysUtils;</text:p>
      <text:p text:style-name="SourceCode"/>
      <text:p text:style-name="SourceCode">procedure TSessionDemoResource.OnGet(Request: TdjRequest; Response: TdjResponse);</text:p>
      <text:p text:style-name="SourceCode">var</text:p>
      <text:p text:style-name="SourceCode"><text:soft-page-break/><text:s text:c="2"/>RequestCountForSession: string;</text:p>
      <text:p text:style-name="SourceCode">begin</text:p>
      <text:p text:style-name="SourceCode"><text:s text:c="2"/>RequestCountForSession := Request.Session.Content.Values['count'];</text:p>
      <text:p text:style-name="SourceCode"><text:s text:c="2"/>if RequestCountForSession = '' then RequestCountForSession := '1';</text:p>
      <text:p text:style-name="SourceCode"/>
      <text:p text:style-name="SourceCode"><text:s text:c="2"/>Request.Session.Content.Values['count'] :=</text:p>
      <text:p text:style-name="SourceCode"><text:s text:c="4"/>IntToStr(StrToInt(RequestCountForSession) + 1);</text:p>
      <text:p text:style-name="SourceCode"/>
      <text:p text:style-name="SourceCode"><text:s text:c="2"/>Response.ContentText :=</text:p>
      <text:p text:style-name="SourceCode"><text:s text:c="4"/>Format('Your Session ID is %s ', [Request.Session.SessionID]) + #10 +</text:p>
      <text:p text:style-name="SourceCode"><text:s text:c="4"/>Format('I have received %s GET Requests during this session', [RequestCountForSession]);</text:p>
      <text:p text:style-name="SourceCode"/>
      <text:p text:style-name="SourceCode"><text:s text:c="2"/>Response.ContentType := 'text/plain';</text:p>
      <text:p text:style-name="SourceCode">end;</text:p>
      <text:p text:style-name="SourceCode"/>
      <text:p text:style-name="SourceCode">end.</text:p>
      <text:h text:style-name="P12" text:outline-level="3"><text:bookmark-start text:name="__RefHeading___Toc4058_661956188"/>Create the server configuration and start-up code<text:bookmark-end text:name="__RefHeading___Toc4058_661956188"/></text:h>
      <text:list text:style-name="L9">
        <text:list-item>
          <text:p text:style-name="P31">open the HttpSessionServer.dpr application project file </text:p>
        </text:list-item>
        <text:list-item>
          <text:p text:style-name="P31">paste the code shown below</text:p>
        </text:list-item>
      </text:list>
      <text:p text:style-name="P32"><text:span text:style-name="T6">Code ex</text:span>ample</text:p>
      <text:p text:style-name="SourceCode">program HttpSessionServer;</text:p>
      <text:p text:style-name="SourceCode"/>
      <text:p text:style-name="SourceCode">{$APPTYPE CONSOLE}</text:p>
      <text:p text:style-name="SourceCode"/>
      <text:p text:style-name="SourceCode">uses</text:p>
      <text:p text:style-name="P33"><text:s text:c="2"/>SessionDemoResource in 'SessionDemoResource.pas',</text:p>
      <text:p text:style-name="P33"><text:s text:c="2"/>djServer, djWebAppContext;</text:p>
      <text:p text:style-name="SourceCode"/>
      <text:p text:style-name="SourceCode">procedure Demo;</text:p>
      <text:p text:style-name="SourceCode">var</text:p>
      <text:p text:style-name="SourceCode"><text:s text:c="2"/>Server: TdjServer;</text:p>
      <text:p text:style-name="SourceCode"><text:s text:c="2"/>Context: TdjWebAppContext;</text:p>
      <text:p text:style-name="SourceCode">begin</text:p>
      <text:p text:style-name="SourceCode"><text:s text:c="2"/>Server := TdjServer.Create<text:span text:style-name="T1">(80)</text:span>;</text:p>
      <text:p text:style-name="SourceCode"><text:s text:c="2"/>try</text:p>
      <text:p text:style-name="SourceCode"><text:s text:c="4"/>Context := TdjWebAppContext.Create('tutorial', True);</text:p>
      <text:p text:style-name="P33"><text:s text:c="4"/>Context.Add(TSessionDemoResource, '/session');<text:line-break/></text:p>
      <text:p text:style-name="SourceCode"><text:s text:c="4"/>Server.Add(Context);</text:p>
      <text:p text:style-name="SourceCode"><text:s text:c="4"/>Server.Start;<text:line-break/></text:p>
      <text:p text:style-name="SourceCode"><text:s text:c="4"/>WriteLn('Hit enter to terminate.');</text:p>
      <text:p text:style-name="SourceCode"><text:s text:c="4"/>ReadLn;</text:p>
      <text:p text:style-name="SourceCode"><text:s text:c="2"/>finally</text:p>
      <text:p text:style-name="SourceCode"><text:s text:c="4"/>Server.Free;</text:p>
      <text:p text:style-name="SourceCode"><text:s text:c="2"/>end;</text:p>
      <text:p text:style-name="SourceCode">end;</text:p>
      <text:p text:style-name="SourceCode"/>
      <text:p text:style-name="SourceCode">begin</text:p>
      <text:p text:style-name="SourceCode"><text:s text:c="2"/>Demo;</text:p>
      <text:p text:style-name="SourceCode">end.</text:p>
      <text:h text:style-name="Heading_20_3" text:outline-level="3"><text:bookmark-start text:name="__RefHeading___Toc4060_661956188"/><text:soft-page-break/>Compiling and Running the Application<text:bookmark-end text:name="__RefHeading___Toc4060_661956188"/></text:h>
      <text:list text:style-name="L10">
        <text:list-item>
          <text:p text:style-name="P34">In the IDE, press F9 to start the application</text:p>
        </text:list-item>
      </text:list>
      <text:p text:style-name="Standard">Note: depending on your system, a firewall warning can appear, notifying you that the program tries to open a server port.</text:p>
      <text:h text:style-name="Heading_20_3" text:outline-level="3"><text:bookmark-start text:name="__RefHeading___Toc4062_661956188"/>Testing the Application<text:bookmark-end text:name="__RefHeading___Toc4062_661956188"/></text:h>
      <text:p text:style-name="P35">To test the server, open a web browser and navigate to <text:a xlink:type="simple" xlink:href="http://127.0.0.1:8080/tutorial/session" text:style-name="Internet_20_link" text:visited-style-name="Visited_20_Internet_20_Link"><text:span text:style-name="T7">http://127.0.0.1/tutorial/session</text:span></text:a><text:span text:style-name="T7">.</text:span></text:p>
      <text:p text:style-name="P35"><text:span text:style-name="T7">This will cause a HTTP GET request to be sent from the web browser, asking the server for the resource at </text:span><text:span text:style-name="T14">this location</text:span><text:span text:style-name="T7">.</text:span></text:p>
      <text:list text:style-name="L11">
        <text:list-item>
          <text:p text:style-name="P36"><text:span text:style-name="T7">The server will parse the request, look up the context ('tutorial') and the web component responsible for this resource. It will find that </text:span><text:span text:style-name="T12">TSessionDemoResource</text:span><text:span text:style-name="T7"> is mapped to the path '/session'.</text:span></text:p>
        </text:list-item>
        <text:list-item>
          <text:p text:style-name="P36"><text:span text:style-name="T7">The server then will invoke the GET request handler </text:span><text:span text:style-name="T12">TSessionDemoResource.OnGet</text:span><text:span text:style-name="T7">, passing request and response objects.</text:span></text:p>
        </text:list-item>
        <text:list-item>
          <text:p text:style-name="P36"><text:span text:style-name="T7">Finally, the </text:span><text:span text:style-name="T9">GET request handler </text:span><text:span text:style-name="T7">builds the response, which will be sent back to the web browser.</text:span></text:p>
        </text:list-item>
      </text:list>
      <text:h text:style-name="Heading_20_3" text:outline-level="3"><text:bookmark-start text:name="__RefHeading___Toc4064_661956188"/>Terminating the HTTP server<text:bookmark-end text:name="__RefHeading___Toc4064_661956188"/></text:h>
      <text:p text:style-name="P26">To shut down the HTTP server, activate the console application window and press the enter key.</text:p>
      <text:p text:style-name="P26"><draw:frame draw:style-name="fr2" draw:name="Rahmen3" text:anchor-type="paragraph" svg:x="0cm" svg:y="0cm" svg:width="13.63cm" draw:z-index="4"><draw:text-box fo:min-height="5.69cm"><text:p text:style-name="Illustration"><draw:frame draw:style-name="fr4" draw:name="Grafik3" text:anchor-type="paragraph" svg:width="13.63cm" svg:height="4.627cm" draw:z-index="5"><draw:image xlink:href="Pictures/1000000000000285000000DB431F8AA5.png" xlink:type="simple" xlink:show="embed" xlink:actuate="onLoad" draw:mime-type="image/png"/></draw:frame>Illustration <text:sequence text:ref-name="refIllustration1" text:name="Illustration" text:formula="ooow:Illustration+1" style:num-format="1">2</text:sequence>: HTTP session example</text:p></draw:text-box></draw:frame></text:p>
      <text:h text:style-name="Heading_20_2" text:outline-level="2"><text:bookmark-start text:name="__RefHeading___Toc4068_661956188"/>Multiple <text:span text:style-name="T15">Url </text:span>Mappings of a Web Component<text:bookmark-end text:name="__RefHeading___Toc4068_661956188"/></text:h>
      <text:p text:style-name="Standard">The following short tutorial takes you through some of the basic steps of creating a <text:span text:style-name="T2"><text:title>Daraja HTTP Framework</text:title></text:span><text:span text:style-name="T2"><text:s/>framework application which uses multiple mappings to deliver different HTTP response content types depending on the HTTP request document path.</text:span></text:p>
      <text:p text:style-name="Standard"><text:soft-page-break/>You will create an application that runs a HTTP server on the local computer and serves requests for two resource paths.</text:p>
      <text:p text:style-name="Standard">The response content type <text:span text:style-name="T15">will </text:span>depend on the request:</text:p>
      <text:list text:style-name="L12">
        <text:list-item>
          <text:p text:style-name="P37">for http://127.0.0.1/tutorial/fib.txt, the content type is <text:span text:style-name="T13">text/plain</text:span></text:p>
        </text:list-item>
        <text:list-item>
          <text:p text:style-name="P38">for http://127.0.0.1/tutorial/fib.html, the content type is <text:span text:style-name="T13">text/html</text:span></text:p>
        </text:list-item>
      </text:list>
      <text:p text:style-name="P35">The application will <text:span text:style-name="T15">read</text:span> a query parameter with the name “n” to calculate the Fibonacci number for the parameter value. </text:p>
      <text:p text:style-name="P35"><text:span text:style-name="T15">A</text:span> complete request URL will be for example</text:p>
      <text:list text:style-name="L13">
        <text:list-item>
          <text:p text:style-name="P39">http://127.0.0.1/tutorial/fib.html<text:span text:style-name="T7">?n=8</text:span></text:p>
        </text:list-item>
      </text:list>
      <text:p text:style-name="Standard">This tutorial takes approximately 10 minutes to complete.</text:p>
      <text:p text:style-name="Standard"><text:span text:style-name="T3">To complete this tutorial, you need the software and resources listed in the following table.</text:span> </text:p>
      <text:list text:continue-list="list155527760232641" text:style-name="L1">
        <text:list-item>
          <text:p text:style-name="P10"><text:span text:style-name="T2"><text:title>Daraja HTTP Framework</text:title></text:span><text:span text:style-name="T2"><text:s/></text:span><text:span text:style-name="T2"><text:keywords>3.1.0</text:keywords></text:span></text:p>
        </text:list-item>
        <text:list-item>
          <text:p text:style-name="P11">Indy 10.6</text:p>
        </text:list-item>
        <text:list-item>
          <text:p text:style-name="P11">Delphi 2009</text:p>
        </text:list-item>
      </text:list>
      <text:h text:style-name="P12" text:outline-level="3"><text:bookmark-start text:name="__RefHeading___Toc4070_661956188"/>Project Setup<text:bookmark-end text:name="__RefHeading___Toc4070_661956188"/></text:h>
      <text:p text:style-name="P13">The application you create will contain one Delphi project, which is a console program.</text:p>
      <text:list text:style-name="L14">
        <text:list-item>
          <text:p text:style-name="P40">in the IDE, use the project wizard to create a new console line application project</text:p>
        </text:list-item>
        <text:list-item>
          <text:p text:style-name="P41"><text:span text:style-name="T2">add the path to the </text:span><text:span text:style-name="T12">&lt;inst&gt;\source</text:span><text:span text:style-name="T2"> folder to the project search path</text:span></text:p>
        </text:list-item>
        <text:list-item>
          <text:p text:style-name="P40">save the project as <text:span text:style-name="T13">TwoMappingsServer</text:span></text:p>
        </text:list-item>
      </text:list>
      <text:h text:style-name="P12" text:outline-level="3"><text:bookmark-start text:name="__RefHeading___Toc4072_661956188"/>Creating the Web Component<text:bookmark-end text:name="__RefHeading___Toc4072_661956188"/></text:h>
      <text:list text:style-name="L15">
        <text:list-item>
          <text:p text:style-name="P42"><text:span text:style-name="T2">create a unit with the code below and save it as </text:span><text:span text:style-name="T11">FibonacciResource.pas</text:span></text:p>
        </text:list-item>
      </text:list>
      <text:p text:style-name="P30"><text:span text:style-name="T16">Code ex</text:span><text:span text:style-name="T11">ample</text:span></text:p>
      <text:p text:style-name="SourceCode">unit FibonacciResource;</text:p>
      <text:p text:style-name="SourceCode"/>
      <text:p text:style-name="SourceCode">interface</text:p>
      <text:p text:style-name="SourceCode"/>
      <text:p text:style-name="SourceCode">uses djWebComponent, djTypes;</text:p>
      <text:p text:style-name="SourceCode"/>
      <text:p text:style-name="SourceCode">type</text:p>
      <text:p text:style-name="SourceCode"><text:s text:c="2"/>TFibonacciResource = class(TdjWebComponent)</text:p>
      <text:p text:style-name="SourceCode"><text:s text:c="2"/>public</text:p>
      <text:p text:style-name="SourceCode"><text:s text:c="4"/>procedure OnGet(Request: TdjRequest; Response: TdjResponse); override;</text:p>
      <text:p text:style-name="SourceCode"><text:s text:c="2"/>end;</text:p>
      <text:p text:style-name="SourceCode"/>
      <text:p text:style-name="SourceCode">implementation</text:p>
      <text:p text:style-name="SourceCode"/>
      <text:p text:style-name="SourceCode">uses StrUtils, SysUtils;</text:p>
      <text:p text:style-name="SourceCode"><text:soft-page-break/></text:p>
      <text:p text:style-name="SourceCode">function fib(n: Integer): Integer;</text:p>
      <text:p text:style-name="SourceCode">begin</text:p>
      <text:p text:style-name="SourceCode"><text:s text:c="2"/>if n=0 then begin Result := 0; Exit; end;</text:p>
      <text:p text:style-name="SourceCode"><text:s text:c="2"/>if n=1 then begin Result := 1; Exit; end;</text:p>
      <text:p text:style-name="SourceCode"><text:s text:c="2"/>Result := fib(n-1) + fib(n-2);</text:p>
      <text:p text:style-name="SourceCode">end;</text:p>
      <text:p text:style-name="SourceCode"/>
      <text:p text:style-name="SourceCode">procedure TFibonacciResource.OnGet(Request: TdjRequest; Response: TdjResponse);</text:p>
      <text:p text:style-name="SourceCode">const</text:p>
      <text:p text:style-name="SourceCode"><text:s text:c="2"/>INVALID_ARGUMENT_VALUE = -1;</text:p>
      <text:p text:style-name="SourceCode">var</text:p>
      <text:p text:style-name="SourceCode"><text:s text:c="2"/>InputParam: Integer;</text:p>
      <text:p text:style-name="SourceCode">begin</text:p>
      <text:p text:style-name="SourceCode"><text:s text:c="2"/>InputParam := StrToIntDef(Request.Params.Values['n'], INVALID_ARGUMENT_VALUE);</text:p>
      <text:p text:style-name="SourceCode"><text:s text:c="2"/>if InputParam &lt;= INVALID_ARGUMENT_VALUE then begin</text:p>
      <text:p text:style-name="SourceCode"><text:s text:c="4"/>Response.ResponseNo := 500;</text:p>
      <text:p text:style-name="SourceCode"><text:s text:c="4"/>Response.ContentText := 'Internal server error: missing or invalid value';</text:p>
      <text:p text:style-name="SourceCode"><text:s text:c="4"/>Response.ContentType := 'text/plain';</text:p>
      <text:p text:style-name="SourceCode"><text:s text:c="2"/>end else if EndsText('.txt', Request.Document) then begin</text:p>
      <text:p text:style-name="SourceCode"><text:s text:c="4"/>Response.ContentText := IntToStr(fib(InputParam));</text:p>
      <text:p text:style-name="SourceCode"><text:s text:c="4"/>Response.ContentType := 'text/plain';</text:p>
      <text:p text:style-name="SourceCode"><text:s text:c="2"/>end else if EndsText('.html', Request.Document) then begin</text:p>
      <text:p text:style-name="SourceCode"><text:s text:c="4"/>Response.ContentText := Format('&lt;html&gt;&lt;body&gt;Result: &lt;b&gt;%d&lt;/b&gt;&lt;/body&gt;&lt;/html&gt;', [fib(InputParam)]);</text:p>
      <text:p text:style-name="SourceCode"><text:s text:c="4"/>Response.ContentType := 'text/html';</text:p>
      <text:p text:style-name="SourceCode"><text:s text:c="2"/>end;</text:p>
      <text:p text:style-name="SourceCode">end;</text:p>
      <text:p text:style-name="SourceCode"/>
      <text:p text:style-name="SourceCode">end.</text:p>
      <text:h text:style-name="P12" text:outline-level="3"><text:bookmark-start text:name="__RefHeading___Toc4074_661956188"/>Create the server configuration and start-up code<text:bookmark-end text:name="__RefHeading___Toc4074_661956188"/></text:h>
      <text:list text:style-name="L16">
        <text:list-item>
          <text:p text:style-name="P43">open the TwoMappingsServer.dpr application project file </text:p>
        </text:list-item>
        <text:list-item>
          <text:p text:style-name="P43">paste the code shown below</text:p>
        </text:list-item>
      </text:list>
      <text:p text:style-name="P32"><text:span text:style-name="T6">Code ex</text:span>ample</text:p>
      <text:p text:style-name="SourceCode">program TwoMappingsServer;</text:p>
      <text:p text:style-name="SourceCode"/>
      <text:p text:style-name="SourceCode">{$APPTYPE CONSOLE}</text:p>
      <text:p text:style-name="SourceCode"/>
      <text:p text:style-name="SourceCode">uses</text:p>
      <text:p text:style-name="SourceCode"><text:s text:c="2"/>djServer, djWebAppContext,</text:p>
      <text:p text:style-name="SourceCode"><text:s text:c="2"/>FibonacciResource in 'FibonacciResource.pas';</text:p>
      <text:p text:style-name="SourceCode"/>
      <text:p text:style-name="SourceCode">procedure Demo;</text:p>
      <text:p text:style-name="SourceCode">var</text:p>
      <text:p text:style-name="SourceCode"><text:s text:c="2"/>Server: TdjServer;</text:p>
      <text:p text:style-name="SourceCode"><text:s text:c="2"/>Context: TdjWebAppContext;</text:p>
      <text:p text:style-name="SourceCode">begin</text:p>
      <text:p text:style-name="SourceCode"><text:s text:c="2"/>Server := TdjServer.Create<text:span text:style-name="T1">(80)</text:span>;</text:p>
      <text:p text:style-name="SourceCode"><text:s text:c="2"/>try</text:p>
      <text:p text:style-name="SourceCode"><text:s text:c="4"/>Context := TdjWebAppContext.Create('tutorial');</text:p>
      <text:p text:style-name="SourceCode"><text:s text:c="4"/>Context.Add(TFibonacciResource, '/fib.txt');</text:p>
      <text:p text:style-name="SourceCode"><text:s text:c="4"/>Context.Add(TFibonacciResource, '/fib.html');</text:p>
      <text:p text:style-name="SourceCode"><text:soft-page-break/><text:s text:c="4"/>Server.Add(Context);</text:p>
      <text:p text:style-name="SourceCode"><text:s text:c="4"/>Server.Start;</text:p>
      <text:p text:style-name="SourceCode"><text:s text:c="4"/>WriteLn('Hit enter to terminate.');</text:p>
      <text:p text:style-name="SourceCode"><text:s text:c="4"/>ReadLn;</text:p>
      <text:p text:style-name="SourceCode"><text:s text:c="2"/>finally</text:p>
      <text:p text:style-name="SourceCode"><text:s text:c="4"/>Server.Free;</text:p>
      <text:p text:style-name="SourceCode"><text:s text:c="2"/>end;</text:p>
      <text:p text:style-name="SourceCode">end;</text:p>
      <text:p text:style-name="SourceCode"/>
      <text:p text:style-name="SourceCode">begin</text:p>
      <text:p text:style-name="SourceCode"><text:s text:c="2"/>Demo;</text:p>
      <text:p text:style-name="SourceCode">end.</text:p>
      <text:h text:style-name="Heading_20_3" text:outline-level="3"><text:bookmark-start text:name="__RefHeading___Toc4076_661956188"/>Compiling and Running the Application<text:bookmark-end text:name="__RefHeading___Toc4076_661956188"/></text:h>
      <text:list text:style-name="L17">
        <text:list-item>
          <text:p text:style-name="P44">In the IDE, press F9 to start the application</text:p>
        </text:list-item>
      </text:list>
      <text:p text:style-name="Standard">Note: depending on your system, a firewall warning can appear, notifying you that the program tries to open a server port.</text:p>
      <text:h text:style-name="Heading_20_3" text:outline-level="3"><text:bookmark-start text:name="__RefHeading___Toc4078_661956188"/>Testing the Application<text:bookmark-end text:name="__RefHeading___Toc4078_661956188"/></text:h>
      <text:p text:style-name="Standard">To test the server, open a web browser and navigate to <text:a xlink:type="simple" xlink:href="http://localhost/tutorial/fib.txt?n=7" text:style-name="Internet_20_link" text:visited-style-name="Visited_20_Internet_20_Link"><text:span text:style-name="T7">http://127.0.0.1/tutorial/fib.txt?n=7</text:span></text:a><text:span text:style-name="T7">. This will cause a HTTP GET request to be sent, asking for the resource http://127.0.0.1/tutorial/fib.txt, and passing the query parameter n with value 7.</text:span></text:p>
      <text:p text:style-name="P26">The server will parse the request, look up the context ('tutorial') and the web component responsible for this resource address. It will find that <text:span text:style-name="T11">TFibonacciResource</text:span> is mapped to the absolute path '/fib.txt'.</text:p>
      <text:p text:style-name="P26">The server then will invoke the GET request handler <text:span text:style-name="T11">TFibonacciResource.OnGet</text:span>, passing request and response objects.</text:p>
      <text:p text:style-name="P26">Finally, the code in <text:span text:style-name="T11">TFibonacciResource.OnGet</text:span> builds the response, which will be sent back to the web browser.</text:p>
      <text:p text:style-name="P26"><draw:frame draw:style-name="fr5" draw:name="Rahmen4" text:anchor-type="paragraph" svg:width="14.737cm" draw:z-index="6"><draw:text-box fo:min-height="4.498cm"><text:p text:style-name="Illustration"><draw:frame draw:style-name="fr3" draw:name="Grafik9" text:anchor-type="paragraph" svg:x="0.004cm" svg:y="0.002cm" svg:width="14.737cm" style:rel-width="100%" svg:height="4.498cm" style:rel-height="scale" draw:z-index="7"><draw:image xlink:href="Pictures/100000000000022D000000AAE1C5EF9C.png" xlink:type="simple" xlink:show="embed" xlink:actuate="onLoad" draw:mime-type="image/png"/></draw:frame>Illustration <text:sequence text:ref-name="refIllustration2" text:name="Illustration" text:formula="ooow:Illustration+1" style:num-format="1">3</text:sequence>: Fibonacci calculation result as plain text</text:p></draw:text-box></draw:frame></text:p>
      <text:p text:style-name="P26">To receive the HTTP response as HTML, use the address <text:a xlink:type="simple" xlink:href="http://localhost/tutorial/fib.html?n=7" text:style-name="Internet_20_link" text:visited-style-name="Visited_20_Internet_20_Link">http://127.0.0.1/tutorial/fib.html?n=7</text:a> – the same web component is mapped to the absolute path /fib.html. This time, the <text:soft-page-break/>code in OnGet will detect the .html extension and return a response with content type <text:span text:style-name="T13">text/html</text:span> and a simple HTML body back to the browser.</text:p>
      <text:p text:style-name="P26"><draw:frame draw:style-name="fr5" draw:name="Rahmen5" text:anchor-type="paragraph" svg:width="14.737cm" draw:z-index="8"><draw:text-box fo:min-height="4.498cm"><text:p text:style-name="Illustration"><draw:frame draw:style-name="fr3" draw:name="Grafik8" text:anchor-type="paragraph" svg:x="0.004cm" svg:y="0.002cm" svg:width="14.737cm" style:rel-width="100%" svg:height="4.498cm" style:rel-height="scale" draw:z-index="9"><draw:image xlink:href="Pictures/100000000000022D000000AA71839787.png" xlink:type="simple" xlink:show="embed" xlink:actuate="onLoad" draw:mime-type="image/png"/></draw:frame>Illustration <text:sequence text:ref-name="refIllustration3" text:name="Illustration" text:formula="ooow:Illustration+1" style:num-format="1">4</text:sequence>: Fibonacci calculation result as HTML</text:p></draw:text-box></draw:frame></text:p>
      <text:h text:style-name="Heading_20_3" text:outline-level="3"><text:bookmark-start text:name="__RefHeading___Toc4080_661956188"/>Terminating the HTTP server<text:bookmark-end text:name="__RefHeading___Toc4080_661956188"/></text:h>
      <text:p text:style-name="P26">To shut down the HTTP server, activate the console application window and press the enter key.</text:p>
      <text:h text:style-name="Heading_20_1" text:outline-level="1"><text:bookmark-start text:name="__RefHeading___Toc4084_661956188"/>Installation<text:bookmark-end text:name="__RefHeading___Toc4084_661956188"/></text:h>
      <text:h text:style-name="Heading_20_2" text:outline-level="2"><text:bookmark-start text:name="__RefHeading__30524401"/>Requirements<text:bookmark-end text:name="__RefHeading__30524401"/></text:h>
      <text:h text:style-name="Heading_20_3" text:outline-level="3"><text:bookmark-start text:name="__RefHeading___Toc4086_661956188"/>Development Environment<text:bookmark-end text:name="__RefHeading___Toc4086_661956188"/></text:h>
      <text:list text:style-name="L18">
        <text:list-item>
          <text:p text:style-name="P45"><text:span text:style-name="T17">Embarcadero Delphi</text:span> 2009 <text:span text:style-name="T18">(</text:span>Update 4<text:span text:style-name="T18">)<text:line-break/></text:span><text:span text:style-name="T19">or</text:span></text:p>
        </text:list-item>
        <text:list-item>
          <text:p text:style-name="P45"><text:alphabetical-index-mark-start text:id="IMark1627730459008"/><text:alphabetical-index-mark-start text:id="IMark1627730456048"/><text:span text:style-name="T17">Free Pascal</text:span><text:alphabetical-index-mark-end text:id="IMark1627730456048"/><text:alphabetical-index-mark-end text:id="IMark1627730459008"/> <text:span text:style-name="T18">3.</text:span><text:span text:style-name="T20">2.0 or newer</text:span></text:p>
        </text:list-item>
        <text:list-item>
          <text:p text:style-name="P46"><text:span text:style-name="T17">Internet Direct (Indy)</text:span> 10.6.2</text:p>
        </text:list-item>
      </text:list>
      <text:h text:style-name="Heading_20_2" text:outline-level="2"><text:bookmark-start text:name="__RefHeading___Toc4088_661956188"/>IDE and project configuration<text:bookmark-end text:name="__RefHeading___Toc4088_661956188"/></text:h>
      <text:h text:style-name="Heading_20_3" text:outline-level="3"><text:bookmark-start text:name="__RefHeading___Toc4090_661956188"/>Option 1: configure source code paths<text:bookmark-end text:name="__RefHeading___Toc4090_661956188"/></text:h>
      <text:p text:style-name="Standard">To make <text:title>Daraja HTTP Framework</text:title><text:s/>and Internet Direct (Indy) available for a project,</text:p>
      <text:list text:style-name="L19">
        <text:list-item>
          <text:p text:style-name="P47">add the <text:title>Daraja HTTP Framework</text:title><text:s/><text:span text:style-name="T13">&lt;Install&gt;/</text:span><text:span text:style-name="T21">source</text:span> folder to the project search path </text:p>
        </text:list-item>
        <text:list-item>
          <text:p text:style-name="P47">add the folders <text:span text:style-name="T13">&lt;Indy&gt;/Lib/Core</text:span>, <text:span text:style-name="T13">&lt;Indy&gt;/Lib/System</text:span> and <text:span text:style-name="T13">&lt;Indy&gt;/Lib/Protocols</text:span> to the project search path</text:p>
        </text:list-item>
        <text:list-item>
          <text:p text:style-name="P48">add the folder <text:span text:style-name="T13">&lt;Indy&gt;/Lib/Core</text:span> to the project <text:span text:style-name="T22">include</text:span> path</text:p>
        </text:list-item>
      </text:list>
      <text:p text:style-name="P49"/>
      <text:p text:style-name="Standard"><text:span text:style-name="T22">Note: </text:span>Installation of the Indy packages in the IDE is not required</text:p>
      <text:h text:style-name="Heading_20_3" text:outline-level="3"><text:bookmark-start text:name="__RefHeading___Toc4092_661956188"/>Option 2: compiled units<text:bookmark-end text:name="__RefHeading___Toc4092_661956188"/></text:h>
      <text:p text:style-name="Standard">A second option which avoids repeated recompilation is to use compiled DCU files, and include their location in the library path.</text:p>
      <text:p text:style-name="Standard">Notes:</text:p>
      <text:list text:style-name="L20">
        <text:list-item>
          <text:p text:style-name="P50">if compiler settings change, the library units must be recompiled</text:p>
        </text:list-item>
      </text:list>
      <text:h text:style-name="Heading_20_3" text:outline-level="3"><text:bookmark-start text:name="__RefHeading___Toc4094_661956188"/><text:soft-page-break/>Official Indy installation instructions<text:bookmark-end text:name="__RefHeading___Toc4094_661956188"/></text:h>
      <text:p text:style-name="Standard">If you prefer a full installation of Indy packages in the IDE, please read the official documentation page at</text:p>
      <text:p text:style-name="Standard"><text:a xlink:type="simple" xlink:href="http://www.indyproject.org/Sockets/Docs/Indy10Installation.aspx" text:style-name="Internet_20_link" text:visited-style-name="Visited_20_Internet_20_Link">http://www.indyproject.org/Sockets/Docs/Indy10Installation.aspx</text:a></text:p>
      <text:h text:style-name="Heading_20_2" text:outline-level="2"><text:bookmark-start text:name="__RefHeading___Toc4096_661956188"/><text:alphabetical-index-mark-start text:id="IMark1627730456128"/>Conditional Symbols<text:bookmark-end text:name="__RefHeading___Toc4096_661956188"/><text:alphabetical-index-mark-end text:id="IMark1627730456128"/></text:h>
      <table:table table:name="Tabelle2" table:style-name="Tabelle2">
        <table:table-column table:style-name="Tabelle2.A"/>
        <table:table-column table:style-name="Tabelle2.B"/>
        <table:table-row>
          <table:table-cell table:style-name="Tabelle2.A1" office:value-type="string">
            <text:p text:style-name="P51">Conditional symbol </text:p>
          </table:table-cell>
          <table:table-cell table:style-name="Tabelle2.B1" office:value-type="string">
            <text:p text:style-name="P51">Description</text:p>
          </table:table-cell>
        </table:table-row>
        <table:table-row>
          <table:table-cell table:style-name="Tabelle2.A2" office:value-type="string">
            <text:p text:style-name="P52">DARAJA_LOGGING</text:p>
          </table:table-cell>
          <table:table-cell table:style-name="Tabelle2.B2" office:value-type="string">
            <text:p text:style-name="P52">Enables <text:alphabetical-index-mark-start text:id="IMark1627730459648"/>logging<text:alphabetical-index-mark-end text:id="IMark1627730459648"/></text:p>
          </table:table-cell>
        </table:table-row>
        <table:table-row>
          <table:table-cell table:style-name="Tabelle2.A2" office:value-type="string">
            <text:p text:style-name="Table_20_Contents">DARAJA_PROJECT_STAGE_DEVELOPMENT</text:p>
          </table:table-cell>
          <table:table-cell table:style-name="Tabelle2.B2" office:value-type="string">
            <text:p text:style-name="Table_20_Contents">Enables <text:alphabetical-index-mark-start text:id="IMark1627730459008"/>development mode<text:alphabetical-index-mark-end text:id="IMark1627730459008"/></text:p>
          </table:table-cell>
        </table:table-row>
        <table:table-row>
          <table:table-cell table:style-name="Tabelle2.A2" office:value-type="string">
            <text:p text:style-name="Table_20_Contents">DARAJA_MADEXCEPT</text:p>
          </table:table-cell>
          <table:table-cell table:style-name="Tabelle2.B2" office:value-type="string">
            <text:p text:style-name="Table_20_Contents">Enables exception stacktraces with <text:alphabetical-index-mark-start text:id="IMark1627730460048"/>madExcept<text:alphabetical-index-mark-end text:id="IMark1627730460048"/>, this requires <text:alphabetical-index-mark-start text:id="IMark1627730458608"/>development mode<text:alphabetical-index-mark-end text:id="IMark1627730458608"/></text:p>
          </table:table-cell>
        </table:table-row>
        <table:table-row>
          <table:table-cell table:style-name="Tabelle2.A2" office:value-type="string">
            <text:p text:style-name="Table_20_Contents">DARAJA_JCLDEBUG</text:p>
          </table:table-cell>
          <table:table-cell table:style-name="Tabelle2.B2" office:value-type="string">
            <text:p text:style-name="Table_20_Contents">Enables exception stacktraces with JclDebug, this requires <text:alphabetical-index-mark-start text:id="IMark1627730460048"/>development mode<text:alphabetical-index-mark-end text:id="IMark1627730460048"/></text:p>
          </table:table-cell>
        </table:table-row>
      </table:table>
      <text:p text:style-name="Table">Table <text:sequence text:ref-name="refTable0" text:name="Table" text:formula="ooow:Table+1" style:num-format="1">1</text:sequence>: <text:alphabetical-index-mark-start text:id="IMark1627730456048"/>Conditional symbols<text:alphabetical-index-mark-end text:id="IMark1627730456048"/></text:p>
      <text:h text:style-name="Heading_20_1" text:outline-level="1"><text:bookmark-start text:name="__RefHeading___Toc4098_661956188"/>Introduction <text:span text:style-name="T20">to Web Components</text:span><text:bookmark-end text:name="__RefHeading___Toc4098_661956188"/></text:h>
      <text:h text:style-name="Heading_20_2" text:outline-level="2"><text:bookmark-start text:name="__RefHeading___Toc4100_661956188"/>General structure<text:bookmark-end text:name="__RefHeading___Toc4100_661956188"/></text:h>
      <text:p text:style-name="P53">A Web Component has t<text:span text:style-name="T23">wo</text:span> minimum requirements:</text:p>
      <text:list text:style-name="L21">
        <text:list-item>
          <text:p text:style-name="P54"><text:span text:style-name="T24">it must be a subclass of </text:span><text:alphabetical-index-mark-start text:id="IMark1627730456048"/><text:span text:style-name="T24">TdjWebComponent</text:span><text:alphabetical-index-mark-end text:id="IMark1627730456048"/></text:p>
        </text:list-item>
        <text:list-item>
          <text:p text:style-name="P54"><text:span text:style-name="T24">it must override at least one of the predefined </text:span><text:alphabetical-index-mark-start text:id="IMark1627730458608"/><text:span text:style-name="T24">HTTP</text:span><text:alphabetical-index-mark-end text:id="IMark1627730458608"/><text:span text:style-name="T24"> method handlers – </text:span><text:alphabetical-index-mark-start text:id="IMark1627730458928"/><text:span text:style-name="T24">OnGet</text:span><text:alphabetical-index-mark-end text:id="IMark1627730458928"/><text:span text:style-name="T24">, </text:span><text:alphabetical-index-mark-start text:id="IMark1627730456128"/><text:span text:style-name="T24">OnPost</text:span><text:alphabetical-index-mark-end text:id="IMark1627730456128"/><text:span text:style-name="T24"> etc.</text:span></text:p>
        </text:list-item>
      </text:list>
      <text:p text:style-name="P53">It may also optionally override two other meth<text:span text:style-name="T23">ods</text:span></text:p>
      <text:list text:style-name="L22">
        <text:list-item>
          <text:p text:style-name="P55"><text:span text:style-name="T24">the </text:span><text:alphabetical-index-mark-start text:id="IMark1627730457728"/><text:span text:style-name="T24">Init</text:span><text:alphabetical-index-mark-end text:id="IMark1627730457728"/><text:span text:style-name="T24"> method, to perform </text:span><text:span text:style-name="T25">init</text:span><text:span text:style-name="T24">ialization tasks</text:span></text:p>
        </text:list-item>
        <text:list-item>
          <text:p text:style-name="P55"><text:span text:style-name="T24">the destructor (</text:span><text:alphabetical-index-mark-start text:id="IMark1627730458928"/><text:span text:style-name="T24">Destroy</text:span><text:alphabetical-index-mark-end text:id="IMark1627730458928"/><text:span text:style-name="T24">), to perform cleanup tasks</text:span></text:p>
        </text:list-item>
      </text:list>
      <text:h text:style-name="P56" text:outline-level="3"><text:bookmark-start text:name="__RefHeading___Toc4102_661956188"/>Example<text:bookmark-end text:name="__RefHeading___Toc4102_661956188"/></text:h>
      <text:p text:style-name="P53">A minimal example is shown below. </text:p>
      <text:list text:style-name="L23">
        <text:list-item>
          <text:p text:style-name="P57"><text:span text:style-name="T24">It overrides </text:span><text:alphabetical-index-mark-start text:id="IMark1627730456128"/><text:span text:style-name="T26">OnGet</text:span><text:alphabetical-index-mark-end text:id="IMark1627730456128"/><text:span text:style-name="T24">, which has two parameters for the Indy </text:span><text:alphabetical-index-mark-start text:id="IMark1627730458928"/><text:span text:style-name="T24">HTTP</text:span><text:alphabetical-index-mark-end text:id="IMark1627730458928"/><text:span text:style-name="T24"> </text:span><text:alphabetical-index-mark-start text:id="IMark1627730458608"/><text:span text:style-name="T24">Request</text:span><text:alphabetical-index-mark-end text:id="IMark1627730458608"/><text:span text:style-name="T24"> and </text:span><text:alphabetical-index-mark-start text:id="IMark1627730457728"/><text:span text:style-name="T24">Response</text:span><text:alphabetical-index-mark-end text:id="IMark1627730457728"/><text:span text:style-name="T24"> objects. </text:span></text:p>
        </text:list-item>
        <text:list-item>
          <text:p text:style-name="P57"><text:span text:style-name="T24">In the method body, it sets the </text:span><text:alphabetical-index-mark-start text:id="IMark1627730457728"/><text:span text:style-name="T26">ContentText</text:span><text:alphabetical-index-mark-end text:id="IMark1627730457728"/><text:span text:style-name="T24"> property of the </text:span><text:alphabetical-index-mark-start text:id="IMark1627730458608"/><text:span text:style-name="T24">Response</text:span><text:alphabetical-index-mark-end text:id="IMark1627730458608"/><text:span text:style-name="T24"> object to '&lt;html&gt;Hello world!&lt;/html&gt;':</text:span></text:p>
        </text:list-item>
      </text:list>
      <text:p text:style-name="P30"><text:span text:style-name="T27">Code ex</text:span><text:span text:style-name="T24">ample</text:span></text:p>
      <text:p text:style-name="Preformatted_20_Text"/>
      <text:p text:style-name="Preformatted_20_Text">type</text:p>
      <text:p text:style-name="Preformatted_20_Text"><text:s text:c="2"/><text:alphabetical-index-mark-start text:id="IMark1627730457728"/><text:alphabetical-index-mark-start text:id="IMark1627730458608"/>TMyWebPage<text:alphabetical-index-mark-end text:id="IMark1627730458608"/><text:alphabetical-index-mark-end text:id="IMark1627730457728"/> = class(<text:alphabetical-index-mark-start text:id="IMark1627730458928"/><text:alphabetical-index-mark-start text:id="IMark1627730456048"/>TdjWebComponent<text:alphabetical-index-mark-end text:id="IMark1627730456048"/><text:alphabetical-index-mark-end text:id="IMark1627730458928"/>)</text:p>
      <text:p text:style-name="Preformatted_20_Text"><text:s text:c="2"/>public</text:p>
      <text:p text:style-name="Preformatted_20_Text"><text:s text:c="4"/>procedure <text:alphabetical-index-mark-start text:id="IMark1627730457248"/>OnGet<text:alphabetical-index-mark-end text:id="IMark1627730457248"/>(<text:alphabetical-index-mark-start text:id="IMark1627730458608"/>Request<text:alphabetical-index-mark-end text:id="IMark1627730458608"/>: <text:alphabetical-index-mark-start text:id="IMark1627730459488"/><text:alphabetical-index-mark-start text:id="IMark1627730456128"/><text:alphabetical-index-mark-start text:id="IMark1627730459568"/>TdjRequest<text:alphabetical-index-mark-end text:id="IMark1627730459568"/><text:alphabetical-index-mark-end text:id="IMark1627730456128"/><text:alphabetical-index-mark text:string-value=" "/><text:alphabetical-index-mark-end text:id="IMark1627730459488"/><text:alphabetical-index-mark text:string-value=" "/>; <text:alphabetical-index-mark-start text:id="IMark1627730457728"/>Response<text:alphabetical-index-mark-end text:id="IMark1627730457728"/>:</text:p>
      <text:p text:style-name="Preformatted_20_Text"><text:s text:c="6"/><text:alphabetical-index-mark-start text:id="IMark1627730456608"/><text:alphabetical-index-mark-start text:id="IMark1627730458608"/><text:alphabetical-index-mark-start text:id="IMark1627730458928"/>TdjResponse<text:alphabetical-index-mark-end text:id="IMark1627730458928"/><text:alphabetical-index-mark-end text:id="IMark1627730458608"/><text:alphabetical-index-mark text:string-value=" "/><text:alphabetical-index-mark-end text:id="IMark1627730456608"/><text:alphabetical-index-mark text:string-value=" "/>); override;</text:p>
      <text:p text:style-name="Preformatted_20_Text"><text:s text:c="2"/>end;</text:p>
      <text:p text:style-name="Preformatted_20_Text"/>
      <text:p text:style-name="Preformatted_20_Text">implementation</text:p>
      <text:p text:style-name="Preformatted_20_Text"/>
      <text:p text:style-name="Preformatted_20_Text">{ <text:alphabetical-index-mark-start text:id="IMark1627730456608"/>TMyWebPage<text:alphabetical-index-mark-end text:id="IMark1627730456608"/> }</text:p>
      <text:p text:style-name="Preformatted_20_Text"/>
      <text:p text:style-name="Preformatted_20_Text">procedure <text:alphabetical-index-mark-start text:id="IMark1627730456128"/>TMyWebPage<text:alphabetical-index-mark-end text:id="IMark1627730456128"/>.<text:alphabetical-index-mark-start text:id="IMark1627730458608"/>OnGet<text:alphabetical-index-mark-end text:id="IMark1627730458608"/>(<text:alphabetical-index-mark-start text:id="IMark1627730459488"/>Request<text:alphabetical-index-mark-end text:id="IMark1627730459488"/>: <text:alphabetical-index-mark-start text:id="IMark1627730456288"/><text:alphabetical-index-mark-start text:id="IMark1627730460048"/>TdjRequest<text:alphabetical-index-mark-end text:id="IMark1627730460048"/><text:alphabetical-index-mark text:string-value=" "/><text:alphabetical-index-mark-end text:id="IMark1627730456288"/><text:alphabetical-index-mark text:string-value=" "/>;</text:p>
      <text:p text:style-name="Preformatted_20_Text"><text:s text:c="2"/><text:alphabetical-index-mark-start text:id="IMark1627730456288"/>Response<text:alphabetical-index-mark-end text:id="IMark1627730456288"/>: <text:alphabetical-index-mark-start text:id="IMark1627730458928"/><text:alphabetical-index-mark-start text:id="IMark1627730460048"/>TdjResponse<text:alphabetical-index-mark-end text:id="IMark1627730460048"/><text:alphabetical-index-mark text:string-value=" "/><text:alphabetical-index-mark-end text:id="IMark1627730458928"/><text:alphabetical-index-mark text:string-value=" "/>);</text:p>
      <text:p text:style-name="Preformatted_20_Text">begin</text:p>
      <text:p text:style-name="Preformatted_20_Text"><text:s text:c="2"/><text:alphabetical-index-mark-start text:id="IMark1627730457728"/>Response<text:alphabetical-index-mark-end text:id="IMark1627730457728"/>.<text:alphabetical-index-mark-start text:id="IMark1627730457248"/>ContentText<text:alphabetical-index-mark-end text:id="IMark1627730457248"/> := '&lt;html&gt;Hello world!&lt;/html&gt;;</text:p>
      <text:p text:style-name="Preformatted_20_Text"><text:s text:c="2"/>Response.<text:alphabetical-index-mark-start text:id="IMark1627730456288"/>ContentType<text:alphabetical-index-mark-end text:id="IMark1627730456288"/> := 'text/html';</text:p>
      <text:p text:style-name="Preformatted_20_Text"><text:s text:c="2"/>Response.<text:alphabetical-index-mark-start text:id="IMark1627730458928"/>CharSet<text:alphabetical-index-mark-end text:id="IMark1627730458928"/> := '<text:alphabetical-index-mark-start text:id="IMark1627730457728"/>utf-8<text:alphabetical-index-mark-end text:id="IMark1627730457728"/>'; </text:p>
      <text:p text:style-name="P58">end;</text:p>
      <text:p text:style-name="P58"/>
      <text:h text:style-name="Heading_20_2" text:outline-level="2"><text:bookmark-start text:name="__RefHeading___Toc4104_661956188"/><text:soft-page-break/>Web Application <text:alphabetical-index-mark-start text:id="IMark1627730458928"/><text:alphabetical-index-mark-start text:id="IMark1627730456128"/>Context<text:bookmark-end text:name="__RefHeading___Toc4104_661956188"/><text:alphabetical-index-mark-end text:id="IMark1627730456128"/><text:alphabetical-index-mark-end text:id="IMark1627730458928"/></text:h>
      <text:p text:style-name="P59">In a <text:title>Daraja HTTP Framework</text:title><text:s/>web application, a <text:alphabetical-index-mark-start text:id="IMark1627730457248"/><text:span text:style-name="T17">context</text:span><text:alphabetical-index-mark-end text:id="IMark1627730457248"/> is an object that is created when the web application is started and destroyed when the web application is taken out of service.</text:p>
      <text:p text:style-name="P59">The <text:alphabetical-index-mark-start text:id="IMark1627730459488"/>context<text:alphabetical-index-mark-end text:id="IMark1627730459488"/> object can contain initialization parameters which can be accessed from web components.</text:p>
      <text:p text:style-name="P59">A <text:alphabetical-index-mark-start text:id="IMark1627730457728"/>context<text:alphabetical-index-mark-end text:id="IMark1627730457728"/> can provide <text:span text:style-name="T17">dynamic</text:span> and <text:alphabetical-index-mark-start text:id="IMark1627730458608"/><text:span text:style-name="T17">static</text:span> <text:alphabetical-index-mark-start text:id="IMark1627730458928"/>resource<text:alphabetical-index-mark-end text:id="IMark1627730458608"/>s<text:alphabetical-index-mark-end text:id="IMark1627730458928"/>:</text:p>
      <text:list text:style-name="L24">
        <text:list-item>
          <text:p text:style-name="P60"><text:span text:style-name="T17">Dynamic</text:span> <text:alphabetical-index-mark-start text:id="IMark1627730456608"/>resources<text:alphabetical-index-mark-end text:id="IMark1627730456608"/> are created by <text:span text:style-name="T17">Web Components</text:span> when a client sends a request which matches their <text:alphabetical-index-mark-start text:id="IMark1627730457728"/><text:span text:style-name="T19">resource path mapping</text:span><text:alphabetical-index-mark-end text:id="IMark1627730457728"/></text:p>
        </text:list-item>
        <text:list-item>
          <text:p text:style-name="P60"><text:alphabetical-index-mark-start text:id="IMark1627730458928"/><text:span text:style-name="T17">Static</text:span> <text:alphabetical-index-mark-start text:id="IMark1627730459648"/>resource<text:alphabetical-index-mark-end text:id="IMark1627730458928"/>s<text:alphabetical-index-mark-end text:id="IMark1627730459648"/> are located in the <text:span text:style-name="T19">file system</text:span>. A special web component in the framework handles requests for <text:alphabetical-index-mark-start text:id="IMark1627730458608"/>static <text:alphabetical-index-mark-start text:id="IMark1627730457248"/>resource<text:alphabetical-index-mark-end text:id="IMark1627730458608"/>s<text:alphabetical-index-mark-end text:id="IMark1627730457248"/>. It also <text:span text:style-name="T19">caches</text:span> requests to save bandwidth</text:p>
        </text:list-item>
      </text:list>
      <text:p text:style-name="Standard">The <text:alphabetical-index-mark-start text:id="IMark1627730459008"/>context<text:alphabetical-index-mark-end text:id="IMark1627730459008"/> path must be set in the constructor and can not be changed later.</text:p>
      <text:p text:style-name="P30"><text:span text:style-name="T6">Code ex</text:span>ample</text:p>
      <text:p text:style-name="Preformatted_20_Text"/>
      <text:p text:style-name="Preformatted_20_Text"><text:alphabetical-index-mark-start text:id="IMark1627730456608"/>Context<text:alphabetical-index-mark-end text:id="IMark1627730456608"/> := <text:alphabetical-index-mark-start text:id="IMark1627730457728"/>TdjWebApp<text:alphabetical-index-mark-start text:id="IMark1627730456128"/>Context<text:alphabetical-index-mark-end text:id="IMark1627730456128"/><text:alphabetical-index-mark-end text:id="IMark1627730457728"/>.Create('demo');</text:p>
      <text:p text:style-name="Preformatted_20_Text"/>
      <text:p text:style-name="P61"/>
      <text:p text:style-name="P61">By default, web components can not use HTTP sessions.</text:p>
      <text:p text:style-name="P61">A second parameter optionally enables HTTP sessions for the <text:alphabetical-index-mark-start text:id="IMark1627730456288"/>context<text:alphabetical-index-mark-end text:id="IMark1627730456288"/>.</text:p>
      <text:p text:style-name="P62"><text:span text:style-name="T6">Code ex</text:span>ample</text:p>
      <text:p text:style-name="P63"><text:s text:c="4"/></text:p>
      <text:p text:style-name="P63"><text:alphabetical-index-mark-start text:id="IMark1627730458608"/>Context<text:alphabetical-index-mark-end text:id="IMark1627730458608"/> := TdjWebApp<text:alphabetical-index-mark-start text:id="IMark1627730459488"/>Context<text:alphabetical-index-mark-end text:id="IMark1627730459488"/>.Create('demo', True);</text:p>
      <text:p text:style-name="P63"/>
      <text:h text:style-name="Heading_20_2" text:outline-level="2"><text:bookmark-start text:name="__RefHeading___Toc4106_661956188"/><text:alphabetical-index-mark-start text:id="IMark1627730458608"/>Path Mapping<text:bookmark-end text:name="__RefHeading___Toc4106_661956188"/><text:alphabetical-index-mark-end text:id="IMark1627730458608"/></text:h>
      <text:h text:style-name="Heading_20_3" text:outline-level="3"><text:bookmark-start text:name="__RefHeading___Toc4108_661956188"/><text:alphabetical-index-mark-start text:id="IMark1627730456128"/>Mapping rules<text:bookmark-end text:name="__RefHeading___Toc4108_661956188"/><text:alphabetical-index-mark-end text:id="IMark1627730456128"/></text:h>
      <text:list text:style-name="L25">
        <text:list-item>
          <text:p text:style-name="P64">the framework uses <text:span text:style-name="T17">path mappings</text:span> to find the matching Web Component for a request URL and executes its On... method handler </text:p>
        </text:list-item>
        <text:list-item>
          <text:p text:style-name="P64">if no match is found, and a default handler has been installed, the framework will try to serve the request using a <text:alphabetical-index-mark-start text:id="IMark1627730459168"/><text:span text:style-name="T17">static resource</text:span><text:alphabetical-index-mark-end text:id="IMark1627730459168"/> </text:p>
        </text:list-item>
        <text:list-item>
          <text:p text:style-name="P65">if no static file exists, the framework will return a 404 error </text:p>
        </text:list-item>
      </text:list>
      <text:p text:style-name="Heading_20_4"><text:alphabetical-index-mark-start text:id="IMark1627730456128"/>Support<text:alphabetical-index-mark-end text:id="IMark1627730456128"/>ed Mapping Syntax</text:p>
      <text:p text:style-name="Text_20_body"><text:alphabetical-index-mark-start text:id="IMark1627730458928"/>Support<text:alphabetical-index-mark-end text:id="IMark1627730458928"/>ed mapping styles in order of priority are</text:p>
      <text:list text:style-name="L26">
        <text:list-item>
          <text:p text:style-name="P66"><text:soft-page-break/>absolute paths, for example '/mypage.html' </text:p>
        </text:list-item>
        <text:list-item>
          <text:p text:style-name="P66">prefix mappings, for example '/myfolder/subfolder/*' </text:p>
        </text:list-item>
        <text:list-item>
          <text:p text:style-name="P67">suffix mappings, for example '*.html' or '*.page' </text:p>
        </text:list-item>
      </text:list>
      <text:p text:style-name="Text_20_body">If two web components declare overlapping mappings, they will be processed in the order of their priority. </text:p>
      <text:p text:style-name="Text_20_body">Example </text:p>
      <text:list text:style-name="L27">
        <text:list-item>
          <text:p text:style-name="P68">WebCompontentA maps to '*.html' </text:p>
        </text:list-item>
        <text:list-item>
          <text:p text:style-name="P69">WebCompontentB maps to '/myfolder/*' </text:p>
        </text:list-item>
      </text:list>
      <text:p text:style-name="Text_20_body">In this case, the resource /myfolder/index.html will be handled by WebComponentB because a prefix mapping (/myfolder/*) has a higher priority than an extension mapping. </text:p>
      <text:p text:style-name="Heading_20_4">Multiple mappings</text:p>
      <text:p text:style-name="Text_20_body">Multiple mappings per component are <text:alphabetical-index-mark-start text:id="IMark1627730458928"/>support<text:alphabetical-index-mark-end text:id="IMark1627730458928"/>ed. Example: </text:p>
      <text:list text:style-name="L28">
        <text:list-item>
          <text:p text:style-name="P70">WebCompontentA maps to '*.html', '*.doc' and '*.pdf' </text:p>
        </text:list-item>
        <text:list-item>
          <text:p text:style-name="P71">WebCompontentB maps to '/secure/*' and '/protected/*' </text:p>
        </text:list-item>
      </text:list>
      <text:p text:style-name="Text_20_body">With this mapping, resource /<text:alphabetical-index-mark-start text:id="IMark1627730459008"/>context<text:alphabetical-index-mark-end text:id="IMark1627730459008"/>/secure/example.pdf will be handled by WebComponentB, and resource /<text:alphabetical-index-mark-start text:id="IMark1627730459168"/>context<text:alphabetical-index-mark-end text:id="IMark1627730459168"/>/example.pdf will be handled by WebCompontentA.</text:p>
      <text:p text:style-name="Text_20_body"/>
      <text:h text:style-name="P72" text:outline-level="2"><text:bookmark-start text:name="__RefHeading___Toc4112_661956188"/><text:alphabetical-index-mark-start text:id="IMark1627730456128"/>Setting parameters of a context<text:bookmark-end text:name="__RefHeading___Toc4112_661956188"/><text:alphabetical-index-mark-end text:id="IMark1627730456128"/></text:h>
      <text:p text:style-name="P73">A <text:alphabetical-index-mark-start text:id="IMark1627730458608"/>context<text:alphabetical-index-mark-end text:id="IMark1627730458608"/> contains a key-value map which can be used to keep <text:alphabetical-index-mark-start text:id="IMark1627730459488"/>configuration<text:alphabetical-index-mark-end text:id="IMark1627730459488"/> information.</text:p>
      <text:p text:style-name="CodeExampleHeader"><text:span text:style-name="T6">Code </text:span>example</text:p>
      <text:p text:style-name="Delphi_20_Code"/>
      <text:p text:style-name="Delphi_20_Code"><text:alphabetical-index-mark-start text:id="IMark1627730457728"/>Context<text:alphabetical-index-mark-end text:id="IMark1627730457728"/>.<text:alphabetical-index-mark-start text:id="IMark1627730460048"/>SetInitParameter<text:alphabetical-index-mark-end text:id="IMark1627730460048"/>('key', 'value');</text:p>
      <text:p text:style-name="Delphi_20_Code"/>
      <text:p text:style-name="P73"/>
      <text:p text:style-name="P73">To access the <text:alphabetical-index-mark-start text:id="IMark1627730457808"/>context<text:alphabetical-index-mark-end text:id="IMark1627730457808"/> init parameter, use <text:alphabetical-index-mark-start text:id="IMark1627730457248"/>GetInitParameter<text:alphabetical-index-mark-end text:id="IMark1627730457248"/></text:p>
      <text:p text:style-name="P74"><text:span text:style-name="T6">Code ex</text:span>ample</text:p>
      <text:p text:style-name="P75"/>
      <text:p text:style-name="P75">procedure TExampleComponent.OnGet(Request: <text:alphabetical-index-mark-start text:id="IMark1627730456288"/>TdjRequest<text:alphabetical-index-mark-end text:id="IMark1627730456288"/>; Response: <text:alphabetical-index-mark-start text:id="IMark1627730457248"/>TdjResponse<text:alphabetical-index-mark-end text:id="IMark1627730457248"/>);</text:p>
      <text:p text:style-name="P75">var</text:p>
      <text:p text:style-name="P75"><text:s text:c="2"/>Param: string;</text:p>
      <text:p text:style-name="P75">begin</text:p>
      <text:p text:style-name="P75"><text:s text:c="2"/>Param := Config.Get<text:alphabetical-index-mark-start text:id="IMark1627730457728"/>Context<text:alphabetical-index-mark-end text:id="IMark1627730457728"/>.<text:alphabetical-index-mark-start text:id="IMark1627730459488"/><text:alphabetical-index-mark-start text:id="IMark1627730458608"/>GetInitParameter<text:alphabetical-index-mark-end text:id="IMark1627730458608"/><text:alphabetical-index-mark-end text:id="IMark1627730459488"/>('key');</text:p>
      <text:p text:style-name="P75">end;</text:p>
      <text:p text:style-name="P75"/>
      <text:p text:style-name="P73"/>
      <text:p text:style-name="P73">Use <text:alphabetical-index-mark-start text:id="IMark1627730456128"/><text:span text:style-name="T17">GetInitParameter</text:span><text:alphabetical-index-mark-end text:id="IMark1627730456128"/><text:span text:style-name="T17">Names</text:span> to get a list of all parameter names:</text:p>
      <text:p text:style-name="P30"><text:span text:style-name="T6">Code ex</text:span>ample</text:p>
      <text:p text:style-name="P75"/>
      <text:p text:style-name="P75">Config.Get<text:alphabetical-index-mark-start text:id="IMark1627730457728"/>Context<text:alphabetical-index-mark-end text:id="IMark1627730457728"/>.<text:alphabetical-index-mark-start text:id="IMark1627730458608"/><text:alphabetical-index-mark-start text:id="IMark1627730457808"/>GetInitParameter<text:alphabetical-index-mark-end text:id="IMark1627730457808"/>Names<text:alphabetical-index-mark-end text:id="IMark1627730458608"/>;</text:p>
      <text:p text:style-name="P75"/>
      <text:p text:style-name="Standard"/>
      <text:h text:style-name="Heading_20_2" text:outline-level="2"><text:bookmark-start text:name="__RefHeading___Toc4114_661956188"/>Unicode (<text:alphabetical-index-mark-start text:id="IMark1627730459008"/>UTF-8<text:alphabetical-index-mark-end text:id="IMark1627730459008"/>)<text:bookmark-end text:name="__RefHeading___Toc4114_661956188"/></text:h>
      <text:p text:style-name="Standard">By setting the Response <text:alphabetical-index-mark-start text:id="IMark1627730487008"/>ContentType<text:alphabetical-index-mark-end text:id="IMark1627730487008"/> and <text:alphabetical-index-mark-start text:id="IMark1627730493888"/>CharSet<text:alphabetical-index-mark-end text:id="IMark1627730493888"/>, the server can respond with Unicode content<text:note text:id="ftn1" text:note-class="footnote"><text:note-citation>1</text:note-citation><text:note-body><text:p text:style-name="Footnote">Response.ContentType should be set before Response.CharSet</text:p></text:note-body></text:note>:</text:p>
      <text:p text:style-name="P30"><text:span text:style-name="T6">Code ex</text:span>ample</text:p>
      <text:p text:style-name="Preformatted_20_Text"/>
      <text:p text:style-name="Preformatted_20_Text">procedure THelloPage.OnGet(Request: <text:alphabetical-index-mark-start text:id="IMark1627730487008"/>TdjRequest<text:alphabetical-index-mark-end text:id="IMark1627730487008"/>;</text:p>
      <text:p text:style-name="Preformatted_20_Text"><text:s text:c="2"/>Response: <text:alphabetical-index-mark-start text:id="IMark1627730487008"/>TdjResponse<text:alphabetical-index-mark-end text:id="IMark1627730487008"/>);</text:p>
      <text:p text:style-name="Preformatted_20_Text"><text:soft-page-break/>begin</text:p>
      <text:p text:style-name="Preformatted_20_Text"><text:s text:c="2"/>Response.<text:alphabetical-index-mark-start text:id="IMark1627730487008"/>ContentText<text:alphabetical-index-mark-end text:id="IMark1627730487008"/> := '<text:span text:style-name="T28">中文</text:span>';</text:p>
      <text:p text:style-name="Preformatted_20_Text"><text:s text:c="2"/>Response.<text:alphabetical-index-mark-start text:id="IMark1627730487008"/>ContentType<text:alphabetical-index-mark-end text:id="IMark1627730487008"/> := 'text/plain';</text:p>
      <text:p text:style-name="Preformatted_20_Text"><text:s text:c="2"/>Response.<text:alphabetical-index-mark-start text:id="IMark1627730487008"/>CharSet<text:alphabetical-index-mark-end text:id="IMark1627730487008"/> := '<text:alphabetical-index-mark-start text:id="IMark1627730493888"/>utf-8<text:alphabetical-index-mark-end text:id="IMark1627730493888"/>'; </text:p>
      <text:p text:style-name="Preformatted_20_Text">end;</text:p>
      <text:p text:style-name="Preformatted_20_Text"/>
      <text:p text:style-name="Heading_20_4"/>
      <text:h text:style-name="Heading_20_2" text:outline-level="2"><text:bookmark-start text:name="__RefHeading___Toc4116_661956188"/><text:alphabetical-index-mark-start text:id="IMark1627730487008"/>HTML Encoding<text:alphabetical-index-mark-end text:id="IMark1627730487008"/> of <text:alphabetical-index-mark-start text:id="IMark1627730493888"/>special characters<text:bookmark-end text:name="__RefHeading___Toc4116_661956188"/><text:alphabetical-index-mark-end text:id="IMark1627730493888"/></text:h>
      <text:p text:style-name="Standard">If the web component returns HTML, some characters have to be replaced as they are HTML entities.</text:p>
      <text:p text:style-name="Standard">Unit <text:alphabetical-index-mark-start text:id="IMark1627730487008"/><text:span text:style-name="T17">djGlobal</text:span><text:alphabetical-index-mark-end text:id="IMark1627730487008"/> contains the <text:alphabetical-index-mark-start text:id="IMark1627730493888"/><text:span text:style-name="T17">HTMLEncode</text:span><text:alphabetical-index-mark-end text:id="IMark1627730493888"/> function which replaces &lt;, &gt; , &amp; and “ to the corresponding HTML entities <text:span text:style-name="T29">&amp;lt;</text:span>, <text:span text:style-name="T17">&amp;gt;</text:span>, <text:span text:style-name="T17">&amp;amp;</text:span> and <text:span text:style-name="T17">&amp;quot;</text:span>.</text:p>
      <text:p text:style-name="Standard">Important: only inner text (between HTML elements) must be encoded.</text:p>
      <text:p text:style-name="P30"><text:span text:style-name="T6">Code ex</text:span>ample</text:p>
      <text:p text:style-name="Preformatted_20_Text"/>
      <text:p text:style-name="Preformatted_20_Text">procedure THelloPage.OnGet(Request: <text:alphabetical-index-mark-start text:id="IMark1627730459008"/>TdjRequest<text:alphabetical-index-mark-end text:id="IMark1627730459008"/>;</text:p>
      <text:p text:style-name="Preformatted_20_Text"><text:s text:c="2"/>Response: <text:alphabetical-index-mark-start text:id="IMark1627730457728"/>TdjResponse<text:alphabetical-index-mark-end text:id="IMark1627730457728"/>);</text:p>
      <text:p text:style-name="Preformatted_20_Text">begin</text:p>
      <text:p text:style-name="Preformatted_20_Text"><text:s text:c="2"/>Response.<text:alphabetical-index-mark-start text:id="IMark1627730456288"/>ContentText<text:alphabetical-index-mark-end text:id="IMark1627730456288"/> := '<text:span text:style-name="T17">&lt;html&gt;&lt;p&gt;' + </text:span><text:alphabetical-index-mark-start text:id="IMark1627730456608"/><text:span text:style-name="T17">HTMLEncode</text:span><text:alphabetical-index-mark-end text:id="IMark1627730456608"/><text:span text:style-name="T17">('rhythm &amp; blues') + '&lt;/p&gt;&lt;/html&gt;</text:span>';</text:p>
      <text:p text:style-name="Preformatted_20_Text"><text:s text:c="2"/>Response.<text:alphabetical-index-mark-start text:id="IMark1627730458928"/>ContentType<text:alphabetical-index-mark-end text:id="IMark1627730458928"/> := 'text/html';</text:p>
      <text:p text:style-name="Preformatted_20_Text"><text:s text:c="2"/>Response.<text:alphabetical-index-mark-start text:id="IMark1627730457248"/>CharSet<text:alphabetical-index-mark-end text:id="IMark1627730457248"/> := '<text:alphabetical-index-mark-start text:id="IMark1627730456128"/>utf-8<text:alphabetical-index-mark-end text:id="IMark1627730456128"/>';</text:p>
      <text:p text:style-name="Preformatted_20_Text">end;</text:p>
      <text:p text:style-name="Preformatted_20_Text"/>
      <text:p text:style-name="Standard"/>
      <text:h text:style-name="P76" text:outline-level="1"><text:bookmark-start text:name="__RefHeading___Toc4425_921300063"/><text:span text:style-name="T23">Introduction to </text:span>Web Filters<text:bookmark-end text:name="__RefHeading___Toc4425_921300063"/></text:h>
      <text:h text:style-name="P77" text:outline-level="2"><text:bookmark-start text:name="__RefHeading___Toc4100_661956188 Kopie 1"/>General structure<text:bookmark-end text:name="__RefHeading___Toc4100_661956188 Kopie 1"/></text:h>
      <text:p text:style-name="P78">A Web <text:span text:style-name="T23">Filter</text:span> <text:span text:style-name="T23">class must fulfill two</text:span> requirements:</text:p>
      <text:list text:style-name="L29">
        <text:list-item>
          <text:p text:style-name="P79"><text:span text:style-name="T24">it must be a subclass of </text:span><text:span text:style-name="T25">TdjWebFilter</text:span></text:p>
        </text:list-item>
        <text:list-item>
          <text:p text:style-name="P79"><text:span text:style-name="T24">it must override at least </text:span><text:span text:style-name="T25">the DoFilter method</text:span></text:p>
        </text:list-item>
      </text:list>
      <text:p text:style-name="P78">It may also optionally override other meth<text:span text:style-name="T23">ods:</text:span></text:p>
      <text:list text:style-name="L30">
        <text:list-item>
          <text:p text:style-name="P80"><text:span text:style-name="T24">the </text:span><text:span text:style-name="T25">Init</text:span><text:span text:style-name="T24"> method</text:span></text:p>
        </text:list-item>
        <text:list-item>
          <text:p text:style-name="P81">the destructor</text:p>
        </text:list-item>
      </text:list>
      <text:h text:style-name="P77" text:outline-level="2"><text:bookmark-start text:name="__RefHeading___Toc4427_921300063"/>Declaration <text:span text:style-name="T30">of DoFilter</text:span><text:bookmark-end text:name="__RefHeading___Toc4427_921300063"/></text:h>
      <text:p text:style-name="P82">A web filter must be inherited from TdjWebFilter and at least implement the DoFilter method.</text:p>
      <text:h text:style-name="P83" text:outline-level="3"><text:bookmark-start text:name="__RefHeading___Toc4429_921300063"/>Example: add text to the response<text:bookmark-end text:name="__RefHeading___Toc4429_921300063"/></text:h>
      <text:p text:style-name="P82">In this example, the filter first invokes the DoFilter method of the filter chain, and finally appends a hard coded text to the response.</text:p>
      <text:p text:style-name="P84"><text:span text:style-name="T6">Code ex</text:span>ample</text:p>
      <text:p text:style-name="P85"><text:line-break/>TTestFilter = class(TdjWebFilter)</text:p>
      <text:p text:style-name="P85">public</text:p>
      <text:p text:style-name="P85"><text:s text:c="2"/>procedure DoFilter(Context: TdjServerContext; Request: TdjRequest;</text:p>
      <text:p text:style-name="P85"><text:s text:c="4"/>Response: TdjResponse; const Chain: IWebFilterChain); override;</text:p>
      <text:p text:style-name="P85">end;<text:line-break/><text:line-break/>procedure TTestFilter.DoFilter(Context: TdjServerContext; Request: TdjRequest;</text:p>
      <text:p text:style-name="P85"><text:s text:c="2"/>Response: TdjResponse; const Chain: IWebFilterChain);</text:p>
      <text:p text:style-name="P85">begin</text:p>
      <text:p text:style-name="P85"><text:s text:c="2"/>Chain.DoFilter(Context, Request, Response);</text:p>
      <text:p text:style-name="P85"><text:s text:c="2"/>Response.ContentText := Response.ContentText + ' (filtered)';</text:p>
      <text:p text:style-name="P85">end;<text:line-break/></text:p>
      <text:p text:style-name="P86"/>
      <text:h text:style-name="P87" text:outline-level="2"><text:bookmark-start text:name="__RefHeading___Toc4431_921300063"/><text:soft-page-break/>Declaration of an initialization method<text:bookmark-end text:name="__RefHeading___Toc4431_921300063"/></text:h>
      <text:p text:style-name="P82">A web filter may optionally declare a Init method which will be called by the framework on startup.</text:p>
      <text:h text:style-name="P83" text:outline-level="3"><text:bookmark-start text:name="__RefHeading___Toc4433_921300063"/>Example: add an initialization parameter value to the response<text:bookmark-end text:name="__RefHeading___Toc4433_921300063"/></text:h>
      <text:p text:style-name="P88">The example filter below reads a value from the filter configuration, and stores it in a field for later usage.</text:p>
      <text:p text:style-name="P84"><text:span text:style-name="T6">Code ex</text:span>ample</text:p>
      <text:p text:style-name="P85"><text:line-break/>TFilterWithInit = class(TdjWebFilter)</text:p>
      <text:p text:style-name="P85">private</text:p>
      <text:p text:style-name="P85"><text:s text:c="2"/>FInitParam: string;</text:p>
      <text:p text:style-name="P85">public</text:p>
      <text:p text:style-name="P85"><text:s text:c="2"/>procedure Init; override;</text:p>
      <text:p text:style-name="P85"><text:s text:c="2"/>procedure DoFilter(Context: TdjServerContext; Request: TdjRequest;</text:p>
      <text:p text:style-name="P85"><text:s text:c="4"/>Response: TdjResponse; const Chain: IWebFilterChain); override;</text:p>
      <text:p text:style-name="P85">end;<text:line-break/><text:line-break/>procedure TFilterWithInit.Init;</text:p>
      <text:p text:style-name="P85">begin</text:p>
      <text:p text:style-name="P85"><text:s text:c="2"/>FInitParam := Config.GetInitParameter('key');</text:p>
      <text:p text:style-name="P85">end;<text:line-break/><text:line-break/>procedure TFilterWithInit.DoFilter(Context: TdjServerContext;</text:p>
      <text:p text:style-name="P85"><text:s text:c="2"/>Request: TdjRequest; Response: TdjResponse; const Chain: IWebFilterChain);</text:p>
      <text:p text:style-name="P85">begin</text:p>
      <text:p text:style-name="P85"><text:s text:c="2"/>Chain.DoFilter(Context, Request, Response);</text:p>
      <text:p text:style-name="P85"><text:s text:c="2"/>Response.ContentText := Response.ContentText + 'Param key=' + FInitParam;</text:p>
      <text:p text:style-name="P85">end; </text:p>
      <text:p text:style-name="P86"/>
      <text:p text:style-name="P89">The next code excerpt is a test which uses the filter and verifies that the GET request to the resource has the expected request body content.</text:p>
      <text:p text:style-name="P84"><text:span text:style-name="T6">Code ex</text:span>ample</text:p>
      <text:p text:style-name="P90">procedure TAPIConfigTests.TestFilterWithInit;</text:p>
      <text:p text:style-name="P90">var</text:p>
      <text:p text:style-name="P90"><text:s text:c="2"/>Server: TdjServer;</text:p>
      <text:p text:style-name="P90"><text:s text:c="2"/>Context: TdjWebAppContext;</text:p>
      <text:p text:style-name="P90">begin</text:p>
      <text:p text:style-name="P90"><text:s text:c="2"/>// configure</text:p>
      <text:p text:style-name="P90"><text:s text:c="2"/>Context := TdjWebAppContext.Create('web');</text:p>
      <text:p text:style-name="P90"><text:s text:c="2"/>Context.AddWebComponent(TExamplePage, '*.filter');</text:p>
      <text:p text:style-name="P90"><text:s text:c="2"/>with Context.AddWebFilter(TTestFilterWithInit, '*.filter') do</text:p>
      <text:p text:style-name="P90"><text:s text:c="2"/>begin</text:p>
      <text:p text:style-name="P90"><text:s text:c="4"/>SetInitParameter('key', 'Hello, World V3!');</text:p>
      <text:p text:style-name="P90"><text:s text:c="2"/>end;</text:p>
      <text:p text:style-name="P90"/>
      <text:p text:style-name="P90"><text:s text:c="2"/>// run</text:p>
      <text:p text:style-name="P90"><text:s text:c="2"/>Server := TdjServer.Create;</text:p>
      <text:p text:style-name="P90"><text:s text:c="2"/>try</text:p>
      <text:p text:style-name="P90"><text:soft-page-break/><text:s text:c="4"/>Server.Add(Context);</text:p>
      <text:p text:style-name="P90"><text:s text:c="4"/>Server.Start;</text:p>
      <text:p text:style-name="P90"><text:s text:c="4"/>CheckGETResponseEquals('example, Param key=Hello, World V3!', '/web/page.filter');</text:p>
      <text:p text:style-name="P90"><text:s text:c="2"/>finally</text:p>
      <text:p text:style-name="P90"><text:s text:c="4"/>Server.Free;</text:p>
      <text:p text:style-name="P90"><text:s text:c="2"/>end;</text:p>
      <text:p text:style-name="P90">end;<text:line-break/></text:p>
      <text:p text:style-name="P86"/>
      <text:h text:style-name="Heading_20_1" text:outline-level="1"><text:bookmark-start text:name="__RefHeading___Toc4118_661956188"/>Web Components and <text:alphabetical-index-mark-start text:id="IMark1627730458608"/>multi-threading<text:bookmark-end text:name="__RefHeading___Toc4118_661956188"/><text:alphabetical-index-mark-end text:id="IMark1627730458608"/></text:h>
      <text:h text:style-name="Heading_20_2" text:outline-level="2"><text:bookmark-start text:name="__RefHeading___Toc4120_661956188"/>Design rules for your Web Components<text:bookmark-end text:name="__RefHeading___Toc4120_661956188"/></text:h>
      <text:h text:style-name="P56" text:outline-level="3"><text:bookmark-start text:name="__RefHeading___Toc4122_661956188"/>Design for <text:alphabetical-index-mark-start text:id="IMark1627730456608"/>multi-threaded<text:alphabetical-index-mark-end text:id="IMark1627730456608"/> operation<text:bookmark-end text:name="__RefHeading___Toc4122_661956188"/></text:h>
      <text:p text:style-name="Standard"><text:span text:style-name="T24">When we say that a program is </text:span><text:alphabetical-index-mark-start text:id="IMark1627730457248"/><text:span text:style-name="T31">multi-threaded</text:span><text:alphabetical-index-mark-end text:id="IMark1627730457248"/><text:span text:style-name="T24">, we are not implying that the program runs two separate instances simultaneously (as if you concurrently executed the program twice from the command line). Rather, we are saying that the same instance (executed only once) spawns multiple threads that process this </text:span><text:span text:style-name="T31">single instance of code</text:span><text:span text:style-name="T24">. This means that more than one sequential flow of control runs through the same memory block.</text:span></text:p>
      <text:p text:style-name="P53">When multiple threads execute a single instance of a program and therefore share memory, multiple threads could possibly be attempting to read and write to the same place in memory.</text:p>
      <text:p text:style-name="Standard"><text:span text:style-name="T24">What happens if you introduce a field in your Web Component and use it in the </text:span><text:alphabetical-index-mark-start text:id="IMark1627730458928"/><text:span text:style-name="T24">OnGet</text:span><text:alphabetical-index-mark-end text:id="IMark1627730458928"/><text:span text:style-name="T24"> (or </text:span><text:alphabetical-index-mark-start text:id="IMark1627730459488"/><text:span text:style-name="T24">OnPost</text:span><text:alphabetical-index-mark-end text:id="IMark1627730459488"/><text:span text:style-name="T24">) method, when two or more threads execute it at the same time? Look at the example below. If two threads execute </text:span><text:alphabetical-index-mark-start text:id="IMark1627730457728"/><text:span text:style-name="T24">OnGet</text:span><text:alphabetical-index-mark-end text:id="IMark1627730457728"/><text:span text:style-name="T24">, they both will read and increment the value of the private </text:span><text:span text:style-name="T31">MyVar</text:span><text:span text:style-name="T24"> variable, with unexpected results.</text:span></text:p>
      <text:p text:style-name="P91"><text:span text:style-name="T6">Code ex</text:span>ample</text:p>
      <text:p text:style-name="Preformatted_20_Text">type</text:p>
      <text:p text:style-name="Preformatted_20_Text"><text:s text:c="2"/><text:alphabetical-index-mark-start text:id="IMark1627730459568"/><text:alphabetical-index-mark-start text:id="IMark1627730457728"/>TMyWebPage<text:alphabetical-index-mark-end text:id="IMark1627730457728"/><text:alphabetical-index-mark-end text:id="IMark1627730459568"/> = class(<text:alphabetical-index-mark-start text:id="IMark1627730456128"/><text:alphabetical-index-mark-start text:id="IMark1627730457808"/>TdjWebComponent<text:alphabetical-index-mark-end text:id="IMark1627730457808"/><text:alphabetical-index-mark-end text:id="IMark1627730456128"/>)</text:p>
      <text:p text:style-name="Preformatted_20_Text"><text:s text:c="2"/>private</text:p>
      <text:p text:style-name="Preformatted_20_Text"><text:s text:c="4"/>MyVar: Integer;</text:p>
      <text:p text:style-name="Preformatted_20_Text"><text:s text:c="2"/>public</text:p>
      <text:p text:style-name="Preformatted_20_Text"><text:s text:c="4"/>procedure <text:alphabetical-index-mark-start text:id="IMark1627730460048"/>OnGet<text:alphabetical-index-mark-end text:id="IMark1627730460048"/>(<text:alphabetical-index-mark-start text:id="IMark1627730456288"/>Request<text:alphabetical-index-mark-end text:id="IMark1627730456288"/>: <text:alphabetical-index-mark-start text:id="IMark1627730457248"/><text:alphabetical-index-mark-start text:id="IMark1627730456608"/><text:alphabetical-index-mark-start text:id="IMark1627730457728"/>TdjRequest<text:alphabetical-index-mark-end text:id="IMark1627730457728"/><text:alphabetical-index-mark-end text:id="IMark1627730456608"/><text:alphabetical-index-mark text:string-value=" "/><text:alphabetical-index-mark-end text:id="IMark1627730457248"/><text:alphabetical-index-mark text:string-value=" "/>; <text:alphabetical-index-mark-start text:id="IMark1627730458928"/>Response<text:alphabetical-index-mark-end text:id="IMark1627730458928"/>:</text:p>
      <text:p text:style-name="Preformatted_20_Text"><text:s text:c="6"/><text:alphabetical-index-mark-start text:id="IMark1627730456128"/><text:alphabetical-index-mark-start text:id="IMark1627730456288"/><text:alphabetical-index-mark-start text:id="IMark1627730459168"/>TdjResponse<text:alphabetical-index-mark-end text:id="IMark1627730459168"/><text:alphabetical-index-mark-end text:id="IMark1627730456288"/><text:alphabetical-index-mark text:string-value=" "/><text:alphabetical-index-mark-end text:id="IMark1627730456128"/><text:alphabetical-index-mark text:string-value=" "/>); override;</text:p>
      <text:p text:style-name="Preformatted_20_Text"><text:s text:c="2"/>end;</text:p>
      <text:p text:style-name="Preformatted_20_Text"/>
      <text:p text:style-name="Preformatted_20_Text">implementation</text:p>
      <text:p text:style-name="Preformatted_20_Text"/>
      <text:p text:style-name="Preformatted_20_Text">{ <text:alphabetical-index-mark-start text:id="IMark1627730457248"/>TMyWebPage<text:alphabetical-index-mark-end text:id="IMark1627730457248"/> }</text:p>
      <text:p text:style-name="Preformatted_20_Text"/>
      <text:p text:style-name="Preformatted_20_Text">procedure <text:alphabetical-index-mark-start text:id="IMark1627730457248"/>TMyWebPage<text:alphabetical-index-mark-end text:id="IMark1627730457248"/>.<text:alphabetical-index-mark-start text:id="IMark1627730456128"/>OnGet<text:alphabetical-index-mark-end text:id="IMark1627730456128"/>(<text:alphabetical-index-mark-start text:id="IMark1627730456288"/>Request<text:alphabetical-index-mark-end text:id="IMark1627730456288"/>: <text:alphabetical-index-mark-start text:id="IMark1627730456608"/><text:alphabetical-index-mark-start text:id="IMark1627730459488"/>TdjRequest<text:alphabetical-index-mark-end text:id="IMark1627730459488"/><text:alphabetical-index-mark text:string-value=" "/><text:alphabetical-index-mark-end text:id="IMark1627730456608"/><text:alphabetical-index-mark text:string-value=" "/>;</text:p>
      <text:p text:style-name="Preformatted_20_Text"><text:s text:c="2"/><text:alphabetical-index-mark-start text:id="IMark1627730460048"/>Response<text:alphabetical-index-mark-end text:id="IMark1627730460048"/>: <text:alphabetical-index-mark-start text:id="IMark1627730457808"/><text:alphabetical-index-mark-start text:id="IMark1627730458608"/>TdjResponse<text:alphabetical-index-mark-end text:id="IMark1627730458608"/><text:alphabetical-index-mark text:string-value=" "/><text:alphabetical-index-mark-end text:id="IMark1627730457808"/><text:alphabetical-index-mark text:string-value=" "/>);</text:p>
      <text:p text:style-name="Preformatted_20_Text">begin</text:p>
      <text:p text:style-name="Preformatted_20_Text"><text:s text:c="2"/>WriteLn(MyVar);</text:p>
      <text:p text:style-name="Preformatted_20_Text"><text:s text:c="2"/></text:p>
      <text:p text:style-name="Preformatted_20_Text"><text:s text:c="2"/>Inc(Counter);</text:p>
      <text:p text:style-name="Preformatted_20_Text"/>
      <text:p text:style-name="Preformatted_20_Text"><text:s text:c="2"/>// ... other code</text:p>
      <text:p text:style-name="Preformatted_20_Text"><text:s text:c="2"/></text:p>
      <text:p text:style-name="Preformatted_20_Text"><text:s text:c="2"/>WriteLn(MyVar);</text:p>
      <text:p text:style-name="P58">end;</text:p>
      <text:p text:style-name="P53"/>
      <text:p text:style-name="Standard"><text:soft-page-break/><text:span text:style-name="T24">It would not be practical to build a site that required a Web Component to be instantiated for each </text:span><text:alphabetical-index-mark-start text:id="IMark1627730459488"/><text:span text:style-name="T24">request</text:span><text:alphabetical-index-mark-end text:id="IMark1627730459488"/><text:span text:style-name="T24">. </text:span><text:span text:style-name="T32">Web Components</text:span><text:span text:style-name="T24"> are </text:span><text:alphabetical-index-mark-start text:id="IMark1627730457728"/><text:span text:style-name="T32">multi-threaded</text:span><text:alphabetical-index-mark-end text:id="IMark1627730457728"/><text:span text:style-name="T24"> by design, this means a single instance will handle all </text:span><text:alphabetical-index-mark-start text:id="IMark1627730459008"/><text:span text:style-name="T24">HTTP</text:span><text:alphabetical-index-mark-end text:id="IMark1627730459008"/><text:span text:style-name="T24"> </text:span><text:alphabetical-index-mark-start text:id="IMark1627730457248"/><text:span text:style-name="T24">request</text:span><text:alphabetical-index-mark-end text:id="IMark1627730457248"/><text:span text:style-name="T24">s.</text:span></text:p>
      <text:p text:style-name="Standard"><text:span text:style-name="T24">The framework allocates a thread for </text:span><text:span text:style-name="T31">each new </text:span><text:alphabetical-index-mark-start text:id="IMark1627730457728"/><text:span text:style-name="T31">request</text:span><text:alphabetical-index-mark-end text:id="IMark1627730457728"/><text:span text:style-name="T24"> for a single Web Component without any special programming. </text:span></text:p>
      <text:p text:style-name="Standard"><text:span text:style-name="T24">To avoid multithreading problems, only use </text:span><text:span text:style-name="T31">read-only</text:span><text:span text:style-name="T24"> or </text:span><text:span text:style-name="T31">application-wide</text:span><text:span text:style-name="T24"> variables in a Web Component.</text:span></text:p>
      <text:p text:style-name="P53">To ensure we have our own unique variable instance for each thread, we also can simply move the declaration of the variable from within the class to within the method using it.</text:p>
      <text:p text:style-name="Standard">If you discover that you must share a variable between Web Components and this variable is going to be read from and written to by multiple threads (and you are not storing it in a database), then you will require thread synchronization.</text:p>
      <text:h text:style-name="Heading_20_3" text:outline-level="3"><text:bookmark-start text:name="__RefHeading___Toc4124_661956188"/>Synchronization<text:bookmark-end text:name="__RefHeading___Toc4124_661956188"/></text:h>
      <text:p text:style-name="Standard">Thread synchronization is an important technique to know, but not one you want to throw at a solution unless required. Anytime you synchronize blocks of code, you introduce bottlenecks into your system.</text:p>
      <text:p text:style-name="Standard"><text:span text:style-name="T33">Under most circumstances, there is only one instance of your Web Component, no matter how many client </text:span><text:alphabetical-index-mark-start text:id="IMark1627730458928"/><text:span text:style-name="T33">request</text:span><text:alphabetical-index-mark-end text:id="IMark1627730458928"/><text:span text:style-name="T33">s are in process. That means that at any given moment, there may be many threads running inside the </text:span><text:span text:style-name="T34">S</text:span><text:span text:style-name="Teletype"><text:span text:style-name="T34">ervice</text:span></text:span><text:span text:style-name="T33"> method of your solo instance, all sharing the same instance data and potentially stepping on each others toes. This means that you should be careful to </text:span><text:span text:style-name="T35">synchronize</text:span><text:span text:style-name="T33"> access to shared data (instance variables).</text:span></text:p>
      <text:h text:style-name="Heading_20_2" text:outline-level="2"><text:bookmark-start text:name="__RefHeading___Toc4126_661956188"/>Web Components thread implementation<text:bookmark-end text:name="__RefHeading___Toc4126_661956188"/></text:h>
      <text:h text:style-name="Heading_20_3" text:outline-level="3"><text:bookmark-start text:name="__RefHeading___Toc4128_661956188"/>Q: <text:bookmark text:name="servlet-threaded"/>Are Web Components <text:alphabetical-index-mark-start text:id="IMark1627730457728"/>multi-threaded<text:alphabetical-index-mark-end text:id="IMark1627730457728"/>? <text:bookmark-end text:name="__RefHeading___Toc4128_661956188"/></text:h>
      <text:p text:style-name="Text_20_body">A: Yes, Web Components are normally <text:alphabetical-index-mark-start text:id="IMark1627730456288"/>multi-threaded<text:alphabetical-index-mark-end text:id="IMark1627730456288"/>. The Web Component server allocates a thread for each new <text:alphabetical-index-mark-start text:id="IMark1627730456608"/>request<text:alphabetical-index-mark-end text:id="IMark1627730456608"/> for a single Web Component without any special programming. Each <text:alphabetical-index-mark-start text:id="IMark1627730459488"/>request<text:alphabetical-index-mark-end text:id="IMark1627730459488"/> thread for your Web Component runs as if a single user were accessing it alone, but you can use static variables to store and present information that is common to all threads, like a hit counter for instance. </text:p>
      <text:p text:style-name="Heading_20_4">Q: <text:bookmark text:name="container-thread-impl"/>Are you saying there is only one Web Component instance for all <text:alphabetical-index-mark-start text:id="IMark1627730458608"/>request<text:alphabetical-index-mark-end text:id="IMark1627730458608"/>s?</text:p>
      <text:p text:style-name="Standard">A: The way that the server handles <text:alphabetical-index-mark-start text:id="IMark1627730456608"/>request<text:alphabetical-index-mark-end text:id="IMark1627730456608"/>s is not prescribed to this extent; it may use a single Web Component, it may use Web Component pooling, it depends on the internal system architecture. New threads are not necessarily created for every Web Component <text:alphabetical-index-mark-start text:id="IMark1627730459008"/>request<text:alphabetical-index-mark-end text:id="IMark1627730459008"/> but may be recycled through a worker thread pool for efficiency. The point is that you should write your Web Component code to take account of a <text:alphabetical-index-mark-start text:id="IMark1627730457248"/>multi-threaded<text:alphabetical-index-mark-end text:id="IMark1627730457248"/> <text:alphabetical-index-mark-start text:id="IMark1627730458608"/>context<text:alphabetical-index-mark-end text:id="IMark1627730458608"/> regardless of the server implementation you happen to be using.</text:p>
      <text:p text:style-name="Heading_20_4"><text:bookmark text:name="servletaccept"/><text:soft-page-break/>Q: Can my Web Component control the number of threads it accepts? </text:p>
      <text:p text:style-name="Standard">A: Your Web Component should be designed to be thread safe and not to anticipate any limit to the number of concurrent <text:alphabetical-index-mark-start text:id="IMark1627730458608"/>request<text:alphabetical-index-mark-end text:id="IMark1627730458608"/>s it will receive.</text:p>
      <text:h text:style-name="P92" text:outline-level="1"><text:bookmark-start text:name="__RefHeading___Toc4130_661956188"/>Appendix<text:bookmark-end text:name="__RefHeading___Toc4130_661956188"/></text:h>
      <text:h text:style-name="P93" text:outline-level="2"><text:bookmark-start text:name="__RefHeading___Toc4574_1042170583"/>Breaking Changes<text:bookmark-end text:name="__RefHeading___Toc4574_1042170583"/></text:h>
      <text:h text:style-name="Heading_20_3" text:outline-level="3"><text:bookmark-start text:name="__RefHeading___Toc4576_1042170583"/>Breaking Changes in v 3.0<text:bookmark-end text:name="__RefHeading___Toc4576_1042170583"/></text:h>
      <text:list text:style-name="L31">
        <text:list-item>
          <text:p text:style-name="P94">Remove deprecated methods</text:p>
        </text:list-item>
        <text:list-item>
          <text:p text:style-name="P94">Use port 8080 as by default instead of port 80</text:p>
        </text:list-item>
      </text:list>
      <text:h text:style-name="P95" text:outline-level="2"><text:bookmark-start text:name="__RefHeading___Toc4132_661956188"/>Frequently Asked Questions<text:bookmark-end text:name="__RefHeading___Toc4132_661956188"/></text:h>
      <text:h text:style-name="Heading_20_3" text:outline-level="3"><text:bookmark-start text:name="__RefHeading___Toc4134_661956188"/>How do I allow connections from other computers?<text:bookmark-end text:name="__RefHeading___Toc4134_661956188"/></text:h>
      <text:p text:style-name="Standard">By default TdjServer binds to 127.0.0.1, which does not allow connections from other computers.</text:p>
      <text:p text:style-name="Standard">Solution: either bind the server to IP address 0.0.0.0, or to the IP address of a specific network adapter.</text:p>
      <text:p text:style-name="P30"><text:span text:style-name="T6">Code ex</text:span>ample</text:p>
      <text:p text:style-name="Delphi_20_Code"><text:line-break/>// allow incoming connections to network adapter 10.10.1.50</text:p>
      <text:p text:style-name="Delphi_20_Code">Server := TdjServer.Create('10.10.1.50', 8080);<text:line-break/></text:p>
      <text:p text:style-name="Standard"/>
      <text:p text:style-name="Standard">Also be aware that the firewall must be configured to allow incoming connections.</text:p>
      <text:h text:style-name="Heading_20_3" text:outline-level="3"><text:bookmark-start text:name="__RefHeading___Toc4136_661956188"/>Why does the server fail to run with “port <text:span text:style-name="T1">already in use” error</text:span>?<text:bookmark-end text:name="__RefHeading___Toc4136_661956188"/></text:h>
      <text:p text:style-name="P96">If a server application is already listening on <text:span text:style-name="T1">the same </text:span>port <text:span text:style-name="T1">as your code</text:span>, your program will not be able to open the same port.</text:p>
      <text:p text:style-name="P96"><text:span text:style-name="T36">H</text:span>ere are two <text:span text:style-name="T36">ways </text:span>find the process which opened the port:</text:p>
      <text:p text:style-name="P97">Find the process by its process ID</text:p>
      <text:p text:style-name="Standard">Go to a command line and enter</text:p>
      <text:p text:style-name="Delphi_20_Code"><text:soft-page-break/><text:line-break/>netstat -o -n -a | findstr :80<text:span text:style-name="T36">80</text:span><text:line-break/></text:p>
      <text:p text:style-name="Standard"/>
      <text:p text:style-name="Standard">The last number in the output is the process ID using port 80<text:span text:style-name="T36">80</text:span>.</text:p>
      <text:p text:style-name="Standard">Example:</text:p>
      <text:p text:style-name="Delphi_20_Code"><text:line-break/> <text:s/>TCP <text:s text:c="3"/>127.0.0.1:80<text:span text:style-name="T36">80</text:span> <text:s text:c="8"/>0.0.0.0:0 <text:s text:c="13"/>LISTEN <text:s text:c="8"/>5636<text:line-break/></text:p>
      <text:p text:style-name="Standard"/>
      <text:p text:style-name="P97">Find the process name (requires administrator privileges)</text:p>
      <text:p text:style-name="Standard">Run the following from an elevated command prompt: </text:p>
      <text:p text:style-name="Delphi_20_Code"><text:line-break/>netstat -ab <text:line-break/></text:p>
      <text:p text:style-name="P97"/>
      <text:p text:style-name="Standard">Example output:</text:p>
      <text:p text:style-name="Delphi_20_Code"/>
      <text:p text:style-name="Delphi_20_Code"><text:s text:c="2"/>...<text:line-break/> <text:s/>TCP <text:s text:c="3"/>0.0.0.0:135 <text:s text:c="11"/>my-PC:0 <text:s text:c="12"/>LISTEN</text:p>
      <text:p text:style-name="Delphi_20_Code"><text:s text:c="2"/>RpcSs</text:p>
      <text:p text:style-name="Delphi_20_Code"><text:s/>[svchost.exe]</text:p>
      <text:p text:style-name="Delphi_20_Code"><text:s text:c="2"/>TCP <text:s text:c="3"/>0.0.0.0:80<text:span text:style-name="T36">80</text:span> <text:s text:c="10"/>my-PC:0 <text:s text:c="12"/>LISTEN</text:p>
      <text:p text:style-name="Delphi_20_Code"><text:s/>[MyOtherServer.exe]<text:line-break/> <text:s/>...<text:line-break/></text:p>
      <text:p text:style-name="Standard"/>
      <text:p text:style-name="P97">Solutions:</text:p>
      <text:list text:style-name="L32">
        <text:list-item>
          <text:p text:style-name="P98">stop the application or service with this process ID, and try again</text:p>
        </text:list-item>
        <text:list-item>
          <text:p text:style-name="P98">use a different port (for example 808<text:span text:style-name="T36">1</text:span>)</text:p>
        </text:list-item>
      </text:list>
      <text:p text:style-name="Standard">Related articles:</text:p>
      <text:list text:style-name="L33">
        <text:list-item>
          <text:p text:style-name="P99"><text:a xlink:type="simple" xlink:href="http://stackoverflow.com/questions/20558410" text:style-name="Internet_20_link" text:visited-style-name="Visited_20_Internet_20_Link">http://stackoverflow.com/questions/20558410</text:a></text:p>
        </text:list-item>
        <text:list-item>
          <text:p text:style-name="P99"><text:a xlink:type="simple" xlink:href="http://serverfault.com/questions/316514" text:style-name="Internet_20_link" text:visited-style-name="Visited_20_Internet_20_Link">http://serverfault.com/questions/316514</text:a></text:p>
        </text:list-item>
      </text:list>
      <text:h text:style-name="Heading_20_1" text:outline-level="1"><text:bookmark-start text:name="__RefHeading___Toc4140_661956188"/>Advanced Topics<text:bookmark-end text:name="__RefHeading___Toc4140_661956188"/></text:h>
      <text:h text:style-name="Heading_20_2" text:outline-level="2"><text:bookmark-start text:name="__RefHeading___Toc4142_661956188"/><text:alphabetical-index-mark-start text:id="IMark1627730505248"/>Exception stack traces<text:alphabetical-index-mark-end text:id="IMark1627730505248"/> <text:bookmark-end text:name="__RefHeading___Toc4142_661956188"/></text:h>
      <text:h text:style-name="Heading_20_3" text:outline-level="3"><text:bookmark-start text:name="__RefHeading___Toc4144_661956188"/>Stack traces with <text:alphabetical-index-mark-start text:id="IMark1627730505248"/><text:alphabetical-index-mark-start text:id="IMark1627730447168"/>madExcept<text:bookmark-end text:name="__RefHeading___Toc4144_661956188"/><text:alphabetical-index-mark-end text:id="IMark1627730447168"/><text:alphabetical-index-mark-end text:id="IMark1627730505248"/></text:h>
      <text:p text:style-name="Illustration"><draw:frame draw:style-name="fr6" draw:name="Grafik4" text:anchor-type="paragraph" svg:width="17cm" svg:height="13.573cm" draw:z-index="0"><draw:image xlink:href="Pictures/10000000000003EA00000320E75BF104.png" xlink:type="simple" xlink:show="embed" xlink:actuate="onLoad" draw:mime-type="image/png"/></draw:frame>Illustration <text:sequence text:ref-name="refIllustration4" text:name="Illustration" text:formula="ooow:Illustration+1" style:num-format="1">5</text:sequence>: Exception stack trace with madExcept</text:p>
      <text:p text:style-name="Standard">Declaring the conditional symbols <text:span text:style-name="FlowSource">DARAJA_PROJECT_STAGE_DEVELOPMENT</text:span> and <text:span text:style-name="FlowSource">DARAJA_</text:span><text:alphabetical-index-mark-start text:id="IMark1627730447168"/><text:span text:style-name="FlowSource">MADEXCEPT</text:span><text:alphabetical-index-mark-end text:id="IMark1627730447168"/> in the project settings will enable stack traces on <text:alphabetical-index-mark-start text:id="IMark1627730456128"/><text:alphabetical-index-mark-start text:id="IMark1627730458608"/>exceptions<text:alphabetical-index-mark-end text:id="IMark1627730458608"/><text:alphabetical-index-mark-end text:id="IMark1627730456128"/>. The stack traces will appear in the HTML response and – if <text:span text:style-name="FlowSource">DARAJA_LOGGING</text:span> is defined - <text:s/>in the log output.</text:p>
      <text:p text:style-name="Standard"><text:soft-page-break/>Note this is an un<text:alphabetical-index-mark-start text:id="IMark1627730458608"/>support<text:alphabetical-index-mark-end text:id="IMark1627730458608"/>ed bonus feature and only has been tested with <text:alphabetical-index-mark-start text:id="IMark1627730458928"/>madExcept<text:alphabetical-index-mark-end text:id="IMark1627730458928"/> version 3.</text:p>
      <text:h text:style-name="Heading_20_3" text:outline-level="3"><text:bookmark-start text:name="__RefHeading___Toc4146_661956188"/>Stack traces with JclDebug<text:bookmark-end text:name="__RefHeading___Toc4146_661956188"/></text:h>
      <text:p text:style-name="Standard">Declaring the conditional symbols <text:span text:style-name="FlowSource">DARAJA_PROJECT_STAGE_DEVELOPMENT</text:span> and <text:span text:style-name="FlowSource">DARAJA_JCLDEBUG</text:span> in the project settings will enable stack traces on <text:alphabetical-index-mark-start text:id="IMark1627730457728"/><text:alphabetical-index-mark-start text:id="IMark1627730456608"/>exceptions<text:alphabetical-index-mark-end text:id="IMark1627730456608"/><text:alphabetical-index-mark-end text:id="IMark1627730457728"/>. The stack traces will appear in the HTML response and – if <text:span text:style-name="FlowSource">DARAJA_LOGGING</text:span> is defined<text:span text:style-name="T37"> – </text:span>in the log output.</text:p>
      <text:p text:style-name="Standard">Note: this is an unsupported feature, tested with Jedi Code Library version 2.6.0.5178</text:p>
      <text:h text:style-name="Heading_20_2" text:outline-level="2"><text:bookmark-start text:name="__RefHeading___Toc4148_661956188"/><text:alphabetical-index-mark-start text:id="IMark1627730462448"/>Configuration<text:alphabetical-index-mark-end text:id="IMark1627730462448"/> of internal Indy HTTP Server<text:bookmark-end text:name="__RefHeading___Toc4148_661956188"/></text:h>
      <text:p text:style-name="Standard">The new property <text:alphabetical-index-mark-start text:id="IMark1627730465568"/>HTTPServer<text:alphabetical-index-mark-end text:id="IMark1627730465568"/> of the class <text:alphabetical-index-mark-start text:id="IMark1627730461488"/>TdjHTTPConnector<text:alphabetical-index-mark-end text:id="IMark1627730461488"/> allows to query and modify properties of the internal Indy HTTP server component.</text:p>
      <text:h text:style-name="Heading_20_3" text:outline-level="3"><text:bookmark-start text:name="__RefHeading___Toc4150_661956188"/><text:alphabetical-index-mark-start text:id="IMark1627730463968"/>MaxConnections<text:alphabetical-index-mark-end text:id="IMark1627730463968"/> example<text:bookmark-end text:name="__RefHeading___Toc4150_661956188"/></text:h>
      <text:p text:style-name="Standard">To reject new HTTP connections in high load situations, set the server property <text:alphabetical-index-mark-start text:id="IMark1627730461328"/>MaxConnections<text:alphabetical-index-mark-end text:id="IMark1627730461328"/>:</text:p>
      <text:p text:style-name="P30"><text:span text:style-name="T6">Code ex</text:span>ample</text:p>
      <text:p text:style-name="SourceCode"/>
      <text:p text:style-name="SourceCode">// allow a maximum of 100 concurrent connections</text:p>
      <text:p text:style-name="SourceCode">Connector.HTTPServer.<text:alphabetical-index-mark-start text:id="IMark1627730465568"/>MaxConnections<text:alphabetical-index-mark-end text:id="IMark1627730465568"/> := 100;<text:line-break/></text:p>
      <text:p text:style-name="Standard"/>
      <text:p text:style-name="Standard">The library will log refused connections (if logging is enabled) with status “warning”.</text:p>
      <text:h text:style-name="Heading_20_3" text:outline-level="3"><text:bookmark-start text:name="__RefHeading___Toc4152_661956188"/>Thread pool example<text:bookmark-end text:name="__RefHeading___Toc4152_661956188"/></text:h>
      <text:p text:style-name="Standard">A thread pool with a maximum number of threads can be configured for the HTTP server.</text:p>
      <text:p text:style-name="Standard">In this code example a thread pool scheduler with 20 threads is created and used:</text:p>
      <text:p text:style-name="P30"><text:span text:style-name="T6">Code ex</text:span>ample</text:p>
      <text:p text:style-name="SourceCode"><text:s text:c="2"/></text:p>
      <text:p text:style-name="SourceCode">// create the thread pool scheduler</text:p>
      <text:p text:style-name="SourceCode">SchedulerOfThreadPool := TIdSchedulerOfThreadPool.Create(Connector.HTTPServer);</text:p>
      <text:p text:style-name="SourceCode"><text:soft-page-break/>SchedulerOfThreadPool.PoolSize := 20;<text:line-break/><text:line-break/>// assign the thread pool scheduler to the internal Indy HTTP server</text:p>
      <text:p text:style-name="SourceCode">Connector.HTTPServer.Scheduler := SchedulerOfThreadPool;<text:line-break/></text:p>
      <text:h text:style-name="Heading_20_3" text:outline-level="3"><text:bookmark-start text:name="__RefHeading___Toc4154_661956188"/><text:alphabetical-index-mark-start text:id="IMark1627730447168"/>Interceptor<text:alphabetical-index-mark-end text:id="IMark1627730447168"/> example<text:bookmark-end text:name="__RefHeading___Toc4154_661956188"/></text:h>
      <text:p text:style-name="Standard">The unit tests include an example which shows how this property can be used to add an interceptor to the server.</text:p>
      <text:p text:style-name="Standard">After running this test, a file (httpIntercept.log) in the test source folder contains the log <text:alphabetical-index-mark-start text:id="IMark1627730447168"/>interceptor<text:alphabetical-index-mark-end text:id="IMark1627730447168"/> output.</text:p>
      <text:p text:style-name="P30"><text:span text:style-name="T6">Code ex</text:span>ample</text:p>
      <text:p text:style-name="SourceCode">procedure TAPIConfigTests.TestAddConnector;</text:p>
      <text:p text:style-name="SourceCode">var</text:p>
      <text:p text:style-name="SourceCode"><text:s text:c="2"/>Server: TdjServer;</text:p>
      <text:p text:style-name="SourceCode"><text:s text:c="2"/><text:alphabetical-index-mark-start text:id="IMark1627730447168"/>Context<text:alphabetical-index-mark-end text:id="IMark1627730447168"/>: TdjWebApp<text:alphabetical-index-mark-start text:id="IMark1627730458608"/>Context<text:alphabetical-index-mark-end text:id="IMark1627730458608"/>;</text:p>
      <text:p text:style-name="SourceCode"><text:s text:c="2"/>Connector: TdjHTTPConnector;</text:p>
      <text:p text:style-name="SourceCode"><text:s text:c="2"/>Intercept: TIdServerInterceptLogFile;</text:p>
      <text:p text:style-name="SourceCode">begin</text:p>
      <text:p text:style-name="SourceCode"><text:s text:c="2"/>Intercept := TIdServerInterceptLogFile.Create(nil);</text:p>
      <text:p text:style-name="SourceCode"><text:s text:c="2"/>try</text:p>
      <text:p text:style-name="SourceCode"><text:s text:c="4"/>Server := TdjServer.Create;</text:p>
      <text:p text:style-name="SourceCode"><text:s text:c="4"/>try</text:p>
      <text:p text:style-name="SourceCode"><text:s text:c="6"/>// add a configured connector</text:p>
      <text:p text:style-name="SourceCode"><text:s text:c="6"/>Connector := TdjHTTPConnector.Create(Server.Handler);</text:p>
      <text:p text:style-name="SourceCode"><text:s text:c="6"/>Connector.Host := '127.0.0.1';</text:p>
      <text:p text:style-name="SourceCode"><text:s text:c="6"/>Connector.Port := 80<text:span text:style-name="T36">80</text:span>;</text:p>
      <text:p text:style-name="SourceCode"/>
      <text:p text:style-name="SourceCode"><text:s text:c="6"/>// new property "HTTPServer"</text:p>
      <text:p text:style-name="SourceCode"><text:s text:c="6"/>// here used to set a file based logger for the HTTP server</text:p>
      <text:p text:style-name="SourceCode"><text:s text:c="6"/>Connector.HTTPServer.Intercept := Intercept;</text:p>
      <text:p text:style-name="SourceCode"><text:s text:c="6"/>Intercept.Filename := 'httpIntercept.log';</text:p>
      <text:p text:style-name="SourceCode"/>
      <text:p text:style-name="SourceCode"><text:s text:c="6"/>Server.AddConnector(Connector);</text:p>
      <text:p text:style-name="SourceCode"/>
      <text:p text:style-name="SourceCode"><text:s text:c="6"/><text:alphabetical-index-mark-start text:id="IMark1627730475008"/>Context<text:alphabetical-index-mark-end text:id="IMark1627730475008"/> := TdjWebApp<text:alphabetical-index-mark-start text:id="IMark1627730475968"/>Context<text:alphabetical-index-mark-end text:id="IMark1627730475968"/>.Create('get');</text:p>
      <text:p text:style-name="SourceCode"><text:s text:c="6"/><text:alphabetical-index-mark-start text:id="IMark1627730475408"/>Context<text:alphabetical-index-mark-end text:id="IMark1627730475408"/>.Add(TNoOpComponent, '/hello');</text:p>
      <text:p text:style-name="SourceCode"><text:s text:c="6"/>Server.Add(<text:alphabetical-index-mark-start text:id="IMark1627730475408"/>Context<text:alphabetical-index-mark-end text:id="IMark1627730475408"/>);</text:p>
      <text:p text:style-name="SourceCode"/>
      <text:p text:style-name="SourceCode"><text:s text:c="6"/>Server.Start;</text:p>
      <text:p text:style-name="SourceCode"/>
      <text:p text:style-name="SourceCode"><text:s text:c="6"/>CheckEquals('', Get('/get/hello'));</text:p>
      <text:p text:style-name="SourceCode"/>
      <text:p text:style-name="SourceCode"><text:s text:c="4"/>finally</text:p>
      <text:p text:style-name="SourceCode"><text:s text:c="6"/>Server.Free;</text:p>
      <text:p text:style-name="SourceCode"><text:s text:c="4"/>end;</text:p>
      <text:p text:style-name="SourceCode"><text:s text:c="2"/>finally</text:p>
      <text:p text:style-name="SourceCode"><text:s text:c="4"/>Intercept.Free</text:p>
      <text:p text:style-name="SourceCode"><text:s text:c="2"/>end;</text:p>
      <text:p text:style-name="SourceCode">end;</text:p>
      <text:p text:style-name="SourceCode"/>
      <text:p text:style-name="Heading_20_4"><text:soft-page-break/>Log output</text:p>
      <text:p text:style-name="SourceCode"/>
      <text:p text:style-name="SourceCode">127.0.0.1:49327 Stat Connected.</text:p>
      <text:p text:style-name="SourceCode">127.0.0.1:49327 Recv 26.06.2012 09:32:09: GET /get/hello HTTP/1.1&lt;EOL&gt;Host: 127.0.0.1&lt;EOL&gt;Accept: text/html,application/xhtml+xml,application/xml;q=0.9,*/*;q=0.8&lt;EOL&gt;Accept-Encoding: identity&lt;EOL&gt;User-Agent: Mozilla/3.0 (compatible; Indy Library)&lt;EOL&gt;&lt;EOL&gt;</text:p>
      <text:p text:style-name="SourceCode">127.0.0.1:49327 Sent 26.06.2012 09:32:09: HTTP/1.1 200 OK&lt;EOL&gt;Connection: close&lt;EOL&gt;Content-Length: 0&lt;EOL&gt;Server: Internet Direct (Indy) 10.5.8.0&lt;EOL&gt;&lt;EOL&gt;</text:p>
      <text:p text:style-name="SourceCode">127.0.0.1:49327 Stat Disconnected.</text:p>
      <text:p text:style-name="SourceCode">0.0.0.0:0 Stat Disconnected.<text:line-break/></text:p>
      <text:h text:style-name="P100" text:outline-level="2"><text:bookmark-start text:name="__RefHeading___Toc4156_661956188"/>SLF4P support<text:bookmark-end text:name="__RefHeading___Toc4156_661956188"/></text:h>
      <text:p text:style-name="P101">The framework supports the <text:span text:style-name="T17">Simple Logging Facade for Pascal</text:span> (SLF4P) which is available from GitHub at <text:a xlink:type="simple" xlink:href="https://github.com/michaelJustin/slf4p" text:style-name="Internet_20_link" text:visited-style-name="Visited_20_Internet_20_Link">https://github.com/michaelJustin/slf4p</text:a>.</text:p>
      <text:p text:style-name="P102">Starting with version 3.1.0 of the framework, the minimum supported version of slf4p is 1.0.8.</text:p>
      <text:h text:style-name="Heading_20_3" text:outline-level="3"><text:bookmark-start text:name="__RefHeading___Toc4158_661956188"/>IDE <text:alphabetical-index-mark-start text:id="IMark1627730475408"/>configuration<text:bookmark-end text:name="__RefHeading___Toc4158_661956188"/><text:alphabetical-index-mark-end text:id="IMark1627730475408"/></text:h>
      <text:p text:style-name="Standard">In order to compile with <text:span text:style-name="T10">logging</text:span> <text:alphabetical-index-mark-start text:id="IMark1627730475728"/>support<text:alphabetical-index-mark-end text:id="IMark1627730475728"/>, add the conditional symbol <text:alphabetical-index-mark-start text:id="IMark1627730473808"/><text:span text:style-name="T13">DARAJA_LOGGING</text:span><text:alphabetical-index-mark-end text:id="IMark1627730473808"/> to the project options:</text:p>
      <text:list text:style-name="L34">
        <text:list-item>
          <text:p text:style-name="P103">in Delphi, choose Project | Options... | Delphi Compiler &gt; Conditional defines and add <text:span text:style-name="FlowSource">DARAJA_LOGGING</text:span></text:p>
        </text:list-item>
        <text:list-item>
          <text:p text:style-name="P103">in Lazarus, choose Project | Project Options … | Compiler Options &gt; Other and add <text:span text:style-name="FlowSource">-dDARAJA_LOGGING</text:span> in the Custom options field</text:p>
        </text:list-item>
      </text:list>
      <text:h text:style-name="Heading_20_1" text:outline-level="1"><text:bookmark-start text:name="__RefHeading___Toc4160_661956188"/>Unit Tests<text:bookmark-end text:name="__RefHeading___Toc4160_661956188"/></text:h>
      <text:h text:style-name="Heading_20_2" text:outline-level="2"><text:bookmark-start text:name="__RefHeading___Toc4162_661956188"/>Expected <text:alphabetical-index-mark-start text:id="IMark1627730475408"/>Exceptions<text:bookmark-end text:name="__RefHeading___Toc4162_661956188"/><text:alphabetical-index-mark-end text:id="IMark1627730475408"/></text:h>
      <text:p text:style-name="Standard">During the unit tests, some expected <text:alphabetical-index-mark-start text:id="IMark1627730475408"/>exceptions<text:alphabetical-index-mark-end text:id="IMark1627730475408"/> will be thrown. In the Delphi IDE, these <text:alphabetical-index-mark-start text:id="IMark1627730475008"/>exceptions<text:alphabetical-index-mark-end text:id="IMark1627730475008"/> should not cause the debugger to interrupt program execution.</text:p>
      <text:p text:style-name="Standard">To fix this, either add the <text:alphabetical-index-mark-start text:id="IMark1627730475728"/>exceptions<text:alphabetical-index-mark-end text:id="IMark1627730475728"/> in the IDE options dialog (“Exception types to ignore”) or check the option “Ignore this exception type” in the dialog:</text:p>
      <text:p text:style-name="Illustration"><draw:frame draw:style-name="fr7" draw:name="Grafik5" text:anchor-type="paragraph" svg:width="12cm" svg:height="3.281cm" draw:z-index="1"><draw:image xlink:href="Pictures/1000000000000265000000A807C785E5.png" xlink:type="simple" xlink:show="embed" xlink:actuate="onLoad" draw:mime-type="image/png"/></draw:frame>Illustration <text:sequence text:ref-name="refIllustration5" text:name="Illustration" text:formula="ooow:Illustration+1" style:num-format="1">6</text:sequence>: Debugger Exception Notification</text:p>
      <text:p text:style-name="Standard">Currently these <text:alphabetical-index-mark-start text:id="IMark1627730475408"/>exceptions<text:alphabetical-index-mark-end text:id="IMark1627730475408"/> are thrown in the tests:</text:p>
      <text:list text:style-name="L35">
        <text:list-item>
          <text:p text:style-name="P104"><text:alphabetical-index-mark-start text:id="IMark1627730475008"/>EidHTTPProtocolException<text:alphabetical-index-mark-end text:id="IMark1627730475008"/></text:p>
        </text:list-item>
        <text:list-item>
          <text:p text:style-name="P104"><text:alphabetical-index-mark-start text:id="IMark1627730475408"/>EWebComponentException<text:alphabetical-index-mark-end text:id="IMark1627730475408"/></text:p>
        </text:list-item>
        <text:list-item>
          <text:p text:style-name="P105"><text:alphabetical-index-mark-start text:id="IMark1627730473808"/>EUnitTestException<text:alphabetical-index-mark-end text:id="IMark1627730473808"/></text:p>
        </text:list-item>
      </text:list>
      <text:h text:style-name="Heading_20_1" text:outline-level="1"><text:bookmark-start text:name="__RefHeading___Toc4164_661956188"/>Example Web Components<text:bookmark-end text:name="__RefHeading___Toc4164_661956188"/></text:h>
      <text:h text:style-name="Heading_20_2" text:outline-level="2"><text:bookmark-start text:name="__RefHeading___Toc4166_661956188"/><text:alphabetical-index-mark-start text:id="IMark1627730475968"/>TdjDefaultWebComponent<text:bookmark-end text:name="__RefHeading___Toc4166_661956188"/><text:alphabetical-index-mark-end text:id="IMark1627730475968"/></text:h>
      <text:p text:style-name="Standard">For every context, the framework can provide a folder for static resources (images, scripts, style sheets or static HTML documents).</text:p>
      <text:p text:style-name="Standard">To add support for static resource folder, register TdjDefaultWebComponent:</text:p>
      <text:p text:style-name="P30"><text:span text:style-name="T6">Code ex</text:span>ample</text:p>
      <text:p text:style-name="SourceCode">Context.Add(TdjDefaultWebComponent, '/');</text:p>
      <text:p text:style-name="Standard"/>
      <text:p text:style-name="Standard">TdjDefaultWebComponent serves resources which do not match the URL mapping of any other web component, and tries to serve them from the <text:alphabetical-index-mark-start text:id="IMark1627730475408"/>static resource folder<text:alphabetical-index-mark-end text:id="IMark1627730475408"/>.</text:p>
      <text:p text:style-name="Standard">The static resource folder is located under the <text:span text:style-name="T21">webapps</text:span> directory of the server and has the same name as the context. Example directory:</text:p>
      <text:p text:style-name="P106"><text:line-break/> \MyWebApp</text:p>
      <text:p text:style-name="P106"><text:s text:c="2"/>- MyWebApp.exe</text:p>
      <text:p text:style-name="P106"><text:s text:c="2"/>- \webapps</text:p>
      <text:p text:style-name="P107"><text:span text:style-name="T21"><text:s text:c="4"/>- \myapp1 ← folder for static resource files in context “myapp1”&gt;</text:span><text:span text:style-name="T38"><text:line-break/></text:span></text:p>
      <text:h text:style-name="Heading_20_2" text:outline-level="2"><text:bookmark-start text:name="__RefHeading___Toc4168_661956188"/><text:alphabetical-index-mark-start text:id="IMark1627730473808"/>TdjNCSALog<text:span text:style-name="T39">Filt</text:span>er<text:bookmark-end text:name="__RefHeading___Toc4168_661956188"/><text:alphabetical-index-mark-end text:id="IMark1627730473808"/></text:h>
      <text:p text:style-name="P108">TdjNCSALog<text:span text:style-name="T40">Filte</text:span>r is a web <text:span text:style-name="T40">filter</text:span> which provides logging support in the NCSA log format.<text:note text:id="ftn2" text:note-class="footnote"><text:note-citation>2</text:note-citation><text:note-body><text:p text:style-name="P109"><text:a xlink:type="simple" xlink:href="https://en.wikipedia.org/wiki/Common_Log_Format" text:style-name="Internet_20_link" text:visited-style-name="Visited_20_Internet_20_Link"><text:span text:style-name="T41">https://en.wikipedia.org/wiki/Common_Log_Format</text:span></text:a></text:p></text:note-body></text:note></text:p>
      <text:p text:style-name="P108"><text:span text:style-name="T42">Example</text:span> log output:</text:p>
      <text:p text:style-name="SourceCode"><text:s/></text:p>
      <text:p text:style-name="SourceCode">info | 127.0.0.1 - - [09/Apr/2013:16:00:15:853 +0200] "GET /demo/index.html HTTP/1.1" 200 9050</text:p>
      <text:p text:style-name="SourceCode"/>
      <text:p text:style-name="Standard"/>
      <text:h text:style-name="Heading_20_2" text:outline-level="2"><text:bookmark-start text:name="__RefHeading___Toc4170_661956188"/><text:soft-page-break/>TdjStatistics<text:span text:style-name="T40">Filter</text:span><text:bookmark-end text:name="__RefHeading___Toc4170_661956188"/></text:h>
      <text:p text:style-name="Standard">TdjStatistics<text:span text:style-name="T40">Filt</text:span>er collects statistical information about number of requests and more.</text:p>
      <text:h text:style-name="Heading_20_1" text:outline-level="1"><text:bookmark-start text:name="__RefHeading___Toc4172_661956188"/><text:alphabetical-index-mark-start text:id="IMark1627730475408"/><text:span text:style-name="T43">Other optional</text:span> units<text:bookmark-end text:name="__RefHeading___Toc4172_661956188"/><text:alphabetical-index-mark-end text:id="IMark1627730475408"/></text:h>
      <text:h text:style-name="Heading_20_2" text:outline-level="2"><text:bookmark-start text:name="__RefHeading___Toc4174_661956188"/><text:alphabetical-index-mark-start text:id="IMark1627730475408"/>ShutdownHelper<text:bookmark-end text:name="__RefHeading___Toc4174_661956188"/><text:alphabetical-index-mark-end text:id="IMark1627730475408"/></text:h>
      <text:p text:style-name="Standard">This unit is included in the <text:span text:style-name="FlowSource">demo/commons</text:span> folder and registers a console control event handler.</text:p>
      <text:p text:style-name="Standard">It has one method, <text:alphabetical-index-mark-start text:id="IMark1627730475408"/><text:span text:style-name="T17">SetShutdownHook</text:span><text:alphabetical-index-mark-end text:id="IMark1627730475408"/>. This method takes a single parameter which is a <text:span text:style-name="T17">TdjServer</text:span> instance.</text:p>
      <text:p text:style-name="Standard">If the console window receives a Ctrl+<text:span text:style-name="T44">C </text:span>/ break / close / shutdown / logoff event, the <text:span text:style-name="FlowSource">Server.Stop</text:span> method will be called.</text:p>
      <text:p text:style-name="P30"><text:span text:style-name="T6">Code ex</text:span>ample</text:p>
      <text:p text:style-name="SourceCode"/>
      <text:p text:style-name="SourceCode">procedure SetShutdownHook(const Server: TdjServer);</text:p>
      <text:p text:style-name="SourceCode"/>
      <text:p text:style-name="Standard"/>
      <text:p text:style-name="List_20_Indent"><text:span text:style-name="T17">Windows platform</text:span><text:tab/>This unit can only be used on the Windows platform.</text:p>
      <text:h text:style-name="Heading_20_1" text:outline-level="1"><text:bookmark-start text:name="__RefHeading___Toc4210_661956188"/>Third-Party Product Licenses<text:bookmark-end text:name="__RefHeading___Toc4210_661956188"/></text:h>
      <text:h text:style-name="Heading_20_3" text:outline-level="3"><text:bookmark-start text:name="__RefHeading___Toc4212_661956188"/>Internet Direct (Indy)<text:bookmark-end text:name="__RefHeading___Toc4212_661956188"/></text:h>
      <text:p text:style-name="P110">Indy will be compiled into applications built with <text:title>Daraja HTTP Framework</text:title>, this means that the Indy license applies to your application.</text:p>
      <text:p text:style-name="P110"><text:span text:style-name="T45">L</text:span>icense information <text:span text:style-name="T45">for Indy </text:span>can be found at <text:a xlink:type="simple" xlink:href="https://www.indyproject.org/license/" text:style-name="Internet_20_link" text:visited-style-name="Visited_20_Internet_20_Link">https://www.indyproject.org/license/</text:a></text:p>
      <text:p text:style-name="P110"/>
      <text:p text:style-name="P110"/>
      <text:h text:style-name="Heading_20_1" text:outline-level="1"><text:bookmark-start text:name="__RefHeading___Toc4216_661956188"/>Index<text:bookmark-end text:name="__RefHeading___Toc4216_661956188"/></text:h>
      <text:alphabetical-index text:style-name="Sect2" text:protected="true" text:name="Stichwortverzeichnis1">
        <text:alphabetical-index-source text:main-entry-style-name="Main_20_index_20_entry" text:use-keys-as-entries="true" text:capitalize-entries="true" text:sort-algorithm="alphanumeric" fo:language="de" fo:country="DE">
          <text:index-title-template text:style-name="Index_20_Heading">Reference</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Stichwortverzeichnis1_Head" text:protected="true">
            <text:p text:style-name="Index_20_Heading">Reference</text:p>
          </text:index-title>
          <text:p text:style-name="P111">CharSet<text:tab/>16, 19f.</text:p>
          <text:p text:style-name="P111">Conditional symbols<text:tab/>15</text:p>
          <text:p text:style-name="P111">Conditional Symbols<text:tab/>15</text:p>
          <text:p text:style-name="P111">Configuration<text:tab/>19, 30, 32</text:p>
          <text:p text:style-name="P111">ContentText<text:tab/>16, 20</text:p>
          <text:p text:style-name="P111">ContentType<text:tab/>16, 19f.</text:p>
          <text:p text:style-name="P111">Context<text:tab/>17ff., 25, 31</text:p>
          <text:p text:style-name="P111">DARAJA_LOGGING<text:tab/>32</text:p>
          <text:p text:style-name="P111">Destroy<text:tab/>16</text:p>
          <text:p text:style-name="P111">Development mode<text:tab/>15</text:p>
          <text:p text:style-name="P111">DjGlobal<text:tab/>20</text:p>
          <text:p text:style-name="P111">EidHTTPProtocolException<text:tab/>33</text:p>
          <text:p text:style-name="P111">EUnitTestException<text:tab/>33</text:p>
          <text:p text:style-name="P111">EWebComponentException<text:tab/>33</text:p>
          <text:p text:style-name="P111">Exception stack traces<text:tab/>29</text:p>
          <text:p text:style-name="P111">Exceptions<text:tab/>29f., 33</text:p>
          <text:p text:style-name="P111">Free Pascal<text:tab/>14</text:p>
          <text:p text:style-name="P111">GetInitParameter<text:tab/>19</text:p>
          <text:p text:style-name="P111">GetInitParameterNames<text:tab/>19</text:p>
          <text:p text:style-name="P111">HTML Encoding<text:tab/>20</text:p>
          <text:p text:style-name="P111">HTMLEncode<text:tab/>20</text:p>
          <text:p text:style-name="P111">HTTP<text:tab/>16, 25</text:p>
          <text:p text:style-name="P111">HTTPServer<text:tab/>30</text:p>
          <text:p text:style-name="P111">Init<text:tab/>16</text:p>
          <text:p text:style-name="P111">Interceptor<text:tab/>31</text:p>
          <text:p text:style-name="P111">Logging<text:tab/>15</text:p>
          <text:p text:style-name="P111">MadExcept<text:tab/>15, 29f.</text:p>
          <text:p text:style-name="P111">MADEXCEPT<text:tab/>29</text:p>
          <text:p text:style-name="P111">Mapping rules<text:tab/>17</text:p>
          <text:p text:style-name="P111">MaxConnections<text:tab/>30</text:p>
          <text:p text:style-name="P111">Multi-threaded<text:tab/>24f.</text:p>
          <text:p text:style-name="P111">Multi-threading<text:tab/>24</text:p>
          <text:p text:style-name="P111">OnGet<text:tab/>16, 24</text:p>
          <text:p text:style-name="P111">OnPost<text:tab/>16, 24</text:p>
          <text:p text:style-name="P111">Other optional units<text:tab/>36</text:p>
          <text:p text:style-name="P111">Path Mapping<text:tab/>17</text:p>
          <text:p text:style-name="P111">Request<text:tab/>16, 24ff.</text:p>
          <text:p text:style-name="P111">Resource path mapping<text:tab/>17</text:p>
          <text:p text:style-name="P111">Resources<text:tab/>17</text:p>
          <text:p text:style-name="P111">Response<text:tab/>16, 24</text:p>
          <text:p text:style-name="P111">SetInitParameter<text:tab/>19</text:p>
          <text:p text:style-name="P111">SetShutdownHook<text:tab/>36</text:p>
          <text:p text:style-name="P111">Setting parameters of a context<text:tab/>19</text:p>
          <text:p text:style-name="P111">ShutdownHelper<text:tab/>36</text:p>
          <text:p text:style-name="P111">Special characters<text:tab/>20</text:p>
          <text:p text:style-name="P111">Static resource<text:tab/>17</text:p>
          <text:p text:style-name="P111">Static resource folder<text:tab/>34</text:p>
          <text:p text:style-name="P111">Support<text:tab/>17f., 30, 32</text:p>
          <text:p text:style-name="P111">TdjDefaultWebComponent<text:tab/>34</text:p>
          <text:p text:style-name="P111">TdjHTTPConnector<text:tab/>30</text:p>
          <text:p text:style-name="P111">TdjNCSALogFilter<text:tab/>34</text:p>
          <text:p text:style-name="P111">TdjRequest<text:tab/>16, 19f., 24</text:p>
          <text:p text:style-name="P111">TdjResponse<text:tab/>16, 19f., 24</text:p>
          <text:p text:style-name="P111">TdjWebAppContext<text:tab/>17</text:p>
          <text:p text:style-name="P111">TdjWebComponent<text:tab/>16, 24</text:p>
          <text:p text:style-name="P111">TMyWebPage<text:tab/>16, 24</text:p>
          <text:p text:style-name="P111">Utf-8<text:tab/>16, 20</text:p>
          <text:p text:style-name="P111">UTF-8<text:tab/>19</text:p>
          <text:p text:style-name="P111"><text:tab/>16, 24</text:p>
        </text:index-body>
      </text:alphabetical-index>
      <text:p text:style-name="Standard"/>
      <text:p text:style-name="P112"/>
      <text:table-index text:style-name="Sect1" text:protected="true" text:name="Tabellenverzeichnis2">
        <text:table-index-source text:caption-sequence-name="Table" text:caption-sequence-format="caption">
          <text:index-title-template text:style-name="Table_20_index_20_heading">Table Index</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Tabellenverzeichnis2_Head" text:protected="true">
            <text:p text:style-name="Table_20_index_20_heading">Table Index</text:p>
          </text:index-title>
          <text:p text:style-name="P113">Conditional symbols<text:tab/>15</text:p>
        </text:index-body>
      </text:table-index>
      <text:p text:style-name="Standard"/>
      <text:p text:style-name="Standard"/>
      <text:illustration-index text:style-name="Sect1" text:protected="true" text:name="Abbildungsverzeichnis1">
        <text:illustration-index-source text:caption-sequence-name="Illustration"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rotected="true">
            <text:p text:style-name="Illustration_20_Index_20_Heading">Illustration Index</text:p>
          </text:index-title>
          <text:p text:style-name="P114">Illustration 1: Hello world example<text:tab/>6</text:p>
          <text:p text:style-name="P114">Illustration 2: HTTP session example<text:tab/>9</text:p>
          <text:p text:style-name="P114">Illustration 3: Fibonacci calculation result as plain text<text:tab/>12</text:p>
          <text:p text:style-name="P114">Illustration 4: Fibonacci calculation result as HTML<text:tab/>13</text:p>
          <text:p text:style-name="P114">Illustration 5: Exception stack trace with madExcept<text:tab/>29</text:p>
          <text:p text:style-name="P114">Illustration 6: Debugger Exception Notification<text:tab/>33</text:p>
        </text:index-body>
      </text:illustration-index>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Bahnschrift" svg:font-family="Bahnschrift" style:font-adornments="Fett" style:font-family-generic="swiss" style:font-pitch="variable"/>
    <style:font-face style:name="Bahnschrift Light" svg:font-family="'Bahnschrift Light'" style:font-adornments="Fett" style:font-family-generic="swiss" style:font-pitch="variable"/>
    <style:font-face style:name="Bahnschrift SemiBold" svg:font-family="'Bahnschrift SemiBold'" style:font-adornments="Halbfett" style:font-family-generic="swiss" style:font-pitch="variable"/>
    <style:font-face style:name="Consolas" svg:font-family="Consolas" style:font-family-generic="modern" style:font-pitch="fixed"/>
    <style:font-face style:name="Consolas1" svg:font-family="Consolas" style:font-adornments="Fett" style:font-family-generic="modern" style:font-pitch="fixed"/>
    <style:font-face style:name="Consolas2" svg:font-family="Consolas" style:font-adornments="Regular" style:font-family-generic="modern" style:font-pitch="fixed"/>
    <style:font-face style:name="Consolas3" svg:font-family="Consolas" style:font-adornments="Standard" style:font-family-generic="modern" style:font-pitch="fixed"/>
    <style:font-face style:name="Courier New" svg:font-family="'Courier New'" style:font-family-generic="modern"/>
    <style:font-face style:name="Courier New1" svg:font-family="'Courier New'" style:font-family-generic="modern" style:font-pitch="fixed"/>
    <style:font-face style:name="Exo" svg:font-family="Exo" style:font-family-generic="modern" style:font-pitch="variable"/>
    <style:font-face style:name="Lucida Console" svg:font-family="'Lucida Console'" style:font-family-generic="modern"/>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StarSymbol" svg:font-family="StarSymbol"/>
    <style:font-face style:name="Symbol" svg:font-family="Symbol" style:font-charset="x-symbol"/>
    <style:font-face style:name="Symbol1" svg:font-family="Symbol" style:font-family-generic="roman" style:font-pitch="variable"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Verdana" svg:font-family="Verdana"/>
    <style:font-face style:name="Verdana1" svg:font-family="Verdana" style:font-family-generic="swiss" style:font-pitch="variable"/>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de" fo:country="DE"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212cm" style:contextual-spacing="false" fo:orphans="2" fo:widows="2" style:page-number="auto" style:writing-mode="lr-tb"/>
      <style:text-properties style:use-window-font-color="true" loext:opacity="0%" style:font-name="Verdana1" fo:font-family="Verdana" style:font-family-generic="swiss" style:font-pitch="variable" fo:font-size="10.5pt" fo:language="en" fo:country="US"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language-complex="he" style:country-complex="IL"/>
    </style:style>
    <style:style style:name="Text_20_body" style:display-name="Text body" style:family="paragraph" style:parent-style-name="Standard" style:class="text">
      <style:paragraph-properties fo:margin-top="0cm" fo:margin-bottom="0.212cm" style:contextual-spacing="false"/>
    </style:style>
    <style:style style:name="List_20_Indent" style:display-name="List Indent" style:family="paragraph" style:parent-style-name="Text_20_body" style:class="text" style:master-page-name="">
      <style:paragraph-properties fo:margin-left="5.001cm" fo:margin-right="0cm" fo:margin-top="0cm" fo:margin-bottom="0.101cm" style:contextual-spacing="false" fo:text-indent="-4.5cm" style:auto-text-indent="false" style:page-number="auto">
        <style:tab-stops>
          <style:tab-stop style:position="0cm"/>
        </style:tab-stops>
      </style:paragraph-properties>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Heading_20_1" style:display-name="Heading 1" style:family="paragraph" style:parent-style-name="Standard" style:next-style-name="Standard" style:default-outline-level="1" style:class="chapter" style:master-page-name="">
      <loext:graphic-properties draw:fill-image-width="0cm" draw:fill-image-height="0cm"/>
      <style:paragraph-properties fo:margin-top="0cm" fo:margin-bottom="3cm" style:contextual-spacing="false" style:page-number="auto" fo:break-before="page" fo:keep-with-next="always"/>
      <style:text-properties fo:color="#0000ff" loext:opacity="100%" style:font-name="Bahnschrift" fo:font-family="Bahnschrift" style:font-style-name="Fett" style:font-family-generic="swiss" style:font-pitch="variable" fo:font-size="18pt" fo:font-weight="bold" style:letter-kerning="true" style:font-size-asian="18pt" style:font-weight-asian="bold" style:font-size-complex="18pt" style:font-weight-complex="bold"/>
    </style:style>
    <style:style style:name="Heading_20_2" style:display-name="Heading 2" style:family="paragraph" style:parent-style-name="Standard" style:next-style-name="Standard" style:auto-update="true" style:default-outline-level="2" style:class="chapter" style:master-page-name="">
      <loext:graphic-properties draw:fill="none" draw:fill-color="#cfe7f5"/>
      <style:paragraph-properties fo:margin-left="0cm" fo:margin-right="0cm" fo:margin-top="1.799cm" fo:margin-bottom="0.409cm" style:contextual-spacing="false" fo:text-indent="0cm" style:auto-text-indent="false" style:page-number="auto" fo:break-before="auto" fo:break-after="auto" fo:background-color="transparent" fo:padding="0.101cm" fo:border-left="none" fo:border-right="none" fo:border-top="0.51pt solid #000000" fo:border-bottom="none" style:shadow="none" fo:keep-with-next="always">
        <style:tab-stops/>
      </style:paragraph-properties>
      <style:text-properties style:font-name="Bahnschrift" fo:font-family="Bahnschrift" style:font-style-name="Fett" style:font-family-generic="swiss" style:font-pitch="variable" fo:font-size="16pt" fo:font-weight="bold" style:font-size-asian="16pt" style:font-weight-asian="bold" style:font-size-complex="16pt" style:font-weight-complex="bold"/>
    </style:style>
    <style:style style:name="Heading_20_3" style:display-name="Heading 3" style:family="paragraph" style:parent-style-name="Standard" style:next-style-name="Standard" style:default-outline-level="3" style:class="chapter">
      <loext:graphic-properties draw:fill="none" draw:fill-color="#cfe7f5"/>
      <style:paragraph-properties fo:margin-top="1.02cm" fo:margin-bottom="0.31cm" style:contextual-spacing="false" fo:background-color="transparent" fo:keep-with-next="always"/>
      <style:text-properties style:font-name="Bahnschrift SemiBold" fo:font-family="'Bahnschrift SemiBold'" style:font-style-name="Halbfett" style:font-family-generic="swiss" style:font-pitch="variable" fo:font-size="14pt" fo:font-weight="600" style:font-size-asian="14pt" style:font-weight-asian="bold" style:font-size-complex="14pt" style:font-weight-complex="bold"/>
    </style:style>
    <style:style style:name="Heading_20_4" style:display-name="Heading 4" style:family="paragraph" style:parent-style-name="Standard" style:next-style-name="Standard" style:class="chapter">
      <style:paragraph-properties fo:margin-top="0.423cm" fo:margin-bottom="0.106cm" style:contextual-spacing="false" fo:keep-with-next="always"/>
      <style:text-properties style:font-name="Bahnschrift" fo:font-family="Bahnschrift" style:font-style-name="Fett" style:font-family-generic="swiss" style:font-pitch="variable" fo:font-size="13pt" fo:font-weight="bold" style:font-size-asian="13pt" style:font-weight-asian="bold" style:font-size-complex="13pt" style:font-weight-complex="bold"/>
    </style:style>
    <style:style style:name="Heading_20_5" style:display-name="Heading 5" style:family="paragraph" style:parent-style-name="Standard" style:next-style-name="Standard" style:class="chapter">
      <style:paragraph-properties fo:margin-top="0.423cm" fo:margin-bottom="0.106cm" style:contextual-spacing="false"/>
      <style:text-properties fo:font-size="13pt" style:font-size-asian="13pt" style:font-size-complex="13pt"/>
    </style:style>
    <style:style style:name="Heading_20_6" style:display-name="Heading 6" style:family="paragraph" style:parent-style-name="Standard" style:next-style-name="Standard" style:class="chapter">
      <style:paragraph-properties fo:margin-top="0.423cm" fo:margin-bottom="0.106cm" style: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chapter">
      <style:paragraph-properties fo:margin-top="0.423cm" fo:margin-bottom="0.106cm" style:contextual-spacing="false"/>
    </style:style>
    <style:style style:name="Heading_20_8" style:display-name="Heading 8" style:family="paragraph" style:parent-style-name="Standard" style:next-style-name="Standard" style:class="chapter">
      <style:paragraph-properties fo:margin-top="0.423cm" fo:margin-bottom="0.106cm" style:contextual-spacing="false"/>
      <style:text-properties fo:font-style="italic" style:font-style-asian="italic" style:font-style-complex="italic"/>
    </style:style>
    <style:style style:name="Heading_20_9" style:display-name="Heading 9" style:family="paragraph" style:parent-style-name="Standard" style:next-style-name="Standard" style:class="chapter">
      <style:paragraph-properties fo:margin-top="0.423cm" fo:margin-bottom="0.106cm" style: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List" style:family="paragraph" style:parent-style-name="Text_20_body" style:class="list">
      <style:text-properties style:font-name="Verdana" fo:font-family="Verdana" style:font-name-complex="Tahoma"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7.668cm" style:type="center"/>
          <style:tab-stop style:position="15.335cm" style:type="right"/>
        </style:tab-stops>
      </style:paragraph-properties>
    </style:style>
    <style:style style:name="Foot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style:font-name="Verdana" fo:font-family="Verdana" fo:font-size="12pt" fo:font-style="italic" style:font-size-asian="12pt" style:font-style-asian="italic" style:font-name-complex="Tahoma" style:font-family-complex="Tahoma" style:font-size-complex="12pt" style:font-style-complex="italic"/>
    </style:style>
    <style:style style:name="Footnote" style:family="paragraph" style:parent-style-name="Standard" style:class="extra">
      <style:paragraph-properties fo:margin-left="0.499cm" fo:margin-right="0cm" fo:margin-top="0cm" fo:margin-bottom="0.011cm" style:contextual-spacing="false"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Verdana" fo:font-family="Verdana" style:font-name-complex="Tahoma" style:font-family-complex="Tahoma"/>
    </style:style>
    <style:style style:name="Index_20_Heading" style:display-name="Index Heading" style:family="paragraph" style:parent-style-name="Heading" style:class="index">
      <style:paragraph-properties fo:margin-left="0cm" fo:margin-right="0cm" fo:margin-top="0cm" fo:margin-bottom="0.199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101cm" style:contextual-spacing="false" fo:text-indent="0cm" style:auto-text-indent="false"/>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4cm" fo:margin-bottom="0.101cm" style:contextual-spacing="false" fo:text-indent="0cm" style:auto-text-indent="false" style:page-number="auto">
        <style:tab-stops/>
      </style:paragraph-properties>
      <style:text-properties fo:font-size="12pt" fo:font-weight="bold"/>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4.836cm" style:type="right" style:leader-style="dotted" style:leader-text="."/>
        </style:tab-stops>
      </style:paragraph-properties>
      <style:text-properties fo:font-weight="bold"/>
    </style:style>
    <style:style style:name="Contents_20_3" style:display-name="Contents 3" style:family="paragraph" style:parent-style-name="Index" style:class="index">
      <style:paragraph-properties fo:margin-left="0.998cm" fo:margin-right="0cm" fo:margin-top="0cm" fo:margin-bottom="0.101cm" style:contextual-spacing="false" fo:text-indent="0cm" style:auto-text-indent="false">
        <style:tab-stops>
          <style:tab-stop style:position="14.337cm" style:type="right" style:leader-style="dotted" style:leader-text="."/>
        </style:tab-stops>
      </style:paragraph-properties>
      <style:text-properties fo:font-size="10.5pt"/>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3.838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3.339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2.839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2.3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1.841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1.342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0.843cm" style:type="right" style:leader-style="dotted" style:leader-text="."/>
        </style:tab-stops>
      </style:paragraph-properties>
    </style:style>
    <style:style style:name="Title" style:family="paragraph" style:parent-style-name="Standard" style:next-style-name="Subtitle" style:class="chapter" style:master-page-name="">
      <style:paragraph-properties fo:margin-top="6.62cm" fo:margin-bottom="0.109cm" style:contextual-spacing="false" fo:text-align="left" style:justify-single-word="false" fo:orphans="0" fo:widows="0" style:page-number="auto">
        <style:tab-stops/>
      </style:paragraph-properties>
      <style:text-properties fo:color="#333366" loext:opacity="100%" style:font-name="Bahnschrift Light" fo:font-family="'Bahnschrift Light'" style:font-style-name="Fett" style:font-family-generic="swiss" style:font-pitch="variable" fo:font-size="24pt" fo:font-weight="normal" style:letter-kerning="true" style:font-size-asian="24pt" style:font-weight-asian="normal" style:font-size-complex="24pt" style:font-weight-complex="normal"/>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Delphi_20_Code" style:class="html" style:master-page-name="">
      <loext:graphic-properties draw:fill="none" draw:fill-color="#cfe7f5"/>
      <style:paragraph-properties fo:margin-left="0cm" fo:margin-right="0cm" fo:margin-top="0cm" fo:margin-bottom="0cm" style:contextual-spacing="false" fo:text-indent="0cm" style:auto-text-indent="false" style:page-number="auto" fo:background-color="transparent" style:shadow="none">
        <style:tab-stops/>
      </style:paragraph-properties>
      <style:text-properties style:font-name="Consolas1" fo:font-family="Consolas" style:font-style-name="Fett" style:font-family-generic="modern" style:font-pitch="fixed" fo:font-size="9pt" fo:font-weight="bold"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cm" style:auto-text-indent="false"/>
    </style:style>
    <style:style style:name="Author" style:family="paragraph" style:parent-style-name="Standard">
      <style:paragraph-properties fo:text-align="center" style:justify-single-word="false"/>
    </style:style>
    <style:style style:name="Abstract" style:family="paragraph" style:parent-style-name="Standard">
      <loext:graphic-properties draw:fill="solid" draw:fill-color="#e6e6e6" draw:opacity="100%"/>
      <style:paragraph-properties fo:background-color="#e6e6e6" fo:padding-left="0.141cm" fo:padding-right="0.141cm" fo:padding-top="0.035cm" fo:padding-bottom="0.035cm" fo:border="0.51pt solid #808080"/>
      <style:text-properties fo:color="#333333" loext:opacity="100%" fo:font-style="italic" style:font-style-asian="italic" style:font-style-complex="italic"/>
    </style:style>
    <style:style style:name="SourceCode" style:family="paragraph" style:parent-style-name="Standard" style:next-style-name="Standard" style:auto-update="true" style:master-page-name="">
      <loext:graphic-properties draw:fill="none" draw:fill-color="#cfe7f5"/>
      <style:paragraph-properties fo:margin-left="0cm" fo:margin-right="0cm" fo:margin-top="0cm" fo:margin-bottom="0cm" style:contextual-spacing="false" fo:text-indent="0cm" style:auto-text-indent="false" style:page-number="auto" fo:background-color="transparent" fo:padding="0.31cm" fo:border="0.06pt solid #b3b3b3" style:shadow="#808080 0.049cm 0.049cm" fo:keep-with-next="auto">
        <style:tab-stops>
          <style:tab-stop style:position="15.187cm"/>
        </style:tab-stops>
      </style:paragraph-properties>
      <style:text-properties style:font-name="Consolas3" fo:font-family="Consolas" style:font-style-name="Standard" style:font-family-generic="modern" style:font-pitch="fixed" fo:font-size="9pt" fo:font-weight="normal" style:font-weight-asian="normal" style:font-name-complex="Courier New" style:font-family-complex="'Courier New'" style:font-family-generic-complex="modern" style:font-weight-complex="normal"/>
    </style:style>
    <style:style style:name="Delphi_20_Code" style:display-name="Delphi Code" style:family="paragraph" style:parent-style-name="SourceCode" style:next-style-name="Standard" style:master-page-name="">
      <loext:graphic-properties draw:fill="none" draw:fill-color="#cfe7f5"/>
      <style:paragraph-properties fo:margin-left="0.03cm" fo:margin-right="0.011cm" fo:margin-top="0cm" fo:margin-bottom="0cm" style:contextual-spacing="false" fo:orphans="3" fo:widows="3" fo:text-indent="0cm" style:auto-text-indent="false" style:page-number="auto" fo:background-color="transparent" fo:padding-left="0.212cm" fo:padding-right="0.212cm" fo:padding-top="0.035cm" fo:padding-bottom="0.035cm" fo:border="0.06pt solid #b3b3b3" style:shadow="none" fo:keep-with-next="auto">
        <style:tab-stops/>
        <style:drop-cap/>
      </style:paragraph-properties>
      <style:text-properties style:font-name="Consolas1" fo:font-family="Consolas" style:font-style-name="Fett" style:font-family-generic="modern" style:font-pitch="fixed" fo:font-size="9pt" fo:font-weight="bold"/>
    </style:style>
    <style:style style:name="C_2b__2b__20_Code" style:display-name="C++ Code" style:family="paragraph" style:parent-style-name="SourceCode"/>
    <style:style style:name="C_23__20_Code" style:display-name="C# Code" style:family="paragraph" style:parent-style-name="SourceCode"/>
    <style:style style:name="Java_20_Code" style:display-name="Java Code" style:family="paragraph" style:parent-style-name="SourceCode"/>
    <style:style style:name="SQL_20_Code" style:display-name="SQL Code" style:family="paragraph" style:parent-style-name="SourceCode"/>
    <style:style style:name="DFM_20_Code" style:display-name="DFM Code" style:family="paragraph" style:parent-style-name="SourceCode"/>
    <style:style style:name="Xbase_20_Code" style:display-name="Xbase Code" style:family="paragraph" style:parent-style-name="SourceCode"/>
    <style:style style:name="OMG_20_IDL_20_Code" style:display-name="OMG IDL Code" style:family="paragraph" style:parent-style-name="SourceCode"/>
    <style:style style:name="MS_20_IDL_20_Code" style:display-name="MS IDL Code" style:family="paragraph" style:parent-style-name="SourceCode"/>
    <style:style style:name="PHP_20_Code" style:display-name="PHP Code" style:family="paragraph" style:parent-style-name="SourceCode"/>
    <style:style style:name="Ruby_20_Code" style:display-name="Ruby Code" style:family="paragraph" style:parent-style-name="SourceCode"/>
    <style:style style:name="JavaScript_20_Code" style:display-name="JavaScript Code" style:family="paragraph" style:parent-style-name="SourceCod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llustration" style:family="paragraph" style:parent-style-name="Caption" style:class="extra">
      <style:paragraph-properties fo:line-height="150%"/>
      <style:text-properties fo:font-size="9pt"/>
    </style:style>
    <style:style style:name="Table_20_index_20_heading" style:display-name="Table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text-properties fo:font-size="10.5pt"/>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Frame_20_contents" style:display-name="Frame contents" style:family="paragraph" style:parent-style-name="Text_20_body" style:class="extra"/>
    <style:style style:name="Feature" style:family="paragraph" style:parent-style-name="List_20_Indent">
      <loext:graphic-properties draw:fill="solid" draw:fill-color="#ffffcc" draw:opacity="100%"/>
      <style:paragraph-properties fo:margin-left="5.001cm" fo:margin-right="0cm" fo:margin-top="0.499cm" fo:margin-bottom="0.499cm" style:contextual-spacing="false" fo:text-indent="-5.001cm" style:auto-text-indent="false" fo:background-color="#ffffcc" fo:padding="0.049cm" fo:border="0.06pt solid #000000" style:shadow="none">
        <style:tab-stops/>
      </style:paragraph-properties>
      <style:text-properties fo:font-size="10.5pt"/>
    </style:style>
    <style:style style:name="Heading_20_10" style:display-name="Heading 10" style:family="paragraph" style:parent-style-name="Heading" style:next-style-name="Text_20_body" style:default-outline-level="10" style:class="chapter">
      <style:text-properties fo:font-size="75%" fo:font-weight="bold" style:font-size-asian="75%" style:font-weight-asian="bold" style:font-size-complex="75%" style:font-weight-complex="bold"/>
    </style:style>
    <style:style style:name="CodeExampleHeader" style:family="paragraph" style:parent-style-name="Standard" style:master-page-name="">
      <loext:graphic-properties draw:fill="solid" draw:fill-color="#eeeeee" draw:fill-image-width="0cm" draw:fill-image-height="0cm"/>
      <style:paragraph-properties fo:margin-left="0.101cm" fo:margin-right="14cm" fo:margin-top="0.801cm" fo:margin-bottom="0cm" style:contextual-spacing="false" fo:text-indent="0cm" style:auto-text-indent="false" style:page-number="auto" fo:background-color="#eeeeee" fo:padding="0.101cm" fo:border-left="0.06pt solid #dddddd" fo:border-right="0.06pt solid #dddddd" fo:border-top="0.06pt solid #dddddd" fo:border-bottom="none" style:shadow="none" fo:keep-with-next="always"/>
      <style:text-properties fo:font-size="10.5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Consolas2" fo:font-family="Consolas" style:font-style-name="Regular"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Teletyp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WW8Num5z0" style:family="text">
      <style:text-properties style:font-name="Symbol1" fo:font-family="Symbol" style:font-family-generic="roman" style:font-pitch="variable" style:font-charset="x-symbol"/>
    </style:style>
    <style:style style:name="WW8Num6z0" style:family="text">
      <style:text-properties style:font-name="Symbol1" fo:font-family="Symbol" style:font-family-generic="roman" style:font-pitch="variable" style:font-charset="x-symbol"/>
    </style:style>
    <style:style style:name="WW8Num7z0" style:family="text">
      <style:text-properties style:font-name="Symbol1" fo:font-family="Symbol" style:font-family-generic="roman" style:font-pitch="variable" style:font-charset="x-symbol"/>
    </style:style>
    <style:style style:name="WW8Num8z0" style:family="text">
      <style:text-properties style:font-name="Symbol1" fo:font-family="Symbol" style:font-family-generic="roman" style:font-pitch="variable" style:font-charset="x-symbol"/>
    </style:style>
    <style:style style:name="WW8Num10z0" style:family="text">
      <style:text-properties style:font-name="Symbol1" fo:font-family="Symbol" style:font-family-generic="roman" style:font-pitch="variable" style:font-charset="x-symbol"/>
    </style:style>
    <style:style style:name="Default_20_Paragraph_20_Font" style:display-name="Default Paragraph Font" style:family="text"/>
    <style:style style:name="Tip" style:family="text" style:parent-style-name="Default_20_Paragraph_20_Font">
      <style:text-properties fo:color="#6666ff" loext:opacity="100%" fo:font-weight="bold" style:font-weight-asian="bold" style:font-weight-complex="bold"/>
    </style:style>
    <style:style style:name="Tag" style:family="text" style:parent-style-name="Default_20_Paragraph_20_Font">
      <style:text-properties fo:color="#993366" loext:opacity="100%" style:font-name="Lucida Console" fo:font-family="'Lucida Console'" style:font-family-generic="modern"/>
    </style:style>
    <style:style style:name="RTF_5f_Num_20_2_20_1" style:display-name="RTF_Num 2 1" style:family="text">
      <style:text-properties style:font-name="Symbol" fo:font-family="Symbol" style:font-charset="x-symbol"/>
    </style:style>
    <style:style style:name="Strong_20_Emphasis" style:display-name="Strong Emphasis" style:family="text">
      <style:text-properties fo:font-weight="bold" style:font-weight-asian="bold" style:font-weight-complex="bold"/>
    </style:style>
    <style:style style:name="FlowSource" style:family="text">
      <style:text-properties style:use-window-font-color="true" loext:opacity="0%" style:font-name="Consolas" fo:font-family="Consolas" style:font-family-generic="modern" style:font-pitch="fixed" fo:font-size="12pt" fo:language="en" fo:country="US" fo:font-weight="normal" fo:background-color="#eeeeee" style:font-name-asian="Times New Roman" style:font-family-asian="'Times New Roman'" style:font-family-generic-asian="roman" style:font-pitch-asian="variable" style:font-size-asian="12pt" style:font-weight-asian="normal" style:font-name-complex="Arial" style:font-family-complex="Arial" style:font-family-generic-complex="swiss" style:font-pitch-complex="variable" style:font-size-complex="12pt" style:language-complex="he" style:country-complex="IL" style:font-weight-complex="normal"/>
    </style:style>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cfe7f5"/>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cfe7f5"/>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cfe7f5"/>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WW8Num1" text:consecutive-numbering="true">
      <text:list-level-style-number text:level="1" loext:num-list-format="%1%." style:num-suffix="." style:num-format="1">
        <style:list-level-properties text:space-before="1.997cm"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2" text:consecutive-numbering="true">
      <text:list-level-style-number text:level="1" loext:num-list-format="%1%." style:num-suffix="." style:num-format="1">
        <style:list-level-properties text:space-before="1.498cm"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3" text:consecutive-numbering="true">
      <text:list-level-style-number text:level="1" loext:num-list-format="%1%." style:num-suffix="." style:num-format="1">
        <style:list-level-properties text:space-before="0.998cm"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4" text:consecutive-numbering="true">
      <text:list-level-style-number text:level="1" loext:num-list-format="%1%." style:num-suffix="." style:num-format="1">
        <style:list-level-properties text:space-before="0.499cm"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5" text:consecutive-numbering="true">
      <text:list-level-style-bullet text:level="1" text:style-name="WW8Num5z0" loext:num-list-format="%1%" text:bullet-char="">
        <style:list-level-properties text:space-before="1.997cm" text:min-label-width="0.635cm"/>
        <style:text-properties style:font-name="Symbol1"/>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6" text:consecutive-numbering="true">
      <text:list-level-style-bullet text:level="1" text:style-name="WW8Num6z0" loext:num-list-format="%1%" text:bullet-char="">
        <style:list-level-properties text:space-before="1.498cm" text:min-label-width="0.635cm"/>
        <style:text-properties style:font-name="Symbol1"/>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7" text:consecutive-numbering="true">
      <text:list-level-style-bullet text:level="1" text:style-name="WW8Num7z0" loext:num-list-format="%1%" text:bullet-char="">
        <style:list-level-properties text:space-before="0.998cm" text:min-label-width="0.635cm"/>
        <style:text-properties style:font-name="Symbol1"/>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8" text:consecutive-numbering="true">
      <text:list-level-style-bullet text:level="1" text:style-name="WW8Num8z0" loext:num-list-format="%1%" text:bullet-char="">
        <style:list-level-properties text:space-before="0.499cm" text:min-label-width="0.635cm"/>
        <style:text-properties style:font-name="Symbol1"/>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9" text:consecutive-numbering="true">
      <text:list-level-style-number text:level="1" loext:num-list-format="%1%." style:num-suffix="." style:num-format="1">
        <style:list-level-properties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10" text:consecutive-numbering="true">
      <text:list-level-style-bullet text:level="1" text:style-name="WW8Num10z0" loext:num-list-format="%1%" text:bullet-char="">
        <style:list-level-properties text:min-label-width="0.635cm"/>
        <style:text-properties style:font-name="Symbol1"/>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2" style:display-name="RTF_Num 2" text:consecutive-numbering="true">
      <text:list-level-style-number text:level="1" text:style-name="RTF_5f_Num_20_2_20_1" loext:num-list-format="·%1%" style:num-prefix="·"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style:tab-stops>
          <style:tab-stop style:position="16.006cm" style:type="right"/>
          <style:tab-stop style:position="16.903cm" style:type="right"/>
        </style:tab-stops>
      </style:paragraph-properties>
    </style:style>
    <style:style style:name="MP2" style:family="paragraph" style:parent-style-name="Header">
      <style:paragraph-properties>
        <style:tab-stops>
          <style:tab-stop style:position="0.995cm"/>
        </style:tab-stops>
      </style:paragraph-properties>
    </style:style>
    <style:style style:name="MP3" style:family="paragraph" style:parent-style-name="Standard">
      <style:paragraph-properties fo:padding="0.199cm" fo:border-left="none" fo:border-right="none" fo:border-top="0.06pt solid #000000" fo:border-bottom="none" style:shadow="none"/>
      <style:text-properties style:font-name="Exo" fo:font-size="12pt" fo:font-weight="bold" style:font-size-asian="12pt" style:font-weight-asian="bold" style:font-size-complex="12pt" style:font-weight-complex="bold"/>
    </style:style>
    <style:style style:name="MP4" style:family="paragraph" style:parent-style-name="Standard">
      <style:paragraph-properties fo:text-align="justify" style:justify-single-word="false"/>
      <style:text-properties fo:font-size="9pt" fo:font-weight="normal" officeooo:paragraph-rsid="00159885" style:font-size-asian="9pt" style:font-weight-asian="normal" style:font-size-complex="9pt" style:font-weight-complex="normal"/>
    </style:style>
    <style:style style:name="MT1" style:family="text">
      <style:text-properties fo:font-style="normal" style:font-style-asian="normal" style:font-style-complex="normal"/>
    </style:style>
    <style:style style:name="MT2" style:family="text">
      <style:text-properties style:font-name="Verdana1" fo:font-style="normal" style:font-style-asian="normal" style:font-style-complex="normal"/>
    </style:style>
    <style:style style:name="MT3" style:family="text">
      <style:text-properties style:font-name="Verdana1"/>
    </style:style>
    <style:page-layout style:name="Mpm1">
      <style:page-layout-properties fo:page-width="21.001cm" fo:page-height="29.7cm" style:num-format="1" style:print-orientation="portrait" fo:margin-top="2.54cm" fo:margin-bottom="2.54cm" fo:margin-left="2cm" fo:margin-right="2cm" style:shadow="none" fo:background-color="transparent" style:writing-mode="lr-tb" style:layout-grid-color="#c0c0c0" style:layout-grid-lines="36" style:layout-grid-base-height="0.353cm" style:layout-grid-ruby-height="0.282cm" style:layout-grid-mode="none" style:layout-grid-ruby-below="false" style:layout-grid-print="false" style:layout-grid-display="false" draw:fill="none" draw:fill-color="#cfe7f5"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style:dynamic-spacing="false"/>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fill="none" draw:background-size="full" draw:fill-color="#cfe7f5"/>
    </style:style>
    <style:style style:name="Mdp2" style:family="drawing-page">
      <style:drawing-page-properties draw:background-size="full"/>
    </style:style>
  </office:automatic-styles>
  <office:master-styles>
    <style:master-page style:name="Standard" style:page-layout-name="Mpm1" draw:style-name="Mdp1">
      <style:header>
        <text:p text:style-name="MP1"><text:span text:style-name="MT1"><text:tab/></text:span><text:span text:style-name="MT2"><text:chapter text:display="name" text:outline-level="1">Third-Party Product Licenses</text:chapter></text:span><text:span text:style-name="MT3"><text:tab/></text:span><text:span text:style-name="MT2"><text:page-number text:select-page="current">37</text:page-number></text:span></text:p>
      </style:header>
      <style:header-left>
        <text:p text:style-name="MP2"><text:page-number text:select-page="current">38</text:page-number><text:tab/><text:title>Daraja HTTP Framework</text:title> <text:keywords>3.1.0</text:keywords></text:p>
      </style:header-left>
    </style:master-page>
    <style:master-page style:name="HTML" style:page-layout-name="Mpm2" draw:style-name="Mdp2">
      <style:footer>
        <text:p text:style-name="Footer"/>
      </style:footer>
    </style:master-page>
    <style:master-page style:name="First_20_Page" style:display-name="First Page" style:page-layout-name="Mpm3" draw:style-name="Mdp2" style:next-style-name="Standard">
      <style:footer>
        <text:p text:style-name="MP3">Trademarks</text:p>
        <text:p text:style-name="MP4">Habari is a registered trademark of Michael Justin and is protected by the laws of Germany and other countries. Embarcadero, the Embarcadero Technologies logos and all other Embarcadero Technologies product or service names are trademarks, service marks, and/or registered trademarks of Embarcadero Technologies, Inc. and are protected by the laws of the United States and other countries. Microsoft, Win­dows, Windows NT, and/or other Microsoft products referenced herein are either registered trademarks or trademarks of Microsoft Corporation in the United States and/or other countries. Other brands and their products are trademarks of their respective holders.</text:p>
      </style:footer>
    </style:master-page>
    <style:master-page style:name="Endnote" style:page-layout-name="Mpm4"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6.2.1.2$Windows_X86_64 LibreOffice_project/620$Build-2</meta:generator>
    <meta:initial-creator>Michael Justin</meta:initial-creator>
    <meta:creation-date>2007-10-03T18:31:29</meta:creation-date>
    <dc:date>2026-05-15T15:55:26.918434700</dc:date>
    <meta:editing-cycles>1748</meta:editing-cycles>
    <meta:editing-duration>P4DT15H14M57S</meta:editing-duration>
    <dc:title>Daraja HTTP Framework</dc:title>
    <meta:print-date>2025-06-14T20:18:42.084000000</meta:print-date>
    <meta:printed-by>PDF files</meta:printed-by>
    <meta:keyword>3.1.0</meta:keyword>
    <meta:document-statistic meta:table-count="1" meta:image-count="7" meta:object-count="0" meta:page-count="39" meta:paragraph-count="809" meta:word-count="5111" meta:character-count="36582" meta:non-whitespace-character-count="31642"/>
    <meta:user-defined meta:name="Info 1"/>
    <meta:user-defined meta:name="Info 2"/>
    <meta:user-defined meta:name="Info 3"/>
    <meta:user-defined meta:name="Info 4"/>
  </office:meta>
</office:document-meta>
</file>